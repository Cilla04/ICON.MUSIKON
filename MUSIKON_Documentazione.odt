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A000003E72B3E1A57.png" manifest:media-type="image/png"/>
  <manifest:file-entry manifest:full-path="Pictures/10000001000008250000037292118EBA.png" manifest:media-type="image/png"/>
  <manifest:file-entry manifest:full-path="Pictures/1000000100000950000005F0EDD8F5EA.png" manifest:media-type="image/png"/>
  <manifest:file-entry manifest:full-path="Pictures/100000010000076100000293B0DCF9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ella1" style:family="table">
      <style:table-properties style:width="11.994cm" fo:margin-left="0.002cm" fo:margin-top="0cm" fo:margin-bottom="0cm" table:align="left" style:writing-mode="page"/>
    </style:style>
    <style:style style:name="Tabella1.A" style:family="table-column">
      <style:table-column-properties style:column-width="1.588cm"/>
    </style:style>
    <style:style style:name="Tabella1.B" style:family="table-column">
      <style:table-column-properties style:column-width="4.057cm"/>
    </style:style>
    <style:style style:name="Tabella1.C" style:family="table-column">
      <style:table-column-properties style:column-width="3.879cm"/>
    </style:style>
    <style:style style:name="Tabella1.D" style:family="table-column">
      <style:table-column-properties style:column-width="1.236cm"/>
    </style:style>
    <style:style style:name="Tabella1.E" style:family="table-column">
      <style:table-column-properties style:column-width="1.235cm"/>
    </style:style>
    <style:style style:name="Tabella1.1" style:family="table-row">
      <style:table-row-properties fo:keep-together="auto"/>
    </style:style>
    <style:style style:name="Tabella1.A1" style:family="table-cell">
      <style:table-cell-properties fo:background-color="#1a237e" fo:padding-left="0.229cm" fo:padding-right="0.229cm" fo:padding-top="0.141cm" fo:padding-bottom="0.141cm" fo:border="0.1pt solid #cccccc">
        <style:background-image/>
      </style:table-cell-properties>
    </style:style>
    <style:style style:name="Tabella1.A2" style:family="table-cell">
      <style:table-cell-properties fo:background-color="#ffffff" fo:padding-left="0.229cm" fo:padding-right="0.229cm" fo:padding-top="0.141cm" fo:padding-bottom="0.141cm" fo:border="0.1pt solid #cccccc">
        <style:background-image/>
      </style:table-cell-properties>
    </style:style>
    <style:style style:name="Tabella1.A3" style:family="table-cell">
      <style:table-cell-properties fo:background-color="#e8eaf6" fo:padding-left="0.229cm" fo:padding-right="0.229cm" fo:padding-top="0.141cm" fo:padding-bottom="0.141cm" fo:border="0.1pt solid #cccccc">
        <style:background-image/>
      </style:table-cell-properties>
    </style:style>
    <style:style style:name="Tabella2" style:family="table">
      <style:table-properties style:width="15.522cm" fo:margin-left="0.002cm" fo:margin-top="0cm" fo:margin-bottom="0cm" table:align="left" style:writing-mode="page"/>
    </style:style>
    <style:style style:name="Tabella2.A" style:family="table-column">
      <style:table-column-properties style:column-width="4.41cm"/>
    </style:style>
    <style:style style:name="Tabella2.B" style:family="table-column">
      <style:table-column-properties style:column-width="2.644cm"/>
    </style:style>
    <style:style style:name="Tabella2.C" style:family="table-column">
      <style:table-column-properties style:column-width="8.468cm"/>
    </style:style>
    <style:style style:name="Tabella2.1" style:family="table-row">
      <style:table-row-properties fo:keep-together="auto"/>
    </style:style>
    <style:style style:name="Tabella2.A1" style:family="table-cell">
      <style:table-cell-properties fo:background-color="#1a237e" fo:padding-left="0.229cm" fo:padding-right="0.229cm" fo:padding-top="0.141cm" fo:padding-bottom="0.141cm" fo:border="0.1pt solid #cccccc">
        <style:background-image/>
      </style:table-cell-properties>
    </style:style>
    <style:style style:name="Tabella2.A2" style:family="table-cell">
      <style:table-cell-properties fo:background-color="#ffffff" fo:padding-left="0.229cm" fo:padding-right="0.229cm" fo:padding-top="0.141cm" fo:padding-bottom="0.141cm" fo:border="0.1pt solid #cccccc">
        <style:background-image/>
      </style:table-cell-properties>
    </style:style>
    <style:style style:name="Tabella2.A3" style:family="table-cell">
      <style:table-cell-properties fo:background-color="#e8eaf6" fo:padding-left="0.229cm" fo:padding-right="0.229cm" fo:padding-top="0.141cm" fo:padding-bottom="0.141cm" fo:border="0.1pt solid #cccccc">
        <style:background-image/>
      </style:table-cell-properties>
    </style:style>
    <style:style style:name="Tabella3" style:family="table">
      <style:table-properties style:width="15.522cm" fo:margin-left="0.002cm" fo:margin-top="0cm" fo:margin-bottom="0cm" table:align="left" style:writing-mode="page"/>
    </style:style>
    <style:style style:name="Tabella3.A" style:family="table-column">
      <style:table-column-properties style:column-width="15.522cm"/>
    </style:style>
    <style:style style:name="Tabella3.1" style:family="table-row">
      <style:table-row-properties fo:keep-together="auto"/>
    </style:style>
    <style:style style:name="Tabella3.A1" style:family="table-cell">
      <style:table-cell-properties fo:background-color="#fff9c4" fo:padding-left="0.353cm" fo:padding-right="0.353cm" fo:padding-top="0.176cm" fo:padding-bottom="0.053cm" fo:border="0.1pt solid #cccccc">
        <style:background-image/>
      </style:table-cell-properties>
    </style:style>
    <style:style style:name="Tabella3.A2" style:family="table-cell">
      <style:table-cell-properties fo:background-color="#fff9c4" fo:padding-left="0.353cm" fo:padding-right="0.353cm" fo:padding-top="0.071cm" fo:padding-bottom="0.071cm" fo:border-left="0.1pt solid #cccccc" fo:border-right="0.1pt solid #cccccc" fo:border-top="none" fo:border-bottom="0.1pt solid #cccccc">
        <style:background-image/>
      </style:table-cell-properties>
    </style:style>
    <style:style style:name="Tabella4" style:family="table">
      <style:table-properties style:width="15.522cm" fo:margin-left="0.002cm" fo:margin-top="0cm" fo:margin-bottom="0cm" table:align="left" style:writing-mode="page"/>
    </style:style>
    <style:style style:name="Tabella4.A" style:family="table-column">
      <style:table-column-properties style:column-width="3.528cm"/>
    </style:style>
    <style:style style:name="Tabella4.B" style:family="table-column">
      <style:table-column-properties style:column-width="2.469cm"/>
    </style:style>
    <style:style style:name="Tabella4.C" style:family="table-column">
      <style:table-column-properties style:column-width="4.584cm"/>
    </style:style>
    <style:style style:name="Tabella4.D" style:family="table-column">
      <style:table-column-properties style:column-width="4.939cm"/>
    </style:style>
    <style:style style:name="Tabella4.1" style:family="table-row">
      <style:table-row-properties fo:keep-together="auto"/>
    </style:style>
    <style:style style:name="Tabella4.A1" style:family="table-cell">
      <style:table-cell-properties fo:background-color="#1a237e" fo:padding-left="0.229cm" fo:padding-right="0.229cm" fo:padding-top="0.141cm" fo:padding-bottom="0.141cm" fo:border="0.1pt solid #cccccc">
        <style:background-image/>
      </style:table-cell-properties>
    </style:style>
    <style:style style:name="Tabella4.A2" style:family="table-cell">
      <style:table-cell-properties fo:background-color="#ffffff" fo:padding-left="0.229cm" fo:padding-right="0.229cm" fo:padding-top="0.141cm" fo:padding-bottom="0.141cm" fo:border="0.1pt solid #cccccc">
        <style:background-image/>
      </style:table-cell-properties>
    </style:style>
    <style:style style:name="Tabella4.A3" style:family="table-cell">
      <style:table-cell-properties fo:background-color="#e8eaf6" fo:padding-left="0.229cm" fo:padding-right="0.229cm" fo:padding-top="0.141cm" fo:padding-bottom="0.141cm" fo:border="0.1pt solid #cccccc">
        <style:background-image/>
      </style:table-cell-properties>
    </style:style>
    <style:style style:name="Tabella5" style:family="table">
      <style:table-properties style:width="19.226cm" fo:margin-left="0.002cm" fo:margin-top="0cm" fo:margin-bottom="0cm" table:align="left" style:writing-mode="page"/>
    </style:style>
    <style:style style:name="Tabella5.A" style:family="table-column">
      <style:table-column-properties style:column-width="2.822cm"/>
    </style:style>
    <style:style style:name="Tabella5.B" style:family="table-column">
      <style:table-column-properties style:column-width="2.293cm"/>
    </style:style>
    <style:style style:name="Tabella5.C" style:family="table-column">
      <style:table-column-properties style:column-width="2.291cm"/>
    </style:style>
    <style:style style:name="Tabella5.D" style:family="table-column">
      <style:table-column-properties style:column-width="2.295cm"/>
    </style:style>
    <style:style style:name="Tabella5.E" style:family="table-column">
      <style:table-column-properties style:column-width="2.468cm"/>
    </style:style>
    <style:style style:name="Tabella5.F" style:family="table-column">
      <style:table-column-properties style:column-width="2.646cm"/>
    </style:style>
    <style:style style:name="Tabella5.G" style:family="table-column">
      <style:table-column-properties style:column-width="2.471cm"/>
    </style:style>
    <style:style style:name="Tabella5.H" style:family="table-column">
      <style:table-column-properties style:column-width="1.937cm"/>
    </style:style>
    <style:style style:name="Tabella5.1" style:family="table-row">
      <style:table-row-properties fo:keep-together="auto"/>
    </style:style>
    <style:style style:name="Tabella5.A1" style:family="table-cell">
      <style:table-cell-properties fo:background-color="#1a237e" fo:padding-left="0.229cm" fo:padding-right="0.229cm" fo:padding-top="0.141cm" fo:padding-bottom="0.141cm" fo:border="0.1pt solid #cccccc">
        <style:background-image/>
      </style:table-cell-properties>
    </style:style>
    <style:style style:name="Tabella5.A2" style:family="table-cell">
      <style:table-cell-properties fo:background-color="#ffffff" fo:padding-left="0.229cm" fo:padding-right="0.229cm" fo:padding-top="0.141cm" fo:padding-bottom="0.141cm" fo:border="0.1pt solid #cccccc">
        <style:background-image/>
      </style:table-cell-properties>
    </style:style>
    <style:style style:name="Tabella5.A3" style:family="table-cell">
      <style:table-cell-properties fo:background-color="#e8eaf6" fo:padding-left="0.229cm" fo:padding-right="0.229cm" fo:padding-top="0.141cm" fo:padding-bottom="0.141cm" fo:border="0.1pt solid #cccccc">
        <style:background-image/>
      </style:table-cell-properties>
    </style:style>
    <style:style style:name="Tabella6" style:family="table">
      <style:table-properties style:width="15.522cm" fo:margin-left="0.002cm" fo:margin-top="0cm" fo:margin-bottom="0cm" table:align="left" style:writing-mode="page"/>
    </style:style>
    <style:style style:name="Tabella6.A" style:family="table-column">
      <style:table-column-properties style:column-width="15.522cm"/>
    </style:style>
    <style:style style:name="Tabella6.1" style:family="table-row">
      <style:table-row-properties fo:keep-together="auto"/>
    </style:style>
    <style:style style:name="Tabella6.A1" style:family="table-cell">
      <style:table-cell-properties fo:background-color="#fff9c4" fo:padding-left="0.353cm" fo:padding-right="0.353cm" fo:padding-top="0.176cm" fo:padding-bottom="0.053cm" fo:border="0.1pt solid #cccccc">
        <style:background-image/>
      </style:table-cell-properties>
    </style:style>
    <style:style style:name="Tabella6.A2" style:family="table-cell">
      <style:table-cell-properties fo:background-color="#fff9c4" fo:padding-left="0.353cm" fo:padding-right="0.353cm" fo:padding-top="0.071cm" fo:padding-bottom="0.071cm" fo:border-left="0.1pt solid #cccccc" fo:border-right="0.1pt solid #cccccc" fo:border-top="none" fo:border-bottom="0.1pt solid #cccccc">
        <style:background-image/>
      </style:table-cell-properties>
    </style:style>
    <style:style style:name="Tabella7" style:family="table">
      <style:table-properties style:width="15.169cm" fo:margin-left="0.002cm" fo:margin-top="0cm" fo:margin-bottom="0cm" table:align="left" style:writing-mode="page"/>
    </style:style>
    <style:style style:name="Tabella7.A" style:family="table-column">
      <style:table-column-properties style:column-width="3.35cm"/>
    </style:style>
    <style:style style:name="Tabella7.B" style:family="table-column">
      <style:table-column-properties style:column-width="2.118cm"/>
    </style:style>
    <style:style style:name="Tabella7.C" style:family="table-column">
      <style:table-column-properties style:column-width="6.172cm"/>
    </style:style>
    <style:style style:name="Tabella7.D" style:family="table-column">
      <style:table-column-properties style:column-width="3.528cm"/>
    </style:style>
    <style:style style:name="Tabella7.1" style:family="table-row">
      <style:table-row-properties fo:keep-together="auto"/>
    </style:style>
    <style:style style:name="Tabella7.A1" style:family="table-cell">
      <style:table-cell-properties fo:background-color="#1a237e" fo:padding-left="0.229cm" fo:padding-right="0.229cm" fo:padding-top="0.141cm" fo:padding-bottom="0.141cm" fo:border="0.1pt solid #cccccc">
        <style:background-image/>
      </style:table-cell-properties>
    </style:style>
    <style:style style:name="Tabella7.A2" style:family="table-cell">
      <style:table-cell-properties fo:background-color="#ffffff" fo:padding-left="0.229cm" fo:padding-right="0.229cm" fo:padding-top="0.141cm" fo:padding-bottom="0.141cm" fo:border="0.1pt solid #cccccc">
        <style:background-image/>
      </style:table-cell-properties>
    </style:style>
    <style:style style:name="Tabella7.A3" style:family="table-cell">
      <style:table-cell-properties fo:background-color="#e8eaf6" fo:padding-left="0.229cm" fo:padding-right="0.229cm" fo:padding-top="0.141cm" fo:padding-bottom="0.141cm" fo:border="0.1pt solid #cccccc">
        <style:background-image/>
      </style:table-cell-properties>
    </style:style>
    <style:style style:name="Tabella8" style:family="table">
      <style:table-properties style:width="15.522cm" fo:margin-left="0.002cm" fo:margin-top="0cm" fo:margin-bottom="0cm" table:align="left" style:writing-mode="page"/>
    </style:style>
    <style:style style:name="Tabella8.A" style:family="table-column">
      <style:table-column-properties style:column-width="15.522cm"/>
    </style:style>
    <style:style style:name="Tabella8.1" style:family="table-row">
      <style:table-row-properties fo:keep-together="auto"/>
    </style:style>
    <style:style style:name="Tabella8.A1" style:family="table-cell">
      <style:table-cell-properties fo:background-color="#fff9c4" fo:padding-left="0.353cm" fo:padding-right="0.353cm" fo:padding-top="0.176cm" fo:padding-bottom="0.053cm" fo:border="0.1pt solid #cccccc">
        <style:background-image/>
      </style:table-cell-properties>
    </style:style>
    <style:style style:name="Tabella8.A2" style:family="table-cell">
      <style:table-cell-properties fo:background-color="#fff9c4" fo:padding-left="0.353cm" fo:padding-right="0.353cm" fo:padding-top="0.071cm" fo:padding-bottom="0.071cm" fo:border-left="0.1pt solid #cccccc" fo:border-right="0.1pt solid #cccccc" fo:border-top="none" fo:border-bottom="0.1pt solid #cccccc">
        <style:background-image/>
      </style:table-cell-properties>
    </style:style>
    <style:style style:name="Tabella9" style:family="table">
      <style:table-properties style:width="15.522cm" fo:margin-left="0.002cm" fo:margin-top="0cm" fo:margin-bottom="0cm" table:align="left" style:writing-mode="page"/>
    </style:style>
    <style:style style:name="Tabella9.A" style:family="table-column">
      <style:table-column-properties style:column-width="2.646cm"/>
    </style:style>
    <style:style style:name="Tabella9.B" style:family="table-column">
      <style:table-column-properties style:column-width="4.055cm"/>
    </style:style>
    <style:style style:name="Tabella9.C" style:family="table-column">
      <style:table-column-properties style:column-width="8.821cm"/>
    </style:style>
    <style:style style:name="Tabella9.1" style:family="table-row">
      <style:table-row-properties fo:keep-together="auto"/>
    </style:style>
    <style:style style:name="Tabella9.A1" style:family="table-cell">
      <style:table-cell-properties fo:background-color="#1a237e" fo:padding-left="0.229cm" fo:padding-right="0.229cm" fo:padding-top="0.141cm" fo:padding-bottom="0.141cm" fo:border="0.1pt solid #cccccc">
        <style:background-image/>
      </style:table-cell-properties>
    </style:style>
    <style:style style:name="Tabella9.A2" style:family="table-cell">
      <style:table-cell-properties fo:background-color="#ffffff" fo:padding-left="0.229cm" fo:padding-right="0.229cm" fo:padding-top="0.141cm" fo:padding-bottom="0.141cm" fo:border="0.1pt solid #cccccc">
        <style:background-image/>
      </style:table-cell-properties>
    </style:style>
    <style:style style:name="Tabella9.A3" style:family="table-cell">
      <style:table-cell-properties fo:background-color="#e8eaf6" fo:padding-left="0.229cm" fo:padding-right="0.229cm" fo:padding-top="0.141cm" fo:padding-bottom="0.141cm" fo:border="0.1pt solid #cccccc">
        <style:background-image/>
      </style:table-cell-properties>
    </style:style>
    <style:style style:name="Tabella10" style:family="table">
      <style:table-properties style:width="15.522cm" fo:margin-left="0.002cm" fo:margin-top="0cm" fo:margin-bottom="0cm" table:align="left" style:writing-mode="page"/>
    </style:style>
    <style:style style:name="Tabella10.A" style:family="table-column">
      <style:table-column-properties style:column-width="3.528cm"/>
    </style:style>
    <style:style style:name="Tabella10.B" style:family="table-column">
      <style:table-column-properties style:column-width="2.115cm"/>
    </style:style>
    <style:style style:name="Tabella10.C" style:family="table-column">
      <style:table-column-properties style:column-width="2.118cm"/>
    </style:style>
    <style:style style:name="Tabella10.D" style:family="table-column">
      <style:table-column-properties style:column-width="7.759cm"/>
    </style:style>
    <style:style style:name="Tabella10.1" style:family="table-row">
      <style:table-row-properties fo:keep-together="auto"/>
    </style:style>
    <style:style style:name="Tabella10.A1" style:family="table-cell">
      <style:table-cell-properties fo:background-color="#1a237e" fo:padding-left="0.229cm" fo:padding-right="0.229cm" fo:padding-top="0.141cm" fo:padding-bottom="0.141cm" fo:border="0.1pt solid #cccccc">
        <style:background-image/>
      </style:table-cell-properties>
    </style:style>
    <style:style style:name="Tabella10.A2" style:family="table-cell">
      <style:table-cell-properties fo:background-color="#ffffff" fo:padding-left="0.229cm" fo:padding-right="0.229cm" fo:padding-top="0.141cm" fo:padding-bottom="0.141cm" fo:border="0.1pt solid #cccccc">
        <style:background-image/>
      </style:table-cell-properties>
    </style:style>
    <style:style style:name="Tabella10.A3" style:family="table-cell">
      <style:table-cell-properties fo:background-color="#e8eaf6" fo:padding-left="0.229cm" fo:padding-right="0.229cm" fo:padding-top="0.141cm" fo:padding-bottom="0.141cm" fo:border="0.1pt solid #cccccc">
        <style:background-image/>
      </style:table-cell-properties>
    </style:style>
    <style:style style:name="Tabella11" style:family="table">
      <style:table-properties style:width="15.522cm" fo:margin-left="0.002cm" fo:margin-top="0cm" fo:margin-bottom="0cm" table:align="left" style:writing-mode="page"/>
    </style:style>
    <style:style style:name="Tabella11.A" style:family="table-column">
      <style:table-column-properties style:column-width="3.528cm"/>
    </style:style>
    <style:style style:name="Tabella11.B" style:family="table-column">
      <style:table-column-properties style:column-width="3.526cm"/>
    </style:style>
    <style:style style:name="Tabella11.C" style:family="table-column">
      <style:table-column-properties style:column-width="8.468cm"/>
    </style:style>
    <style:style style:name="Tabella11.1" style:family="table-row">
      <style:table-row-properties fo:keep-together="auto"/>
    </style:style>
    <style:style style:name="Tabella11.A1" style:family="table-cell">
      <style:table-cell-properties fo:background-color="#1a237e" fo:padding-left="0.229cm" fo:padding-right="0.229cm" fo:padding-top="0.141cm" fo:padding-bottom="0.141cm" fo:border="0.1pt solid #cccccc">
        <style:background-image/>
      </style:table-cell-properties>
    </style:style>
    <style:style style:name="Tabella11.A2" style:family="table-cell">
      <style:table-cell-properties fo:background-color="#ffffff" fo:padding-left="0.229cm" fo:padding-right="0.229cm" fo:padding-top="0.141cm" fo:padding-bottom="0.141cm" fo:border="0.1pt solid #cccccc">
        <style:background-image/>
      </style:table-cell-properties>
    </style:style>
    <style:style style:name="Tabella11.A3" style:family="table-cell">
      <style:table-cell-properties fo:background-color="#e8eaf6" fo:padding-left="0.229cm" fo:padding-right="0.229cm" fo:padding-top="0.141cm" fo:padding-bottom="0.141cm" fo:border="0.1pt solid #cccccc">
        <style:background-image/>
      </style:table-cell-properties>
    </style:style>
    <style:style style:name="Tabella12" style:family="table">
      <style:table-properties style:width="13.758cm" fo:margin-left="0.002cm" fo:margin-top="0cm" fo:margin-bottom="0cm" table:align="left" style:writing-mode="page"/>
    </style:style>
    <style:style style:name="Tabella12.A" style:family="table-column">
      <style:table-column-properties style:column-width="3.526cm"/>
    </style:style>
    <style:style style:name="Tabella12.B" style:family="table-column">
      <style:table-column-properties style:column-width="2.118cm"/>
    </style:style>
    <style:style style:name="Tabella12.C" style:family="table-column">
      <style:table-column-properties style:column-width="2.115cm"/>
    </style:style>
    <style:style style:name="Tabella12.D" style:family="table-column">
      <style:table-column-properties style:column-width="5.997cm"/>
    </style:style>
    <style:style style:name="Tabella12.1" style:family="table-row">
      <style:table-row-properties fo:keep-together="auto"/>
    </style:style>
    <style:style style:name="Tabella12.A1" style:family="table-cell">
      <style:table-cell-properties fo:background-color="#1a237e" fo:padding-left="0.229cm" fo:padding-right="0.229cm" fo:padding-top="0.141cm" fo:padding-bottom="0.141cm" fo:border="0.1pt solid #cccccc">
        <style:background-image/>
      </style:table-cell-properties>
    </style:style>
    <style:style style:name="Tabella12.A2" style:family="table-cell">
      <style:table-cell-properties fo:background-color="#ffffff" fo:padding-left="0.229cm" fo:padding-right="0.229cm" fo:padding-top="0.141cm" fo:padding-bottom="0.141cm" fo:border="0.1pt solid #cccccc">
        <style:background-image/>
      </style:table-cell-properties>
    </style:style>
    <style:style style:name="Tabella12.A3" style:family="table-cell">
      <style:table-cell-properties fo:background-color="#e8eaf6" fo:padding-left="0.229cm" fo:padding-right="0.229cm" fo:padding-top="0.141cm" fo:padding-bottom="0.141cm" fo:border="0.1pt solid #cccccc">
        <style:background-image/>
      </style:table-cell-properties>
    </style:style>
    <style:style style:name="Tabella13" style:family="table">
      <style:table-properties style:width="13.582cm" fo:margin-left="0.002cm" fo:margin-top="0cm" fo:margin-bottom="0cm" table:align="left" style:writing-mode="page"/>
    </style:style>
    <style:style style:name="Tabella13.A" style:family="table-column">
      <style:table-column-properties style:column-width="1.764cm"/>
    </style:style>
    <style:style style:name="Tabella13.B" style:family="table-column">
      <style:table-column-properties style:column-width="3.35cm"/>
    </style:style>
    <style:style style:name="Tabella13.C" style:family="table-column">
      <style:table-column-properties style:column-width="2.118cm"/>
    </style:style>
    <style:style style:name="Tabella13.D" style:family="table-column">
      <style:table-column-properties style:column-width="6.348cm"/>
    </style:style>
    <style:style style:name="Tabella13.1" style:family="table-row">
      <style:table-row-properties fo:keep-together="auto"/>
    </style:style>
    <style:style style:name="Tabella13.A1" style:family="table-cell">
      <style:table-cell-properties fo:background-color="#1a237e" fo:padding-left="0.229cm" fo:padding-right="0.229cm" fo:padding-top="0.141cm" fo:padding-bottom="0.141cm" fo:border="0.1pt solid #cccccc">
        <style:background-image/>
      </style:table-cell-properties>
    </style:style>
    <style:style style:name="Tabella13.A2" style:family="table-cell">
      <style:table-cell-properties fo:background-color="#ffffff" fo:padding-left="0.229cm" fo:padding-right="0.229cm" fo:padding-top="0.141cm" fo:padding-bottom="0.141cm" fo:border="0.1pt solid #cccccc">
        <style:background-image/>
      </style:table-cell-properties>
    </style:style>
    <style:style style:name="Tabella13.A3" style:family="table-cell">
      <style:table-cell-properties fo:background-color="#e8eaf6" fo:padding-left="0.229cm" fo:padding-right="0.229cm" fo:padding-top="0.141cm" fo:padding-bottom="0.141cm" fo:border="0.1pt solid #cccccc">
        <style:background-image/>
      </style:table-cell-properties>
    </style:style>
    <style:style style:name="Tabella14" style:family="table">
      <style:table-properties style:width="13.758cm" fo:margin-left="0.002cm" fo:margin-top="0cm" fo:margin-bottom="0cm" table:align="left" style:writing-mode="page"/>
    </style:style>
    <style:style style:name="Tabella14.A" style:family="table-column">
      <style:table-column-properties style:column-width="3.526cm"/>
    </style:style>
    <style:style style:name="Tabella14.B" style:family="table-column">
      <style:table-column-properties style:column-width="2.118cm"/>
    </style:style>
    <style:style style:name="Tabella14.C" style:family="table-column">
      <style:table-column-properties style:column-width="2.115cm"/>
    </style:style>
    <style:style style:name="Tabella14.D" style:family="table-column">
      <style:table-column-properties style:column-width="5.997cm"/>
    </style:style>
    <style:style style:name="Tabella14.1" style:family="table-row">
      <style:table-row-properties fo:keep-together="auto"/>
    </style:style>
    <style:style style:name="Tabella14.A1" style:family="table-cell">
      <style:table-cell-properties fo:background-color="#1a237e" fo:padding-left="0.229cm" fo:padding-right="0.229cm" fo:padding-top="0.141cm" fo:padding-bottom="0.141cm" fo:border="0.1pt solid #cccccc">
        <style:background-image/>
      </style:table-cell-properties>
    </style:style>
    <style:style style:name="Tabella14.A2" style:family="table-cell">
      <style:table-cell-properties fo:background-color="#ffffff" fo:padding-left="0.229cm" fo:padding-right="0.229cm" fo:padding-top="0.141cm" fo:padding-bottom="0.141cm" fo:border="0.1pt solid #cccccc">
        <style:background-image/>
      </style:table-cell-properties>
    </style:style>
    <style:style style:name="Tabella14.A3" style:family="table-cell">
      <style:table-cell-properties fo:background-color="#e8eaf6" fo:padding-left="0.229cm" fo:padding-right="0.229cm" fo:padding-top="0.141cm" fo:padding-bottom="0.141cm" fo:border="0.1pt solid #cccccc">
        <style:background-image/>
      </style:table-cell-properties>
    </style:style>
    <style:style style:name="Tabella15" style:family="table">
      <style:table-properties style:width="15.522cm" fo:margin-left="0.002cm" fo:margin-top="0cm" fo:margin-bottom="0cm" table:align="left" style:writing-mode="page"/>
    </style:style>
    <style:style style:name="Tabella15.A" style:family="table-column">
      <style:table-column-properties style:column-width="1.588cm"/>
    </style:style>
    <style:style style:name="Tabella15.B" style:family="table-column">
      <style:table-column-properties style:column-width="2.999cm"/>
    </style:style>
    <style:style style:name="Tabella15.C" style:family="table-column">
      <style:table-column-properties style:column-width="2.115cm"/>
    </style:style>
    <style:style style:name="Tabella15.D" style:family="table-column">
      <style:table-column-properties style:column-width="8.819cm"/>
    </style:style>
    <style:style style:name="Tabella15.1" style:family="table-row">
      <style:table-row-properties fo:keep-together="auto"/>
    </style:style>
    <style:style style:name="Tabella15.A1" style:family="table-cell">
      <style:table-cell-properties fo:background-color="#1a237e" fo:padding-left="0.229cm" fo:padding-right="0.229cm" fo:padding-top="0.141cm" fo:padding-bottom="0.141cm" fo:border="0.1pt solid #cccccc">
        <style:background-image/>
      </style:table-cell-properties>
    </style:style>
    <style:style style:name="Tabella15.A2" style:family="table-cell">
      <style:table-cell-properties fo:background-color="#ffffff" fo:padding-left="0.229cm" fo:padding-right="0.229cm" fo:padding-top="0.141cm" fo:padding-bottom="0.141cm" fo:border="0.1pt solid #cccccc">
        <style:background-image/>
      </style:table-cell-properties>
    </style:style>
    <style:style style:name="Tabella15.A3" style:family="table-cell">
      <style:table-cell-properties fo:background-color="#e8eaf6" fo:padding-left="0.229cm" fo:padding-right="0.229cm" fo:padding-top="0.141cm" fo:padding-bottom="0.141cm" fo:border="0.1pt solid #cccccc">
        <style:background-image/>
      </style:table-cell-properties>
    </style:style>
    <style:style style:name="Tabella16" style:family="table">
      <style:table-properties style:width="15.522cm" fo:margin-left="0.002cm" fo:margin-top="0cm" fo:margin-bottom="0cm" table:align="left" style:writing-mode="page"/>
    </style:style>
    <style:style style:name="Tabella16.A" style:family="table-column">
      <style:table-column-properties style:column-width="2.646cm"/>
    </style:style>
    <style:style style:name="Tabella16.B" style:family="table-column">
      <style:table-column-properties style:column-width="6.174cm"/>
    </style:style>
    <style:style style:name="Tabella16.C" style:family="table-column">
      <style:table-column-properties style:column-width="6.703cm"/>
    </style:style>
    <style:style style:name="Tabella16.1" style:family="table-row">
      <style:table-row-properties fo:keep-together="auto"/>
    </style:style>
    <style:style style:name="Tabella16.A1" style:family="table-cell">
      <style:table-cell-properties fo:background-color="#1a237e" fo:padding-left="0.229cm" fo:padding-right="0.229cm" fo:padding-top="0.141cm" fo:padding-bottom="0.141cm" fo:border="0.1pt solid #cccccc">
        <style:background-image/>
      </style:table-cell-properties>
    </style:style>
    <style:style style:name="Tabella16.A2" style:family="table-cell">
      <style:table-cell-properties fo:background-color="#ffffff" fo:padding-left="0.229cm" fo:padding-right="0.229cm" fo:padding-top="0.141cm" fo:padding-bottom="0.141cm" fo:border="0.1pt solid #cccccc">
        <style:background-image/>
      </style:table-cell-properties>
    </style:style>
    <style:style style:name="Tabella16.A3" style:family="table-cell">
      <style:table-cell-properties fo:background-color="#e8eaf6" fo:padding-left="0.229cm" fo:padding-right="0.229cm" fo:padding-top="0.141cm" fo:padding-bottom="0.141cm" fo:border="0.1pt solid #cccccc">
        <style:background-image/>
      </style:table-cell-properties>
    </style:style>
    <style:style style:name="Tabella17" style:family="table">
      <style:table-properties style:width="15.522cm" fo:margin-left="0.002cm" fo:margin-top="0cm" fo:margin-bottom="0cm" table:align="left" style:writing-mode="page"/>
    </style:style>
    <style:style style:name="Tabella17.A" style:family="table-column">
      <style:table-column-properties style:column-width="3.881cm"/>
    </style:style>
    <style:style style:name="Tabella17.B" style:family="table-column">
      <style:table-column-properties style:column-width="2.999cm"/>
    </style:style>
    <style:style style:name="Tabella17.C" style:family="table-column">
      <style:table-column-properties style:column-width="2.115cm"/>
    </style:style>
    <style:style style:name="Tabella17.D" style:family="table-column">
      <style:table-column-properties style:column-width="6.526cm"/>
    </style:style>
    <style:style style:name="Tabella17.1" style:family="table-row">
      <style:table-row-properties fo:keep-together="auto"/>
    </style:style>
    <style:style style:name="Tabella17.A1" style:family="table-cell">
      <style:table-cell-properties fo:background-color="#1a237e" fo:padding-left="0.229cm" fo:padding-right="0.229cm" fo:padding-top="0.141cm" fo:padding-bottom="0.141cm" fo:border="0.1pt solid #cccccc">
        <style:background-image/>
      </style:table-cell-properties>
    </style:style>
    <style:style style:name="Tabella17.A2" style:family="table-cell">
      <style:table-cell-properties fo:background-color="#ffffff" fo:padding-left="0.229cm" fo:padding-right="0.229cm" fo:padding-top="0.141cm" fo:padding-bottom="0.141cm" fo:border="0.1pt solid #cccccc">
        <style:background-image/>
      </style:table-cell-properties>
    </style:style>
    <style:style style:name="Tabella17.A3" style:family="table-cell">
      <style:table-cell-properties fo:background-color="#e8eaf6" fo:padding-left="0.229cm" fo:padding-right="0.229cm" fo:padding-top="0.141cm" fo:padding-bottom="0.141cm" fo:border="0.1pt solid #cccccc">
        <style:background-image/>
      </style:table-cell-properties>
    </style:style>
    <style:style style:name="Tabella18" style:family="table">
      <style:table-properties style:width="15.522cm" fo:margin-left="0.002cm" fo:margin-top="0cm" fo:margin-bottom="0cm" table:align="left" style:writing-mode="page"/>
    </style:style>
    <style:style style:name="Tabella18.A" style:family="table-column">
      <style:table-column-properties style:column-width="15.522cm"/>
    </style:style>
    <style:style style:name="Tabella18.1" style:family="table-row">
      <style:table-row-properties fo:keep-together="auto"/>
    </style:style>
    <style:style style:name="Tabella18.A1" style:family="table-cell">
      <style:table-cell-properties fo:background-color="#fff9c4" fo:padding-left="0.353cm" fo:padding-right="0.353cm" fo:padding-top="0.176cm" fo:padding-bottom="0.053cm" fo:border="0.1pt solid #cccccc">
        <style:background-image/>
      </style:table-cell-properties>
    </style:style>
    <style:style style:name="Tabella18.A2" style:family="table-cell">
      <style:table-cell-properties fo:background-color="#fff9c4" fo:padding-left="0.353cm" fo:padding-right="0.353cm" fo:padding-top="0.071cm" fo:padding-bottom="0.071cm" fo:border-left="0.1pt solid #cccccc" fo:border-right="0.1pt solid #cccccc" fo:border-top="none" fo:border-bottom="0.1pt solid #cccccc">
        <style:background-image/>
      </style:table-cell-properties>
    </style:style>
    <style:style style:name="Tabella19" style:family="table">
      <style:table-properties style:width="15.699cm" fo:margin-left="0.002cm" fo:margin-top="0cm" fo:margin-bottom="0cm" table:align="left" style:writing-mode="page"/>
    </style:style>
    <style:style style:name="Tabella19.A" style:family="table-column">
      <style:table-column-properties style:column-width="3.526cm"/>
    </style:style>
    <style:style style:name="Tabella19.B" style:family="table-column">
      <style:table-column-properties style:column-width="2.469cm"/>
    </style:style>
    <style:style style:name="Tabella19.C" style:family="table-column">
      <style:table-column-properties style:column-width="3.177cm"/>
    </style:style>
    <style:style style:name="Tabella19.D" style:family="table-column">
      <style:table-column-properties style:column-width="6.525cm"/>
    </style:style>
    <style:style style:name="Tabella19.1" style:family="table-row">
      <style:table-row-properties fo:keep-together="auto"/>
    </style:style>
    <style:style style:name="Tabella19.A1" style:family="table-cell">
      <style:table-cell-properties fo:background-color="#1a237e" fo:padding-left="0.229cm" fo:padding-right="0.229cm" fo:padding-top="0.141cm" fo:padding-bottom="0.141cm" fo:border="0.1pt solid #cccccc">
        <style:background-image/>
      </style:table-cell-properties>
    </style:style>
    <style:style style:name="Tabella19.A2" style:family="table-cell">
      <style:table-cell-properties fo:background-color="#ffffff" fo:padding-left="0.229cm" fo:padding-right="0.229cm" fo:padding-top="0.141cm" fo:padding-bottom="0.141cm" fo:border="0.1pt solid #cccccc">
        <style:background-image/>
      </style:table-cell-properties>
    </style:style>
    <style:style style:name="Tabella19.A3" style:family="table-cell">
      <style:table-cell-properties fo:background-color="#e8eaf6" fo:padding-left="0.229cm" fo:padding-right="0.229cm" fo:padding-top="0.141cm" fo:padding-bottom="0.141cm" fo:border="0.1pt solid #cccccc">
        <style:background-image/>
      </style:table-cell-properties>
    </style:style>
    <style:style style:name="Tabella20" style:family="table">
      <style:table-properties style:width="16.051cm" fo:margin-left="0.002cm" fo:margin-top="0cm" fo:margin-bottom="0cm" table:align="left" style:writing-mode="page"/>
    </style:style>
    <style:style style:name="Tabella20.A" style:family="table-column">
      <style:table-column-properties style:column-width="2.468cm"/>
    </style:style>
    <style:style style:name="Tabella20.B" style:family="table-column">
      <style:table-column-properties style:column-width="1.588cm"/>
    </style:style>
    <style:style style:name="Tabella20.C" style:family="table-column">
      <style:table-column-properties style:column-width="3cm"/>
    </style:style>
    <style:style style:name="Tabella20.D" style:family="table-column">
      <style:table-column-properties style:column-width="2.999cm"/>
    </style:style>
    <style:style style:name="Tabella20.F" style:family="table-column">
      <style:table-column-properties style:column-width="2.997cm"/>
    </style:style>
    <style:style style:name="Tabella20.1" style:family="table-row">
      <style:table-row-properties fo:keep-together="auto"/>
    </style:style>
    <style:style style:name="Tabella20.A1" style:family="table-cell">
      <style:table-cell-properties fo:background-color="#1a237e" fo:padding-left="0.229cm" fo:padding-right="0.229cm" fo:padding-top="0.141cm" fo:padding-bottom="0.141cm" fo:border="0.1pt solid #cccccc">
        <style:background-image/>
      </style:table-cell-properties>
    </style:style>
    <style:style style:name="Tabella20.A2" style:family="table-cell">
      <style:table-cell-properties fo:background-color="#ffffff" fo:padding-left="0.229cm" fo:padding-right="0.229cm" fo:padding-top="0.141cm" fo:padding-bottom="0.141cm" fo:border="0.1pt solid #cccccc">
        <style:background-image/>
      </style:table-cell-properties>
    </style:style>
    <style:style style:name="Tabella20.A3" style:family="table-cell">
      <style:table-cell-properties fo:background-color="#e8eaf6" fo:padding-left="0.229cm" fo:padding-right="0.229cm" fo:padding-top="0.141cm" fo:padding-bottom="0.141cm" fo:border="0.1pt solid #cccccc">
        <style:background-image/>
      </style:table-cell-properties>
    </style:style>
    <style:style style:name="Tabella21" style:family="table">
      <style:table-properties style:width="15.522cm" fo:margin-left="0.002cm" fo:margin-top="0cm" fo:margin-bottom="0cm" table:align="left" style:writing-mode="page"/>
    </style:style>
    <style:style style:name="Tabella21.A" style:family="table-column">
      <style:table-column-properties style:column-width="4.939cm"/>
    </style:style>
    <style:style style:name="Tabella21.B" style:family="table-column">
      <style:table-column-properties style:column-width="3.881cm"/>
    </style:style>
    <style:style style:name="Tabella21.C" style:family="table-column">
      <style:table-column-properties style:column-width="2.822cm"/>
    </style:style>
    <style:style style:name="Tabella21.D" style:family="table-column">
      <style:table-column-properties style:column-width="3.879cm"/>
    </style:style>
    <style:style style:name="Tabella21.1" style:family="table-row">
      <style:table-row-properties fo:keep-together="auto"/>
    </style:style>
    <style:style style:name="Tabella21.A1" style:family="table-cell">
      <style:table-cell-properties fo:background-color="#1a237e" fo:padding-left="0.229cm" fo:padding-right="0.229cm" fo:padding-top="0.141cm" fo:padding-bottom="0.141cm" fo:border="0.1pt solid #cccccc">
        <style:background-image/>
      </style:table-cell-properties>
    </style:style>
    <style:style style:name="Tabella21.A2" style:family="table-cell">
      <style:table-cell-properties fo:background-color="#ffffff" fo:padding-left="0.229cm" fo:padding-right="0.229cm" fo:padding-top="0.141cm" fo:padding-bottom="0.141cm" fo:border="0.1pt solid #cccccc">
        <style:background-image/>
      </style:table-cell-properties>
    </style:style>
    <style:style style:name="Tabella21.A3" style:family="table-cell">
      <style:table-cell-properties fo:background-color="#e8eaf6" fo:padding-left="0.229cm" fo:padding-right="0.229cm" fo:padding-top="0.141cm" fo:padding-bottom="0.141cm" fo:border="0.1pt solid #cccccc">
        <style:background-image/>
      </style:table-cell-properties>
    </style:style>
    <style:style style:name="Tabella22" style:family="table">
      <style:table-properties style:width="16.228cm" fo:margin-left="0.002cm" fo:margin-top="0cm" fo:margin-bottom="0cm" table:align="left" style:writing-mode="page"/>
    </style:style>
    <style:style style:name="Tabella22.A" style:family="table-column">
      <style:table-column-properties style:column-width="4.937cm"/>
    </style:style>
    <style:style style:name="Tabella22.B" style:family="table-column">
      <style:table-column-properties style:column-width="4.233cm"/>
    </style:style>
    <style:style style:name="Tabella22.C" style:family="table-column">
      <style:table-column-properties style:column-width="3.528cm"/>
    </style:style>
    <style:style style:name="Tabella22.1" style:family="table-row">
      <style:table-row-properties fo:keep-together="auto"/>
    </style:style>
    <style:style style:name="Tabella22.A1" style:family="table-cell">
      <style:table-cell-properties fo:background-color="#1a237e" fo:padding-left="0.229cm" fo:padding-right="0.229cm" fo:padding-top="0.141cm" fo:padding-bottom="0.141cm" fo:border="0.1pt solid #cccccc">
        <style:background-image/>
      </style:table-cell-properties>
    </style:style>
    <style:style style:name="Tabella22.A2" style:family="table-cell">
      <style:table-cell-properties fo:background-color="#ffffff" fo:padding-left="0.229cm" fo:padding-right="0.229cm" fo:padding-top="0.141cm" fo:padding-bottom="0.141cm" fo:border="0.1pt solid #cccccc">
        <style:background-image/>
      </style:table-cell-properties>
    </style:style>
    <style:style style:name="Tabella22.A3" style:family="table-cell">
      <style:table-cell-properties fo:background-color="#e8eaf6" fo:padding-left="0.229cm" fo:padding-right="0.229cm" fo:padding-top="0.141cm" fo:padding-bottom="0.141cm" fo:border="0.1pt solid #cccccc">
        <style:background-image/>
      </style:table-cell-properties>
    </style:style>
    <style:style style:name="P1" style:family="paragraph" style:parent-style-name="Heading_20_1">
      <style:paragraph-properties fo:margin-top="0cm" fo:margin-bottom="0.353cm" style:contextual-spacing="false" fo:break-before="page" fo:padding-left="0cm" fo:padding-right="0cm" fo:padding-top="0cm" fo:padding-bottom="0.141cm" fo:border-left="none" fo:border-right="none" fo:border-top="none" fo:border-bottom="0.74pt solid #1a237e"/>
    </style:style>
    <style:style style:name="P2" style:family="paragraph" style:parent-style-name="Heading_20_1">
      <style:paragraph-properties fo:margin-top="0.847cm" fo:margin-bottom="0.353cm" style:contextual-spacing="false" fo:padding-left="0cm" fo:padding-right="0cm" fo:padding-top="0cm" fo:padding-bottom="0.141cm" fo:border-left="none" fo:border-right="none" fo:border-top="none" fo:border-bottom="0.74pt solid #1a237e"/>
    </style:style>
    <style:style style:name="P3" style:family="paragraph" style:parent-style-name="Heading_20_2">
      <style:paragraph-properties fo:margin-top="0.494cm" fo:margin-bottom="0.212cm" style:contextual-spacing="false"/>
    </style:style>
    <style:style style:name="P4" style:family="paragraph" style:parent-style-name="Heading_20_3">
      <style:paragraph-properties fo:margin-top="0.353cm" fo:margin-bottom="0.141cm" style:contextual-spacing="false"/>
    </style:style>
    <style:style style:name="P5" style:family="paragraph" style:parent-style-name="List_20_Paragraph" style:list-style-name="WWNum2">
      <style:paragraph-properties fo:margin-top="0cm" fo:margin-bottom="0.141cm" style:contextual-spacing="false" fo:line-height="0.487cm"/>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text-align="start" style:justify-single-word="false"/>
    </style:style>
    <style:style style:name="P8" style:family="paragraph" style:parent-style-name="Standard">
      <style:paragraph-properties fo:margin-top="0cm" fo:margin-bottom="0.529cm" style:contextual-spacing="false" fo:padding-left="0cm" fo:padding-right="0cm" fo:padding-top="0cm" fo:padding-bottom="0.035cm" fo:border-left="none" fo:border-right="none" fo:border-top="none" fo:border-bottom="1.25pt solid #1a237e"/>
    </style:style>
    <style:style style:name="P9" style:family="paragraph" style:parent-style-name="Standard">
      <style:paragraph-properties fo:margin-top="0cm" fo:margin-bottom="0.106cm" style:contextual-spacing="false"/>
    </style:style>
    <style:style style:name="P10" style:family="paragraph" style:parent-style-name="Standard">
      <style:paragraph-properties fo:margin-top="0cm" fo:margin-bottom="0.212cm" style:contextual-spacing="false"/>
    </style:style>
    <style:style style:name="P11" style:family="paragraph" style:parent-style-name="Standard">
      <style:paragraph-properties fo:margin-top="0cm" fo:margin-bottom="0.247cm" style:contextual-spacing="false" fo:line-height="0.508cm"/>
    </style:style>
    <style:style style:name="P12" style:family="paragraph" style:parent-style-name="Standard">
      <style:paragraph-properties fo:text-align="center" style:justify-single-word="false"/>
    </style:style>
    <style:style style:name="P13" style:family="paragraph" style:parent-style-name="Standard">
      <style:paragraph-properties fo:margin-top="0.212cm" fo:margin-bottom="0.141cm" style:contextual-spacing="false" fo:text-align="center" style:justify-single-word="false"/>
    </style:style>
    <style:style style:name="P14" style:family="paragraph" style:parent-style-name="Standard">
      <style:paragraph-properties fo:margin-top="0cm" fo:margin-bottom="0.353cm" style:contextual-spacing="false" fo:text-align="center" style:justify-single-word="false"/>
    </style:style>
    <style:style style:name="P15" style:family="paragraph" style:parent-style-name="Standard">
      <style:paragraph-properties fo:margin-top="0cm" fo:margin-bottom="0.212cm" style:contextual-spacing="false" fo:text-align="center" style:justify-single-word="false"/>
    </style:style>
    <style:style style:name="P16" style:family="paragraph" style:parent-style-name="Standard">
      <style:paragraph-properties fo:margin-top="0cm" fo:margin-bottom="0.106cm" style:contextual-spacing="false" fo:text-align="center" style:justify-single-word="false"/>
    </style:style>
    <style:style style:name="P17" style:family="paragraph" style:parent-style-name="Standard">
      <style:paragraph-properties fo:margin-top="0cm" fo:margin-bottom="1.058cm" style:contextual-spacing="false" fo:text-align="center" style:justify-single-word="false"/>
    </style:style>
    <style:style style:name="P18" style:family="paragraph" style:parent-style-name="Standard">
      <style:paragraph-properties fo:margin-top="0cm" fo:margin-bottom="0cm" style:contextual-spacing="false" fo:text-align="center" style:justify-single-word="false"/>
    </style:style>
    <style:style style:name="P19" style:family="paragraph" style:parent-style-name="Standard">
      <style:paragraph-properties fo:margin-left="0.353cm" fo:margin-top="0.212cm" fo:margin-bottom="0.071cm" style:contextual-spacing="false"/>
    </style:style>
    <style:style style:name="P20" style:family="paragraph" style:parent-style-name="Standard">
      <loext:graphic-properties draw:fill="solid" draw:fill-color="#f6f8fa"/>
      <style:paragraph-properties fo:margin-left="0.529cm" fo:margin-right="0.529cm" fo:margin-top="0cm" fo:margin-bottom="0cm" style:contextual-spacing="false" fo:line-height="0.423cm" fo:background-color="#f6f8fa"/>
    </style:style>
    <style:style style:name="P21" style:family="paragraph" style:parent-style-name="Standard">
      <loext:graphic-properties draw:fill="solid" draw:fill-color="#f0f4f8"/>
      <style:paragraph-properties fo:margin-left="0.529cm" fo:margin-right="0.529cm" fo:margin-top="0cm" fo:margin-bottom="0cm" style:contextual-spacing="false" fo:line-height="0.423cm" fo:background-color="#f0f4f8"/>
    </style:style>
    <style:style style:name="P22" style:family="paragraph" style:parent-style-name="Standard">
      <style:paragraph-properties fo:margin-top="0cm" fo:margin-bottom="0.071cm" style:contextual-spacing="false"/>
    </style:style>
    <style:style style:name="P23" style:family="paragraph" style:parent-style-name="Standard">
      <style:paragraph-properties fo:margin-top="0.282cm" fo:margin-bottom="0.282cm" style:contextual-spacing="false" fo:padding-left="0cm" fo:padding-right="0cm" fo:padding-top="0cm" fo:padding-bottom="0.035cm" fo:border-left="none" fo:border-right="none" fo:border-top="none" fo:border-bottom="0.51pt solid #cccccc"/>
    </style:style>
    <style:style style:name="P24" style:family="paragraph" style:parent-style-name="Standard">
      <loext:graphic-properties draw:fill="solid" draw:fill-color="#1a237e"/>
      <style:paragraph-properties fo:margin-left="0.353cm" fo:margin-right="0.353cm" fo:margin-top="0.106cm" fo:margin-bottom="0.106cm" style:contextual-spacing="false" fo:background-color="#1a237e"/>
    </style:style>
    <style:style style:name="P25" style:family="paragraph" style:parent-style-name="Standard">
      <style:paragraph-properties fo:margin-top="0.141cm" fo:margin-bottom="0cm" style:contextual-spacing="false" fo:padding-left="0cm" fo:padding-right="0cm" fo:padding-top="0.071cm" fo:padding-bottom="0cm" fo:border-left="none" fo:border-right="none" fo:border-top="0.26pt solid #546e7a" fo:border-bottom="none">
        <style:tab-stops>
          <style:tab-stop style:position="15.522cm" style:type="right"/>
        </style:tab-stops>
      </style:paragraph-properties>
    </style:style>
    <style:style style:name="P26" style:family="paragraph" style:parent-style-name="Standard">
      <style:paragraph-properties fo:margin-top="0cm" fo:margin-bottom="0cm" style:contextual-spacing="false"/>
      <style:text-properties officeooo:rsid="00170565" officeooo:paragraph-rsid="00170565"/>
    </style:style>
    <style:style style:name="P27" style:family="paragraph" style:parent-style-name="Standard">
      <style:paragraph-properties fo:margin-top="0cm" fo:margin-bottom="0.141cm" style:contextual-spacing="false"/>
      <style:text-properties officeooo:paragraph-rsid="00170565"/>
    </style:style>
    <style:style style:name="P28" style:family="paragraph" style:parent-style-name="Text_20_body">
      <style:paragraph-properties fo:margin-top="0cm" fo:margin-bottom="0cm" style:contextual-spacing="false"/>
      <style:text-properties officeooo:rsid="00170565" officeooo:paragraph-rsid="00170565"/>
    </style:style>
    <style:style style:name="P29" style:family="paragraph" style:parent-style-name="Text_20_body">
      <style:paragraph-properties fo:margin-top="0cm" fo:margin-bottom="0cm" style:contextual-spacing="false"/>
      <style:text-properties officeooo:paragraph-rsid="00170565"/>
    </style:style>
    <style:style style:name="T1" style:family="text">
      <style:text-properties fo:color="#1a237e" loext:opacity="100%" style:font-name="Arial" fo:font-size="40pt" fo:font-style="normal" fo:font-weight="bold" style:font-name-asian="Arial2" style:font-size-asian="40pt" style:font-style-asian="normal" style:font-weight-asian="bold" style:font-name-complex="Arial2" style:font-size-complex="40pt" style:font-style-complex="normal" style:font-weight-complex="bold"/>
    </style:style>
    <style:style style:name="T2" style:family="text">
      <style:text-properties fo:color="#1a237e" loext:opacity="100%" style:font-name="Arial" fo:font-size="13pt" fo:font-weight="bold" style:font-name-asian="Arial2" style:font-size-asian="13pt" style:font-weight-asian="bold" style:font-name-complex="Arial2" style:font-size-complex="13pt" style:font-weight-complex="bold"/>
    </style:style>
    <style:style style:name="T3" style:family="text">
      <style:text-properties fo:color="#1a237e" loext:opacity="100%" style:font-name="Arial"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4" style:family="text">
      <style:text-properties fo:color="#263238" loext:opacity="100%" style:font-name="Arial" fo:font-size="16pt" fo:font-style="normal" fo:font-weight="normal" style:font-name-asian="Arial2" style:font-size-asian="16pt" style:font-style-asian="normal" style:font-weight-asian="normal" style:font-name-complex="Arial2" style:font-size-complex="16pt" style:font-style-complex="normal" style:font-weight-complex="normal"/>
    </style:style>
    <style:style style:name="T5" style:family="text">
      <style:text-properties fo:color="#263238" loext:opacity="100%" style:font-name="Arial" fo:font-size="11pt" fo:font-style="normal" fo:font-weight="bold" style:font-name-asian="Arial2" style:font-size-asian="11pt" style:font-style-asian="normal" style:font-weight-asian="bold" style:font-name-complex="Arial2" style:font-size-complex="11pt" style:font-style-complex="normal" style:font-weight-complex="bold"/>
    </style:style>
    <style:style style:name="T6" style:family="text">
      <style:text-properties fo:color="#263238" loext:opacity="100%" style:font-name="Arial" fo:font-size="11pt" fo:font-weight="bold" style:font-name-asian="Arial2" style:font-size-asian="11pt" style:font-weight-asian="bold" style:font-name-complex="Arial2" style:font-size-complex="11pt" style:font-weight-complex="bold"/>
    </style:style>
    <style:style style:name="T7" style:family="text">
      <style:text-properties fo:color="#263238" loext:opacity="100%" style:font-name="Arial" fo:font-size="8.5pt" fo:font-weight="bold" style:font-name-asian="Arial2" style:font-size-asian="8.5pt" style:font-weight-asian="bold" style:font-name-complex="Arial2" style:font-size-complex="8.5pt" style:font-weight-complex="bold"/>
    </style:style>
    <style:style style:name="T8" style:family="text">
      <style:text-properties fo:color="#263238" loext:opacity="100%" style:font-name="Arial" fo:font-size="8.5pt" fo:font-weight="normal" style:font-name-asian="Arial2" style:font-size-asian="8.5pt" style:font-weight-asian="normal" style:font-name-complex="Arial2" style:font-size-complex="8.5pt" style:font-weight-complex="normal"/>
    </style:style>
    <style:style style:name="T9" style:family="text">
      <style:text-properties fo:color="#546e7a" loext:opacity="100%"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T10" style:family="text">
      <style:text-properties fo:color="#546e7a" loext:opacity="100%" style:font-name="Arial" fo:font-size="9pt" fo:font-style="normal" fo:font-weight="bold" style:font-name-asian="Arial2" style:font-size-asian="9pt" style:font-style-asian="normal" style:font-weight-asian="bold" style:font-name-complex="Arial2" style:font-size-complex="9pt" style:font-style-complex="normal" style:font-weight-complex="bold"/>
    </style:style>
    <style:style style:name="T11" style:family="text">
      <style:text-properties fo:color="#546e7a" loext:opacity="100%" style:font-name="Arial" fo:font-size="9pt" fo:font-style="italic" style:font-name-asian="Arial2" style:font-size-asian="9pt" style:font-style-asian="italic" style:font-name-complex="Arial2" style:font-size-complex="9pt" style:font-style-complex="italic"/>
    </style:style>
    <style:style style:name="T12" style:family="text">
      <style:text-properties fo:color="#546e7a" loext:opacity="100%" style:font-name="Arial" fo:font-size="8pt" fo:font-style="normal" fo:font-weight="normal" style:font-name-asian="Arial2" style:font-size-asian="8pt" style:font-style-asian="normal" style:font-weight-asian="normal" style:font-name-complex="Arial2" style:font-size-complex="8pt" style:font-style-complex="normal" style:font-weight-complex="normal"/>
    </style:style>
    <style:style style:name="T13" style:family="text">
      <style:text-properties fo:color="#546e7a" loext:opacity="100%" style:font-name="Arial" fo:font-size="8pt" fo:font-style="normal" fo:font-weight="normal" officeooo:rsid="001518f5" style:font-name-asian="Arial2" style:font-size-asian="8pt" style:font-style-asian="normal" style:font-weight-asian="normal" style:font-name-complex="Arial2" style:font-size-complex="8pt" style:font-style-complex="normal" style:font-weight-complex="normal"/>
    </style:style>
    <style:style style:name="T14" style:family="text">
      <style:text-properties fo:color="#546e7a" loext:opacity="100%" style:font-name="Arial" fo:font-size="8pt" style:font-name-asian="Arial2" style:font-size-asian="8pt" style:font-name-complex="Arial2" style:font-size-complex="8pt"/>
    </style:style>
    <style:style style:name="T15" style:family="text">
      <style:text-properties fo:color="#000000" loext:opacity="100%" style:font-name="Arial" fo:font-size="11pt"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16" style:family="text">
      <style:text-properties fo:color="#000000" loext:opacity="100%" style:font-name="Arial" fo:font-size="11pt" fo:font-style="normal" fo:font-weight="normal" officeooo:rsid="001518f5" style:font-name-asian="Arial2" style:font-size-asian="11pt" style:font-style-asian="normal" style:font-weight-asian="normal" style:font-name-complex="Arial2" style:font-size-complex="11pt" style:font-style-complex="normal" style:font-weight-complex="normal"/>
    </style:style>
    <style:style style:name="T17" style:family="text">
      <style:text-properties fo:color="#000000" loext:opacity="100%" style:font-name="Arial" fo:font-size="11pt" fo:font-style="normal" fo:font-weight="normal" officeooo:rsid="00170565" style:font-name-asian="Arial2" style:font-size-asian="11pt" style:font-style-asian="normal" style:font-weight-asian="normal" style:font-name-complex="Arial2" style:font-size-complex="11pt" style:font-style-complex="normal" style:font-weight-complex="normal"/>
    </style:style>
    <style:style style:name="T18" style:family="text">
      <style:text-properties fo:color="#000000" loext:opacity="100%" style:font-name="Arial" fo:font-size="11pt" fo:font-style="normal" fo:font-weight="bold" style:font-name-asian="Arial2" style:font-size-asian="11pt" style:font-style-asian="normal" style:font-weight-asian="bold" style:font-name-complex="Arial2" style:font-size-complex="11pt" style:font-style-complex="normal" style:font-weight-complex="bold"/>
    </style:style>
    <style:style style:name="T19" style:family="text">
      <style:text-properties fo:color="#000000" loext:opacity="100%" style:font-name="Arial" fo:font-size="11pt" fo:font-style="normal" fo:font-weight="bold" officeooo:rsid="001518f5" style:font-name-asian="Arial2" style:font-size-asian="11pt" style:font-style-asian="normal" style:font-weight-asian="bold" style:font-name-complex="Arial2" style:font-size-complex="11pt" style:font-style-complex="normal" style:font-weight-complex="bold"/>
    </style:style>
    <style:style style:name="T20" style:family="text">
      <style:text-properties fo:color="#000000" loext:opacity="100%" style:font-name="Arial" fo:font-size="16pt" fo:font-weight="bold" style:font-name-asian="Arial2" style:font-size-asian="16pt" style:font-weight-asian="bold" style:font-name-complex="Arial2" style:font-size-complex="16pt" style:font-weight-complex="bold"/>
    </style:style>
    <style:style style:name="T21" style:family="text">
      <style:text-properties fo:color="#000000" loext:opacity="100%" style:font-name="Arial"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22" style:family="text">
      <style:text-properties fo:color="#000000" loext:opacity="100%" style:font-name="Arial"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23" style:family="text">
      <style:text-properties fo:color="#0550ae" loext:opacity="100%" style:font-name="Courier New" fo:font-size="9pt" fo:font-weight="bold" style:font-name-asian="Courier New1" style:font-size-asian="9pt" style:font-weight-asian="bold" style:font-name-complex="Courier New1" style:font-size-complex="9pt" style:font-weight-complex="bold"/>
    </style:style>
    <style:style style:name="T24" style:family="text">
      <style:text-properties fo:color="#ffffff" loext:opacity="100%" style:font-name="Arial" fo:font-size="9pt" fo:font-weight="bold" style:font-name-asian="Arial2" style:font-size-asian="9pt" style:font-weight-asian="bold" style:font-name-complex="Arial2" style:font-size-complex="9pt" style:font-weight-complex="bold"/>
    </style:style>
    <style:style style:name="T25" style:family="text">
      <style:text-properties fo:color="#ffffff" loext:opacity="100%" style:font-name="Arial"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26" style:family="text">
      <style:text-properties fo:color="#999999" loext:opacity="100%" style:font-name="Courier New" fo:font-size="9pt" style:font-name-asian="Courier New1" style:font-size-asian="9pt" style:font-name-complex="Courier New1" style:font-size-complex="9pt"/>
    </style:style>
    <style:style style:name="T27" style:family="text">
      <style:text-properties fo:color="#999999" loext:opacity="100%" style:font-name="Courier New" fo:font-size="8.5pt" style:font-name-asian="Courier New1" style:font-size-asian="8.5pt" style:font-name-complex="Courier New1" style:font-size-complex="8.5pt"/>
    </style:style>
    <style:style style:name="T28" style:family="text">
      <style:text-properties fo:color="#24292e" loext:opacity="100%" style:font-name="Courier New" fo:font-size="9pt" style:font-name-asian="Courier New1" style:font-size-asian="9pt" style:font-name-complex="Courier New1" style:font-size-complex="9pt"/>
    </style:style>
    <style:style style:name="T29" style:family="text">
      <style:text-properties fo:color="#1b2a3b" loext:opacity="100%" style:font-name="Courier New" fo:font-size="8.5pt" style:font-name-asian="Courier New1" style:font-size-asian="8.5pt" style:font-name-complex="Courier New1" style:font-size-complex="8.5pt"/>
    </style:style>
    <style:style style:name="T30" style:family="text">
      <style:text-properties fo:color="#bbdefb" loext:opacity="100%" style:font-name="Arial" fo:font-size="9pt" fo:font-style="normal" fo:font-weight="normal" style:font-name-asian="Arial2" style:font-size-asian="9pt" style:font-style-asian="normal" style:font-weight-asian="normal" style:font-name-complex="Arial2" style:font-size-complex="9pt" style:font-style-complex="normal" style:font-weight-complex="normal"/>
    </style:style>
    <style:style style:name="T31" style:family="text">
      <style:text-properties officeooo:rsid="0018cd7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15"><text:span text:style-name="T1">MUSIKON</text:span></text:p>
      <text:p text:style-name="P8"/>
      <text:p text:style-name="P16"><text:span text:style-name="T4">Documentazione del caso di studio</text:span></text:p>
      <text:p text:style-name="P17"><text:span text:style-name="T9">Music Knowledge-Based Classification System</text:span></text:p>
      <text:p text:style-name="P18"/>
      <text:p text:style-name="P6"/>
      <text:p text:style-name="P10"><text:span text:style-name="T5">Gruppo di lavoro:</text:span></text:p>
      <text:p text:style-name="P27"><text:span text:style-name="T15">- </text:span><text:span text:style-name="T16">Cilla</text:span><text:span text:style-name="T15"> </text:span><text:span text:style-name="T16">Christian</text:span><text:span text:style-name="T15"> – </text:span><text:span text:style-name="T16">800433</text:span></text:p>
      <text:p text:style-name="P27"><text:span text:style-name="T16">- c.</text:span><text:span text:style-name="T17">cilla@studenti.uniba.it</text:span></text:p>
      <text:p text:style-name="P6"/>
      <text:p text:style-name="P26"/>
      <text:p text:style-name="P6"/>
      <text:p text:style-name="P6"><text:span text:style-name="T18">AA 202</text:span><text:span text:style-name="T19">5</text:span><text:span text:style-name="T18">-202</text:span><text:span text:style-name="T19">6</text:span></text:p>
      <text:p text:style-name="P6"/>
      <text:p text:style-name="P6"/>
      <text:p text:style-name="P29"><text:a xlink:type="simple" xlink:href="https://github.com/Cilla04/ICON.MUSIKON" text:style-name="Internet_20_link" text:visited-style-name="Visited_20_Internet_20_Link"><text:span text:style-name="T31">link al repository</text:span></text:a></text:p>
      <text:p text:style-name="P28"/>
      <text:p text:style-name="P26"><text:s/></text:p>
      <text:h text:style-name="P1" text:outline-level="1"><text:span text:style-name="T20">INTRODUZIONE</text:span></text:h>
      <text:p text:style-name="P11"><text:span text:style-name="T21">Per lo sviluppo del presente progetto è stato utilizzato il linguaggio di programmazione </text:span><text:span text:style-name="T22">Python</text:span><text:span text:style-name="T21">, con l'obiettivo di modellare e analizzare il problema della classificazione della </text:span><text:span text:style-name="T22">mood musicale</text:span><text:span text:style-name="T21"> a partire da feature audio estratte dalla piattaforma Spotify. Il dominio considerato riguarda la previsione della playlist di appartenenza di una traccia musicale — equivalente alla mood associata — integrando tecniche di apprendimento automatico, rappresentazione formale della conoscenza mediante ontologie OWL e ragionamento simbolico tramite Knowledge Base Prolog.</text:span></text:p>
      <text:p text:style-name="P11"><text:span text:style-name="T21">Il dataset impiegato è stato estratto dall'API di Spotify tramite la libreria </text:span><text:span text:style-name="T23">spotipy</text:span><text:span text:style-name="T21"> ed è stato strutturato dal progetto di riferimento </text:span><text:span text:style-name="T23">Fonty02/ICON</text:span><text:span text:style-name="T21">. Esso contiene </text:span><text:span text:style-name="T22">519 tracce musicali</text:span><text:span text:style-name="T21"> suddivise in cinque playlist tematiche, ognuna delle quali rappresenta una categoria di mood. Le istanze includono feature audio numeriche continue ed una variabile categoriale target.</text:span></text:p>
      <text:p text:style-name="P6"/>
      <text:h text:style-name="P3" text:outline-level="2"><text:span text:style-name="T2">Struttura del dataset</text:span></text:h>
      <text:p text:style-name="P11"><text:span text:style-name="T21">Le feature del dataset sono le seguenti:</text:span></text:p>
      <text:list text:style-name="WWNum2">
        <text:list-item text:start-value="1">
          <text:p text:style-name="P5"><text:span text:style-name="T22">danceability</text:span><text:span text:style-name="T21">: valore numerico compreso tra 0 e 1 che rappresenta quanto una traccia sia adatta al ballo, in base a elementi come ritmo, stabilità del beat e regolarità.</text:span></text:p>
        </text:list-item>
        <text:list-item>
          <text:p text:style-name="P5"><text:span text:style-name="T22">energy</text:span><text:span text:style-name="T21">: misura percettiva di intensità e attività, da 0 a 1. Tracce veloci, rumorose e dense ottengono valori alti (es. metal), tracce lente e serene valori bassi.</text:span></text:p>
        </text:list-item>
        <text:list-item>
          <text:p text:style-name="P5"><text:span text:style-name="T22">loudness</text:span><text:span text:style-name="T21">: volume medio della traccia in decibel (dB), tipicamente tra -60 e 0 dB. Viene normalizzato in [0,1] tramite trasformazione lineare con range [-30, 0].</text:span></text:p>
        </text:list-item>
        <text:list-item>
          <text:p text:style-name="P5"><text:span text:style-name="T22">speechiness</text:span><text:span text:style-name="T21">: rileva la presenza di parole parlate. Valori alti (&gt; 0.66) indicano tracce interamente parlate, valori intermedi (0.33–0.66) musica con testo, valori bassi strumentale.</text:span></text:p>
        </text:list-item>
        <text:list-item>
          <text:p text:style-name="P5"><text:span text:style-name="T22">acousticness</text:span><text:span text:style-name="T21">: stima con sicurezza (0–1) se la traccia è acustica. Valore 1.0 indica alta confidenza di traccia acustica.</text:span></text:p>
        </text:list-item>
        <text:list-item>
          <text:p text:style-name="P5"><text:span text:style-name="T22">instrumentalness</text:span><text:span text:style-name="T21">: stima la probabilità che la traccia non contenga voce. Valori &gt; 0.5 suggeriscono tracce prevalentemente strumentali.</text:span></text:p>
        </text:list-item>
        <text:list-item>
          <text:p text:style-name="P5"><text:span text:style-name="T22">liveness</text:span><text:span text:style-name="T21">: rileva la presenza di un pubblico nella registrazione. Valori &gt; 0.8 indicano alta probabilità di performance dal vivo.</text:span></text:p>
        </text:list-item>
        <text:list-item>
          <text:p text:style-name="P5"><text:span text:style-name="T22">valence</text:span><text:span text:style-name="T21">: misura la positività musicale trasmessa dalla traccia, da 0 (negativo, triste) a 1 (positivo, euforico).</text:span></text:p>
        </text:list-item>
        <text:list-item>
          <text:p text:style-name="P5"><text:span text:style-name="T22">tempo</text:span><text:span text:style-name="T21">: stima dei BPM (beats per minute). Normalizzato in [0,1] tramite </text:span><text:span text:style-name="T23">(bpm − 54) / (210 − 54)</text:span><text:span text:style-name="T21">.</text:span></text:p>
        </text:list-item>
        <text:list-item>
          <text:p text:style-name="P5"><text:span text:style-name="T22">key</text:span><text:span text:style-name="T21">: tonalità della traccia (0=Do, 1=Do#, ..., 11=Si), normalizzata in [0,1] come </text:span><text:span text:style-name="T23">key / 11</text:span><text:span text:style-name="T21">.</text:span></text:p>
        </text:list-item>
      </text:list>
      <text:p text:style-name="P6"/>
      <text:p text:style-name="P11"><text:span text:style-name="T21">La variabile target è:</text:span></text:p>
      <text:list text:continue-numbering="true" text:style-name="WWNum2">
        <text:list-item>
          <text:p text:style-name="P5"><text:span text:style-name="T22">playlistName</text:span><text:span text:style-name="T21">: nome della playlist di appartenenza, mappato a un indice intero. Rappresenta la mood associata alla traccia.</text:span></text:p>
        </text:list-item>
      </text:list>
      <text:p text:style-name="P6"/>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style-name="Tabella1.1">
            <table:table-cell table:style-name="Tabella1.A1" office:value-type="string">
              <text:p text:style-name="P12"><text:span text:style-name="T24">Indice</text:span></text:p>
            </table:table-cell>
            <table:table-cell table:style-name="Tabella1.A1" office:value-type="string">
              <text:p text:style-name="P12"><text:span text:style-name="T24">Playlist</text:span></text:p>
            </table:table-cell>
            <table:table-cell table:style-name="Tabella1.A1" office:value-type="string">
              <text:p text:style-name="P12"><text:span text:style-name="T24">Mood</text:span></text:p>
            </table:table-cell>
            <table:table-cell table:style-name="Tabella1.A1" office:value-type="string">
              <text:p text:style-name="P12"><text:span text:style-name="T24">N</text:span></text:p>
            </table:table-cell>
            <table:table-cell table:style-name="Tabella1.A1" office:value-type="string">
              <text:p text:style-name="P12"><text:span text:style-name="T24">Percentuale</text:span></text:p>
            </table:table-cell>
          </table:table-row>
        </table:table-header-rows>
        <table:table-row table:style-name="Tabella1.1">
          <table:table-cell table:style-name="Tabella1.A2" office:value-type="string">
            <text:p text:style-name="P12"><text:span text:style-name="T7">0</text:span></text:p>
          </table:table-cell>
          <table:table-cell table:style-name="Tabella1.A2" office:value-type="string">
            <text:p text:style-name="P7"><text:span text:style-name="T8">Mhe</text:span></text:p>
          </table:table-cell>
          <table:table-cell table:style-name="Tabella1.A2" office:value-type="string">
            <text:p text:style-name="P7"><text:span text:style-name="T8">Malinconico / triste</text:span></text:p>
          </table:table-cell>
          <table:table-cell table:style-name="Tabella1.A2" office:value-type="string">
            <text:p text:style-name="P12"><text:span text:style-name="T8">155</text:span></text:p>
          </table:table-cell>
          <table:table-cell table:style-name="Tabella1.A2" office:value-type="string">
            <text:p text:style-name="P12"><text:span text:style-name="T8">29.9%</text:span></text:p>
          </table:table-cell>
        </table:table-row>
        <table:table-row table:style-name="Tabella1.1">
          <table:table-cell table:style-name="Tabella1.A3" office:value-type="string">
            <text:p text:style-name="P12"><text:span text:style-name="T8">1</text:span></text:p>
          </table:table-cell>
          <table:table-cell table:style-name="Tabella1.A3" office:value-type="string">
            <text:p text:style-name="P7"><text:span text:style-name="T8">GoodVibes</text:span></text:p>
          </table:table-cell>
          <table:table-cell table:style-name="Tabella1.A3" office:value-type="string">
            <text:p text:style-name="P7"><text:span text:style-name="T8">Positivo / energico</text:span></text:p>
          </table:table-cell>
          <table:table-cell table:style-name="Tabella1.A3" office:value-type="string">
            <text:p text:style-name="P12"><text:span text:style-name="T8">141</text:span></text:p>
          </table:table-cell>
          <table:table-cell table:style-name="Tabella1.A3" office:value-type="string">
            <text:p text:style-name="P12"><text:span text:style-name="T8">27.2%</text:span></text:p>
          </table:table-cell>
        </table:table-row>
        <text:soft-page-break/>
        <table:table-row table:style-name="Tabella1.1">
          <table:table-cell table:style-name="Tabella1.A2" office:value-type="string">
            <text:p text:style-name="P12"><text:span text:style-name="T8">2</text:span></text:p>
          </table:table-cell>
          <table:table-cell table:style-name="Tabella1.A2" office:value-type="string">
            <text:p text:style-name="P7"><text:span text:style-name="T8">OldVibes</text:span></text:p>
          </table:table-cell>
          <table:table-cell table:style-name="Tabella1.A2" office:value-type="string">
            <text:p text:style-name="P7"><text:span text:style-name="T8">Nostalgico / misto</text:span></text:p>
          </table:table-cell>
          <table:table-cell table:style-name="Tabella1.A2" office:value-type="string">
            <text:p text:style-name="P12"><text:span text:style-name="T8">111</text:span></text:p>
          </table:table-cell>
          <table:table-cell table:style-name="Tabella1.A2" office:value-type="string">
            <text:p text:style-name="P12"><text:span text:style-name="T8">21.4%</text:span></text:p>
          </table:table-cell>
        </table:table-row>
        <table:table-row table:style-name="Tabella1.1">
          <table:table-cell table:style-name="Tabella1.A3" office:value-type="string">
            <text:p text:style-name="P12"><text:span text:style-name="T8">3</text:span></text:p>
          </table:table-cell>
          <table:table-cell table:style-name="Tabella1.A3" office:value-type="string">
            <text:p text:style-name="P7"><text:span text:style-name="T8">Anime &amp; Japanese</text:span></text:p>
          </table:table-cell>
          <table:table-cell table:style-name="Tabella1.A3" office:value-type="string">
            <text:p text:style-name="P7"><text:span text:style-name="T8">Intenso / veloce</text:span></text:p>
          </table:table-cell>
          <table:table-cell table:style-name="Tabella1.A3" office:value-type="string">
            <text:p text:style-name="P12"><text:span text:style-name="T8">71</text:span></text:p>
          </table:table-cell>
          <table:table-cell table:style-name="Tabella1.A3" office:value-type="string">
            <text:p text:style-name="P12"><text:span text:style-name="T8">13.7%</text:span></text:p>
          </table:table-cell>
        </table:table-row>
        <table:table-row table:style-name="Tabella1.1">
          <table:table-cell table:style-name="Tabella1.A2" office:value-type="string">
            <text:p text:style-name="P12"><text:span text:style-name="T8">4</text:span></text:p>
          </table:table-cell>
          <table:table-cell table:style-name="Tabella1.A2" office:value-type="string">
            <text:p text:style-name="P7"><text:span text:style-name="T8">Old Italian good vibes</text:span></text:p>
          </table:table-cell>
          <table:table-cell table:style-name="Tabella1.A2" office:value-type="string">
            <text:p text:style-name="P7"><text:span text:style-name="T8">Rilassato / acustico</text:span></text:p>
          </table:table-cell>
          <table:table-cell table:style-name="Tabella1.A2" office:value-type="string">
            <text:p text:style-name="P12"><text:span text:style-name="T8">41</text:span></text:p>
          </table:table-cell>
          <table:table-cell table:style-name="Tabella1.A2" office:value-type="string">
            <text:p text:style-name="P12"><text:span text:style-name="T8">7.9%</text:span></text:p>
          </table:table-cell>
        </table:table-row>
      </table:table>
      <text:p text:style-name="P6"/>
      <text:p text:style-name="P11"><text:span text:style-name="T21">Il dataset presenta un evidente </text:span><text:span text:style-name="T22">sbilanciamento di classe</text:span><text:span text:style-name="T21">: le categorie Intenso (13.7%) e Rilassato (7.9%) sono significativamente meno rappresentate rispetto a Malinconico (29.9%). Questo ha motivato l'adozione del </text:span><text:span text:style-name="T22">G-Mean macro</text:span><text:span text:style-name="T21"> come metrica complementare alla F1 macro, poiché il G-Mean penalizza i modelli che classificano correttamente solo le classi maggioritarie ignorando le minoritarie.</text:span></text:p>
      <text:p text:style-name="P6"/>
      <text:h text:style-name="P3" text:outline-level="2"><text:span text:style-name="T2">Obiettivi del progetto</text:span></text:h>
      <text:p text:style-name="P11"><text:span text:style-name="T21">Gli obiettivi del progetto sono:</text:span></text:p>
      <text:list text:continue-numbering="true" text:style-name="WWNum2">
        <text:list-item>
          <text:p text:style-name="P5"><text:span text:style-name="T21">predire la </text:span><text:span text:style-name="T22">categoria di mood</text:span><text:span text:style-name="T21"> di una traccia musicale attraverso modelli di apprendimento supervisionato e semi-supervisionato, confrontando le performance con e senza l'integrazione di Background Knowledge ontologica;</text:span></text:p>
        </text:list-item>
        <text:list-item>
          <text:p text:style-name="P5"><text:span text:style-name="T21">costruire un'</text:span><text:span text:style-name="T22">ontologia OWL</text:span><text:span text:style-name="T21"> (</text:span><text:span text:style-name="T23">music.owl</text:span><text:span text:style-name="T21">) che formalizzi la conoscenza del dominio musicale, definendo concetti derivati da feature audio tramite restrizioni logiche, e usarla per arricchire la rappresentazione delle istanze;</text:span></text:p>
        </text:list-item>
        <text:list-item>
          <text:p text:style-name="P5"><text:span text:style-name="T21">rappresentare la </text:span><text:span text:style-name="T22">conoscenza simbolica</text:span><text:span text:style-name="T21"> del dominio mediante una Knowledge Base Prolog (</text:span><text:span text:style-name="T23">music_kb.pl</text:span><text:span text:style-name="T21">) contenente fatti, regole di classificazione e regole di rilevamento di conflitti logici;</text:span></text:p>
        </text:list-item>
        <text:list-item>
          <text:p text:style-name="P5"><text:span text:style-name="T21">modellare le </text:span><text:span text:style-name="T22">dipendenze probabilistiche</text:span><text:span text:style-name="T21"> tra variabili tramite una Rete Bayesiana discreta, al fine di effettuare inferenza sulla mood dato un vettore di feature OWL binarie.</text:span></text:p>
        </text:list-item>
      </text:list>
      <text:h text:style-name="P2" text:outline-level="1"><text:span text:style-name="T20">ELENCO DI ARGOMENTI DI INTERESSE</text:span></text:h>
      <text:p text:style-name="P11"><text:span text:style-name="T21">Gli argomenti oggetto del corso di Ingegneria della Conoscenza che sono stati applicati nel presente progetto sono i seguenti.</text:span></text:p>
      <text:p text:style-name="P6"/>
      <text:h text:style-name="P4" text:outline-level="3"><text:span text:style-name="T6">Background Knowledge Ontologica (ML+OntoBK):</text:span></text:h>
      <text:p text:style-name="P11"><text:span text:style-name="T21">È stata costruita un'ontologia OWL (</text:span><text:span text:style-name="T23">music.owl</text:span><text:span text:style-name="T21">) contenente 32 classi, 10 data properties e 25 concetti derivati. I concetti derivati (17 atomici e 8 complessi) formalizzano feature audio Spotify come restrizioni logiche su intervalli di valori, consentendo di estrarre vettori binari di Background Knowledge per ogni traccia. Questo approccio permette di confrontare sistematicamente l'impatto della conoscenza ontologica sull'apprendimento.</text:span></text:p>
      <text:h text:style-name="P4" text:outline-level="3"><text:span text:style-name="T6">Apprendimento supervisionato:</text:span></text:h>
      <text:p text:style-name="P11"><text:span text:style-name="T21">Sono state adottate tre tecniche di machine learning per il problema di classificazione multiclasse a 5 classi: </text:span><text:span text:style-name="T22">Decision Tree (DT)</text:span><text:span text:style-name="T21">, </text:span><text:span text:style-name="T22">Random Forest (RF)</text:span><text:span text:style-name="T21"> e </text:span><text:span text:style-name="T22">Logistic Regression (LR)</text:span><text:span text:style-name="T21">. Dopo una fase di preprocessing (normalizzazione delle feature continue), i modelli sono stati addestrati e confrontati sia su feature grezze che su feature combinate con la Background Knowledge OWL. La selezione degli iperparametri è avvenuta tramite </text:span><text:span text:style-name="T22">GridSearchCV</text:span><text:span text:style-name="T21"> con cross-validation stratificata interna, e la valutazione mediante </text:span><text:soft-page-break/><text:span text:style-name="T22">StratifiedShuffleSplit</text:span><text:span text:style-name="T21"> su 10 run indipendenti, riportando media e deviazione standard di Precision, Recall, F1 e G-Mean.</text:span></text:p>
      <text:h text:style-name="P4" text:outline-level="3"><text:span text:style-name="T6">Apprendimento semi-supervisionato (BNB e BNB-EM):</text:span></text:h>
      <text:p text:style-name="P11"><text:span text:style-name="T21">Adattati dal progetto </text:span><text:span text:style-name="T23">THESCREAMINGMONKEY/MBM-EM</text:span><text:span text:style-name="T21">, sono stati implementati il </text:span><text:span text:style-name="T22">Bernoulli Naive Bayes (BNB)</text:span><text:span text:style-name="T21"> per feature binarie OWL e il modello semi-supervisionato </text:span><text:span text:style-name="T22">BNB-EM</text:span><text:span text:style-name="T21">, che applica l'algoritmo Expectation-Maximization per sfruttare anche i campioni non etichettati (30% del training set). Questa componente è particolarmente rilevante per domini in cui l'annotazione manuale è costosa.</text:span></text:p>
      <text:h text:style-name="P4" text:outline-level="3"><text:span text:style-name="T6">Rappresentazione e ragionamento simbolico (KB Prolog):</text:span></text:h>
      <text:p text:style-name="P11"><text:span text:style-name="T21">È stata sviluppata una Knowledge Base Prolog (</text:span><text:span text:style-name="T23">music_kb.pl</text:span><text:span text:style-name="T21">) contenente fatti sulle proprietà delle tracce e regole di classificazione della mood basate su soglie sulle feature audio. La KB include anche regole di rilevamento di conflitti logici (es. una traccia classificata contemporaneamente come malinconico e goodvibes). L'integrazione Python–Prolog avviene tramite </text:span><text:span text:style-name="T23">pyswip</text:span><text:span text:style-name="T21">.</text:span></text:p>
      <text:h text:style-name="P4" text:outline-level="3"><text:span text:style-name="T6">Ragionamento su conoscenza incerta (Rete Bayesiana):</text:span></text:h>
      <text:p text:style-name="P11"><text:span text:style-name="T21">È stata costruita una Rete Bayesiana discreta con struttura Naïve Bayes Aumentata sul nodo </text:span><text:span text:style-name="T23">Mood</text:span><text:span text:style-name="T21">, usando come nodi le feature OWL binarie più discriminanti. I parametri (CPD) sono stati stimati con </text:span><text:span text:style-name="T23">BayesianEstimator</text:span><text:span text:style-name="T21"> (prior Dirichlet). L'inferenza probabilistica esatta avviene tramite Variable Elimination, restituendo </text:span><text:span text:style-name="T23">P(Mood | features)</text:span><text:span text:style-name="T21">.</text:span></text:p>
      <text:h text:style-name="P2" text:outline-level="1"><text:span text:style-name="T20">Background Knowledge Ontologica</text:span></text:h>
      <text:h text:style-name="P3" text:outline-level="2"><text:span text:style-name="T2">Introduzione e motivazione</text:span></text:h>
      <text:p text:style-name="P11"><text:span text:style-name="T21">Nel contesto del progetto MUSIKON, la classificazione della mood musicale non dipende esclusivamente da feature numeriche grezze, ma dalla loro </text:span><text:span text:style-name="T22">interpretazione semantica</text:span><text:span text:style-name="T21"> nel dominio musicale. Valori come </text:span><text:span text:style-name="T23">energy = 0.82</text:span><text:span text:style-name="T21"> e </text:span><text:span text:style-name="T23">acousticness = 0.03</text:span><text:span text:style-name="T21"> assumono significato musicale solo se contestualizzati: una traccia ad alta energia e non acustica è tipicamente elettronica o dance, mentre una traccia a bassa energia e alta acusticità è probabilmente una ballata intima.</text:span></text:p>
      <text:p text:style-name="P11"><text:span text:style-name="T21">L'approccio </text:span><text:span text:style-name="T22">ML+OntoBK</text:span><text:span text:style-name="T21"> (Machine Learning con Background Knowledge Ontologica) formalizza questa conoscenza di dominio in un'ontologia OWL, dalla quale vengono estratte feature booleane derivate che arricchiscono la rappresentazione delle istanze. Questo approccio è ispirato alla categoria progettuale indicata nelle linee-guida ICon: *sviluppare e testare un sistema basato su modelli di apprendimento supervisionato che integri i dataset con conoscenza di fondo proveniente dal Web Semantico*.</text:span></text:p>
      <text:p text:style-name="P6"/>
      <text:h text:style-name="P3" text:outline-level="2"><text:span text:style-name="T2">Struttura dell'ontologia OWL (music.owl)</text:span></text:h>
      <text:p text:style-name="P11"><text:span text:style-name="T21">L'ontologia è stata costruita con la libreria </text:span><text:span text:style-name="T22">owlready2</text:span><text:span text:style-name="T21"> in Python e salvata nel file </text:span><text:span text:style-name="T23">music.owl</text:span><text:span text:style-name="T21">. È strutturata in quattro livelli:</text:span></text:p>
      <text:p text:style-name="P6"/>
      <text:h text:style-name="P4" text:outline-level="3"><text:span text:style-name="T6">Classi primitive</text:span></text:h>
      <text:list text:continue-numbering="true" text:style-name="WWNum2">
        <text:list-item>
          <text:p text:style-name="P5"><text:span text:style-name="T22">MusicTrack</text:span><text:span text:style-name="T21">: entità principale dell'ontologia. Ogni individuo corrisponde a una traccia musicale del dataset.</text:span></text:p>
        </text:list-item>
        <text:list-item>
          <text:p text:style-name="P5"><text:span text:style-name="T22">MoodCategory</text:span><text:span text:style-name="T21">: superclasse delle categorie di mood. Sottoclassi: </text:span><text:span text:style-name="T23">PlaylistMhe</text:span><text:span text:style-name="T21">, </text:span><text:span text:style-name="T23">PlaylistGoodVibes</text:span><text:span text:style-name="T21">, </text:span><text:span text:style-name="T23">PlaylistOldVibes</text:span><text:span text:style-name="T21">, </text:span><text:span text:style-name="T23">PlaylistAnime</text:span><text:span text:style-name="T21">, </text:span><text:span text:style-name="T23">PlaylistItalian</text:span><text:span text:style-name="T21">.</text:span></text:p>
        </text:list-item>
      </text:list>
      <text:p text:style-name="P6"/>
      <text:h text:style-name="P4" text:outline-level="3"><text:soft-page-break/><text:span text:style-name="T6">Data Properties (feature audio)</text:span></text:h>
      <text:p text:style-name="P11"><text:span text:style-name="T21">Definite sul dominio </text:span><text:span text:style-name="T23">MusicTrack</text:span><text:span text:style-name="T21">, una per ciascuna feature Spotify:</text:span></text:p>
      <table:table table:name="Tabella2" table:style-name="Tabella2">
        <table:table-column table:style-name="Tabella2.A"/>
        <table:table-column table:style-name="Tabella2.B"/>
        <table:table-column table:style-name="Tabella2.C"/>
        <table:table-header-rows>
          <table:table-row table:style-name="Tabella2.1">
            <table:table-cell table:style-name="Tabella2.A1" office:value-type="string">
              <text:p text:style-name="P12"><text:span text:style-name="T24">Data Property</text:span></text:p>
            </table:table-cell>
            <table:table-cell table:style-name="Tabella2.A1" office:value-type="string">
              <text:p text:style-name="P12"><text:span text:style-name="T24">Tipo</text:span></text:p>
            </table:table-cell>
            <table:table-cell table:style-name="Tabella2.A1" office:value-type="string">
              <text:p text:style-name="P12"><text:span text:style-name="T24">Significato musicale</text:span></text:p>
            </table:table-cell>
          </table:table-row>
        </table:table-header-rows>
        <table:table-row table:style-name="Tabella2.1">
          <table:table-cell table:style-name="Tabella2.A2" office:value-type="string">
            <text:p text:style-name="P7"><text:span text:style-name="T7">hasDanceability</text:span></text:p>
          </table:table-cell>
          <table:table-cell table:style-name="Tabella2.A2" office:value-type="string">
            <text:p text:style-name="P7"><text:span text:style-name="T8">float [0,1]</text:span></text:p>
          </table:table-cell>
          <table:table-cell table:style-name="Tabella2.A2" office:value-type="string">
            <text:p text:style-name="P7"><text:span text:style-name="T8">Idoneità al ballo (ritmo, beat, regolarità)</text:span></text:p>
          </table:table-cell>
        </table:table-row>
        <table:table-row table:style-name="Tabella2.1">
          <table:table-cell table:style-name="Tabella2.A3" office:value-type="string">
            <text:p text:style-name="P7"><text:span text:style-name="T8">hasEnergy</text:span></text:p>
          </table:table-cell>
          <table:table-cell table:style-name="Tabella2.A3" office:value-type="string">
            <text:p text:style-name="P7"><text:span text:style-name="T8">float [0,1]</text:span></text:p>
          </table:table-cell>
          <table:table-cell table:style-name="Tabella2.A3" office:value-type="string">
            <text:p text:style-name="P7"><text:span text:style-name="T8">Intensità percettiva e attività dinamica</text:span></text:p>
          </table:table-cell>
        </table:table-row>
        <table:table-row table:style-name="Tabella2.1">
          <table:table-cell table:style-name="Tabella2.A2" office:value-type="string">
            <text:p text:style-name="P7"><text:span text:style-name="T8">hasValence</text:span></text:p>
          </table:table-cell>
          <table:table-cell table:style-name="Tabella2.A2" office:value-type="string">
            <text:p text:style-name="P7"><text:span text:style-name="T8">float [0,1]</text:span></text:p>
          </table:table-cell>
          <table:table-cell table:style-name="Tabella2.A2" office:value-type="string">
            <text:p text:style-name="P7"><text:span text:style-name="T8">Positività emotiva (0=triste, 1=euforico)</text:span></text:p>
          </table:table-cell>
        </table:table-row>
        <table:table-row table:style-name="Tabella2.1">
          <table:table-cell table:style-name="Tabella2.A3" office:value-type="string">
            <text:p text:style-name="P7"><text:span text:style-name="T8">hasAcousticness</text:span></text:p>
          </table:table-cell>
          <table:table-cell table:style-name="Tabella2.A3" office:value-type="string">
            <text:p text:style-name="P7"><text:span text:style-name="T8">float [0,1]</text:span></text:p>
          </table:table-cell>
          <table:table-cell table:style-name="Tabella2.A3" office:value-type="string">
            <text:p text:style-name="P7"><text:span text:style-name="T8">Probabilità di strumentazione acustica</text:span></text:p>
          </table:table-cell>
        </table:table-row>
        <table:table-row table:style-name="Tabella2.1">
          <table:table-cell table:style-name="Tabella2.A2" office:value-type="string">
            <text:p text:style-name="P7"><text:span text:style-name="T8">hasInstrumentalness</text:span></text:p>
          </table:table-cell>
          <table:table-cell table:style-name="Tabella2.A2" office:value-type="string">
            <text:p text:style-name="P7"><text:span text:style-name="T8">float [0,1]</text:span></text:p>
          </table:table-cell>
          <table:table-cell table:style-name="Tabella2.A2" office:value-type="string">
            <text:p text:style-name="P7"><text:span text:style-name="T8">Assenza di componente vocale</text:span></text:p>
          </table:table-cell>
        </table:table-row>
        <table:table-row table:style-name="Tabella2.1">
          <table:table-cell table:style-name="Tabella2.A3" office:value-type="string">
            <text:p text:style-name="P7"><text:span text:style-name="T8">hasLiveness</text:span></text:p>
          </table:table-cell>
          <table:table-cell table:style-name="Tabella2.A3" office:value-type="string">
            <text:p text:style-name="P7"><text:span text:style-name="T8">float [0,1]</text:span></text:p>
          </table:table-cell>
          <table:table-cell table:style-name="Tabella2.A3" office:value-type="string">
            <text:p text:style-name="P7"><text:span text:style-name="T8">Presenza di pubblico in registrazione</text:span></text:p>
          </table:table-cell>
        </table:table-row>
        <table:table-row table:style-name="Tabella2.1">
          <table:table-cell table:style-name="Tabella2.A2" office:value-type="string">
            <text:p text:style-name="P7"><text:span text:style-name="T8">hasNormLoudness</text:span></text:p>
          </table:table-cell>
          <table:table-cell table:style-name="Tabella2.A2" office:value-type="string">
            <text:p text:style-name="P7"><text:span text:style-name="T8">float [0,1]</text:span></text:p>
          </table:table-cell>
          <table:table-cell table:style-name="Tabella2.A2" office:value-type="string">
            <text:p text:style-name="P7"><text:span text:style-name="T8">Volume normalizzato da dB in [0,1]</text:span></text:p>
          </table:table-cell>
        </table:table-row>
        <table:table-row table:style-name="Tabella2.1">
          <table:table-cell table:style-name="Tabella2.A3" office:value-type="string">
            <text:p text:style-name="P7"><text:span text:style-name="T8">hasSpeechiness</text:span></text:p>
          </table:table-cell>
          <table:table-cell table:style-name="Tabella2.A3" office:value-type="string">
            <text:p text:style-name="P7"><text:span text:style-name="T8">float [0,1]</text:span></text:p>
          </table:table-cell>
          <table:table-cell table:style-name="Tabella2.A3" office:value-type="string">
            <text:p text:style-name="P7"><text:span text:style-name="T8">Presenza di parole parlate</text:span></text:p>
          </table:table-cell>
        </table:table-row>
        <table:table-row table:style-name="Tabella2.1">
          <table:table-cell table:style-name="Tabella2.A2" office:value-type="string">
            <text:p text:style-name="P7"><text:span text:style-name="T8">hasNormTempo</text:span></text:p>
          </table:table-cell>
          <table:table-cell table:style-name="Tabella2.A2" office:value-type="string">
            <text:p text:style-name="P7"><text:span text:style-name="T8">float [0,1]</text:span></text:p>
          </table:table-cell>
          <table:table-cell table:style-name="Tabella2.A2" office:value-type="string">
            <text:p text:style-name="P7"><text:span text:style-name="T8">BPM normalizzato: (bpm-54)/156</text:span></text:p>
          </table:table-cell>
        </table:table-row>
        <table:table-row table:style-name="Tabella2.1">
          <table:table-cell table:style-name="Tabella2.A3" office:value-type="string">
            <text:p text:style-name="P7"><text:span text:style-name="T8">hasKey</text:span></text:p>
          </table:table-cell>
          <table:table-cell table:style-name="Tabella2.A3" office:value-type="string">
            <text:p text:style-name="P7"><text:span text:style-name="T8">int [0,11]</text:span></text:p>
          </table:table-cell>
          <table:table-cell table:style-name="Tabella2.A3" office:value-type="string">
            <text:p text:style-name="P7"><text:span text:style-name="T8">Tonalità musicale (0=Do, 11=Si)</text:span></text:p>
          </table:table-cell>
        </table:table-row>
      </table:table>
      <text:p text:style-name="P6"/>
      <text:h text:style-name="P4" text:outline-level="3"><text:span text:style-name="T6">Concetti derivati atomici (17)</text:span></text:h>
      <text:p text:style-name="P11"><text:span text:style-name="T21">Ogni concetto atomico è definito tramite una restrizione </text:span><text:span text:style-name="T23">equivalent_to</text:span><text:span text:style-name="T21"> sull'ontologia. Le soglie sono basate sui </text:span><text:span text:style-name="T22">quartili</text:span><text:span text:style-name="T21"> del dataset per garantire attivazione su circa il 25% dei campioni:</text:span></text:p>
      <text:p text:style-name="P19"><text:span text:style-name="T10">music.owl — Concetti Atomici (estratto)</text:span></text:p>
      <text:p text:style-name="P20"><text:span text:style-name="T26">```</text:span></text:p>
      <text:p text:style-name="P20"><text:span text:style-name="T28">HighEnergy <text:s text:c="2"/>≡ <text:s/>MusicTrack ⊓ ∃hasEnergy.(xsd:float[&gt; 0.75])</text:span></text:p>
      <text:p text:style-name="P20"><text:span text:style-name="T28">LowEnergy <text:s text:c="3"/>≡ <text:s/>MusicTrack ⊓ ∃hasEnergy.(xsd:float[&lt; 0.45])</text:span></text:p>
      <text:p text:style-name="P20"><text:span text:style-name="T28">HighValence <text:s/>≡ <text:s/>MusicTrack ⊓ ∃hasValence.(xsd:float[&gt; 0.65])</text:span></text:p>
      <text:p text:style-name="P20"><text:span text:style-name="T28">LowValence <text:s text:c="2"/>≡ <text:s/>MusicTrack ⊓ ∃hasValence.(xsd:float[&lt; 0.32])</text:span></text:p>
      <text:p text:style-name="P20"><text:span text:style-name="T28">HighDanceability ≡ <text:s/>MusicTrack ⊓ ∃hasDanceability.(xsd:float[&gt; 0.68])</text:span></text:p>
      <text:p text:style-name="P20"><text:span text:style-name="T28">LowDanceability <text:s/>≡ <text:s/>MusicTrack ⊓ ∃hasDanceability.(xsd:float[&lt; 0.47])</text:span></text:p>
      <text:p text:style-name="P20"><text:span text:style-name="T28">Acoustic <text:s text:c="4"/>≡ <text:s/>MusicTrack ⊓ ∃hasAcousticness.(xsd:float[&gt; 0.40])</text:span></text:p>
      <text:p text:style-name="P20"><text:span text:style-name="T28">Electronic <text:s text:c="2"/>≡ <text:s/>MusicTrack ⊓ ∃hasAcousticness.(xsd:float[&lt; 0.05])</text:span></text:p>
      <text:p text:style-name="P20"><text:span text:style-name="T28">Instrumental ≡ <text:s/>MusicTrack ⊓ ∃hasInstrumentalness.(xsd:float[&gt; 0.05])</text:span></text:p>
      <text:p text:style-name="P20"><text:span text:style-name="T28">Vocal <text:s text:c="7"/>≡ <text:s/>MusicTrack ⊓ ∃hasInstrumentalness.(xsd:float[&lt; 0.001])</text:span></text:p>
      <text:p text:style-name="P20"><text:span text:style-name="T28">Live <text:s text:c="8"/>≡ <text:s/>MusicTrack ⊓ ∃hasLiveness.(xsd:float[&gt; 0.35])</text:span></text:p>
      <text:p text:style-name="P20"><text:span text:style-name="T28">Studio <text:s text:c="6"/>≡ <text:s/>MusicTrack ⊓ ∃hasLiveness.(xsd:float[&lt; 0.12])</text:span></text:p>
      <text:p text:style-name="P20"><text:span text:style-name="T28">Loud <text:s text:c="8"/>≡ <text:s/>MusicTrack ⊓ ∃hasNormLoudness.(xsd:float[&gt; 0.72])</text:span></text:p>
      <text:p text:style-name="P20"><text:span text:style-name="T28">Quiet <text:s text:c="7"/>≡ <text:s/>MusicTrack ⊓ ∃hasNormLoudness.(xsd:float[&lt; 0.40])</text:span></text:p>
      <text:p text:style-name="P20"><text:span text:style-name="T28">FastTempo <text:s text:c="3"/>≡ <text:s/>MusicTrack ⊓ ∃hasNormTempo.(xsd:float[&gt; 0.55]) <text:s/>[≈ 138 BPM]</text:span></text:p>
      <text:p text:style-name="P20"><text:span text:style-name="T28">SlowTempo <text:s text:c="3"/>≡ <text:s/>MusicTrack ⊓ ∃hasNormTempo.(xsd:float[&lt; 0.30]) <text:s/>[≈ 101 BPM]</text:span></text:p>
      <text:p text:style-name="P20"><text:span text:style-name="T28">Speechy <text:s text:c="5"/>≡ <text:s/>MusicTrack ⊓ ∃hasSpeechiness.(xsd:float[&gt; 0.07])</text:span></text:p>
      <text:p text:style-name="P20"><text:span text:style-name="T26">```</text:span></text:p>
      <text:p text:style-name="P6"/>
      <text:h text:style-name="P4" text:outline-level="3"><text:span text:style-name="T6">Concetti derivati complessi (8) — intersezioni OWL</text:span></text:h>
      <text:p text:style-name="P11"><text:span text:style-name="T21">I concetti complessi sono </text:span><text:span text:style-name="T22">intersezioni</text:span><text:span text:style-name="T21"> (⊓) di concetti atomici. Corrispondono a ciò che un reasoner OWL (Pellet/HermiT) deriverebbe automaticamente per sussunzione, classificando gli individui nelle sottoclassi appropriate:</text:span></text:p>
      <text:p text:style-name="P19"><text:span text:style-name="T10">music.owl — Concetti Complessi</text:span></text:p>
      <text:p text:style-name="P20"><text:span text:style-name="T26">```</text:span></text:p>
      <text:p text:style-name="P20"><text:span text:style-name="T28">HappyTrack <text:s text:c="7"/>≡ <text:s/>HighValence ⊓ HighEnergy</text:span></text:p>
      <text:p text:style-name="P20"><text:span text:style-name="T28">SadTrack <text:s text:c="9"/>≡ <text:s/>LowValence <text:s/>⊓ LowEnergy <text:s/>⊓ Acoustic</text:span></text:p>
      <text:p text:style-name="P20"><text:span text:style-name="T28">EnergeticDanceable≡ <text:s/>HighEnergy <text:s/>⊓ HighDanceability</text:span></text:p>
      <text:p text:style-name="P20"><text:span text:style-name="T28">MellowAcoustic <text:s text:c="3"/>≡ <text:s/>LowEnergy <text:s text:c="2"/>⊓ Acoustic</text:span></text:p>
      <text:p text:style-name="P20"><text:span text:style-name="T28">TenseTrack <text:s text:c="7"/>≡ <text:s/>LowValence <text:s/>⊓ HighEnergy</text:span></text:p>
      <text:p text:style-name="P20"><text:soft-page-break/><text:span text:style-name="T28">ChillTrack <text:s text:c="7"/>≡ <text:s/>HighValence ⊓ LowEnergy</text:span></text:p>
      <text:p text:style-name="P20"><text:span text:style-name="T28">IntenseVocal <text:s text:c="5"/>≡ <text:s/>HighEnergy <text:s/>⊓ Vocal ⊓ Electronic</text:span></text:p>
      <text:p text:style-name="P20"><text:span text:style-name="T28">AcousticSlow <text:s text:c="5"/>≡ <text:s/>Acoustic <text:s text:c="3"/>⊓ SlowTempo</text:span></text:p>
      <text:p text:style-name="P20"><text:span text:style-name="T26">```</text:span></text:p>
      <text:p text:style-name="P6"/>
      <table:table table:name="Tabella3" table:style-name="Tabella3">
        <table:table-column table:style-name="Tabella3.A"/>
        <table:table-row table:style-name="Tabella3.1">
          <table:table-cell table:style-name="Tabella3.A1" office:value-type="string">
            <text:p text:style-name="P9"><text:span text:style-name="T3">Nota Metodologica: </text:span><text:span text:style-name="T21">In assenza del reasoner Pellet (che richiede JVM), i concetti OWL sono calcolati in Python applicando le stesse soglie come predicati sulle righe del DataFrame. Questo approccio è formalmente equivalente per i General Concept Inclusions (GCI) coinvolti, poiché le definizioni sono tutte esprimibili come congiunzioni di vincoli su singole data property.</text:span></text:p>
          </table:table-cell>
        </table:table-row>
        <table:table-row table:style-name="Tabella3.1">
          <table:table-cell table:style-name="Tabella3.A2" office:value-type="string">
            <text:p text:style-name="P22"><text:span text:style-name="T21">In questo modo si garantisce coerenza tra la specifica OWL formale e l'implementazione computazionale, mantenendo la possibilità di sostituire l'estrazione Python con un reasoner completo in futuro.</text:span></text:p>
          </table:table-cell>
        </table:table-row>
      </table:table>
      <text:p text:style-name="P6"/>
      <text:h text:style-name="P3" text:outline-level="2"><text:span text:style-name="T2">Scelta delle soglie</text:span></text:h>
      <text:p text:style-name="P11"><text:span text:style-name="T21">Le soglie dei 17 concetti atomici sono state calibrate sui </text:span><text:span text:style-name="T22">quartili empirici</text:span><text:span text:style-name="T21"> del dataset Spotify. La motivazione è duplice: garantire che ogni concetto atomico sia attivo su una porzione significativa del dataset (evitando concetti quasi-vuoti), e che le soglie abbiano un'interpretazione musicale coerente con la letteratura Music Information Retrieval.</text:span></text:p>
      <table:table table:name="Tabella4" table:style-name="Tabella4">
        <table:table-column table:style-name="Tabella4.A"/>
        <table:table-column table:style-name="Tabella4.B"/>
        <table:table-column table:style-name="Tabella4.C"/>
        <table:table-column table:style-name="Tabella4.D"/>
        <table:table-header-rows>
          <table:table-row table:style-name="Tabella4.1">
            <table:table-cell table:style-name="Tabella4.A1" office:value-type="string">
              <text:p text:style-name="P12"><text:span text:style-name="T24">Concetto</text:span></text:p>
            </table:table-cell>
            <table:table-cell table:style-name="Tabella4.A1" office:value-type="string">
              <text:p text:style-name="P12"><text:span text:style-name="T24">Soglia</text:span></text:p>
            </table:table-cell>
            <table:table-cell table:style-name="Tabella4.A1" office:value-type="string">
              <text:p text:style-name="P12"><text:span text:style-name="T24">Valore empirico dataset</text:span></text:p>
            </table:table-cell>
            <table:table-cell table:style-name="Tabella4.A1" office:value-type="string">
              <text:p text:style-name="P12"><text:span text:style-name="T24">Interpretazione musicale</text:span></text:p>
            </table:table-cell>
          </table:table-row>
        </table:table-header-rows>
        <table:table-row table:style-name="Tabella4.1">
          <table:table-cell table:style-name="Tabella4.A2" office:value-type="string">
            <text:p text:style-name="P7"><text:span text:style-name="T7">HighEnergy</text:span></text:p>
          </table:table-cell>
          <table:table-cell table:style-name="Tabella4.A2" office:value-type="string">
            <text:p text:style-name="P7"><text:span text:style-name="T8">&gt; 0.75</text:span></text:p>
          </table:table-cell>
          <table:table-cell table:style-name="Tabella4.A2" office:value-type="string">
            <text:p text:style-name="P7"><text:span text:style-name="T8">75° pct. = 0.748</text:span></text:p>
          </table:table-cell>
          <table:table-cell table:style-name="Tabella4.A2" office:value-type="string">
            <text:p text:style-name="P7"><text:span text:style-name="T8">Alta intensità, rock/dance</text:span></text:p>
          </table:table-cell>
        </table:table-row>
        <table:table-row table:style-name="Tabella4.1">
          <table:table-cell table:style-name="Tabella4.A3" office:value-type="string">
            <text:p text:style-name="P7"><text:span text:style-name="T8">LowEnergy</text:span></text:p>
          </table:table-cell>
          <table:table-cell table:style-name="Tabella4.A3" office:value-type="string">
            <text:p text:style-name="P7"><text:span text:style-name="T8">&lt; 0.45</text:span></text:p>
          </table:table-cell>
          <table:table-cell table:style-name="Tabella4.A3" office:value-type="string">
            <text:p text:style-name="P7"><text:span text:style-name="T8">25° pct. = 0.450</text:span></text:p>
          </table:table-cell>
          <table:table-cell table:style-name="Tabella4.A3" office:value-type="string">
            <text:p text:style-name="P7"><text:span text:style-name="T8">Bassa intensità, ambient/ballate</text:span></text:p>
          </table:table-cell>
        </table:table-row>
        <table:table-row table:style-name="Tabella4.1">
          <table:table-cell table:style-name="Tabella4.A2" office:value-type="string">
            <text:p text:style-name="P7"><text:span text:style-name="T8">HighValence</text:span></text:p>
          </table:table-cell>
          <table:table-cell table:style-name="Tabella4.A2" office:value-type="string">
            <text:p text:style-name="P7"><text:span text:style-name="T8">&gt; 0.65</text:span></text:p>
          </table:table-cell>
          <table:table-cell table:style-name="Tabella4.A2" office:value-type="string">
            <text:p text:style-name="P7"><text:span text:style-name="T8">75° pct. = 0.628</text:span></text:p>
          </table:table-cell>
          <table:table-cell table:style-name="Tabella4.A2" office:value-type="string">
            <text:p text:style-name="P7"><text:span text:style-name="T8">Positività emotiva marcata</text:span></text:p>
          </table:table-cell>
        </table:table-row>
        <table:table-row table:style-name="Tabella4.1">
          <table:table-cell table:style-name="Tabella4.A3" office:value-type="string">
            <text:p text:style-name="P7"><text:span text:style-name="T8">LowValence</text:span></text:p>
          </table:table-cell>
          <table:table-cell table:style-name="Tabella4.A3" office:value-type="string">
            <text:p text:style-name="P7"><text:span text:style-name="T8">&lt; 0.32</text:span></text:p>
          </table:table-cell>
          <table:table-cell table:style-name="Tabella4.A3" office:value-type="string">
            <text:p text:style-name="P7"><text:span text:style-name="T8">25° pct. = 0.310</text:span></text:p>
          </table:table-cell>
          <table:table-cell table:style-name="Tabella4.A3" office:value-type="string">
            <text:p text:style-name="P7"><text:span text:style-name="T8">Malinconia o tensione</text:span></text:p>
          </table:table-cell>
        </table:table-row>
        <table:table-row table:style-name="Tabella4.1">
          <table:table-cell table:style-name="Tabella4.A2" office:value-type="string">
            <text:p text:style-name="P7"><text:span text:style-name="T8">Acoustic</text:span></text:p>
          </table:table-cell>
          <table:table-cell table:style-name="Tabella4.A2" office:value-type="string">
            <text:p text:style-name="P7"><text:span text:style-name="T8">&gt; 0.40</text:span></text:p>
          </table:table-cell>
          <table:table-cell table:style-name="Tabella4.A2" office:value-type="string">
            <text:p text:style-name="P7"><text:span text:style-name="T8">Media = 0.19 (soglia conservativa)</text:span></text:p>
          </table:table-cell>
          <table:table-cell table:style-name="Tabella4.A2" office:value-type="string">
            <text:p text:style-name="P7"><text:span text:style-name="T8">Strumentazione acustica prevalente</text:span></text:p>
          </table:table-cell>
        </table:table-row>
        <table:table-row table:style-name="Tabella4.1">
          <table:table-cell table:style-name="Tabella4.A3" office:value-type="string">
            <text:p text:style-name="P7"><text:span text:style-name="T8">FastTempo</text:span></text:p>
          </table:table-cell>
          <table:table-cell table:style-name="Tabella4.A3" office:value-type="string">
            <text:p text:style-name="P7"><text:span text:style-name="T8">&gt; 0.55</text:span></text:p>
          </table:table-cell>
          <table:table-cell table:style-name="Tabella4.A3" office:value-type="string">
            <text:p text:style-name="P7"><text:span text:style-name="T8">≈ 138 BPM</text:span></text:p>
          </table:table-cell>
          <table:table-cell table:style-name="Tabella4.A3" office:value-type="string">
            <text:p text:style-name="P7"><text:span text:style-name="T8">Tempo rapido (dance/metal)</text:span></text:p>
          </table:table-cell>
        </table:table-row>
        <table:table-row table:style-name="Tabella4.1">
          <table:table-cell table:style-name="Tabella4.A2" office:value-type="string">
            <text:p text:style-name="P7"><text:span text:style-name="T8">SlowTempo</text:span></text:p>
          </table:table-cell>
          <table:table-cell table:style-name="Tabella4.A2" office:value-type="string">
            <text:p text:style-name="P7"><text:span text:style-name="T8">&lt; 0.30</text:span></text:p>
          </table:table-cell>
          <table:table-cell table:style-name="Tabella4.A2" office:value-type="string">
            <text:p text:style-name="P7"><text:span text:style-name="T8">≈ 101 BPM</text:span></text:p>
          </table:table-cell>
          <table:table-cell table:style-name="Tabella4.A2" office:value-type="string">
            <text:p text:style-name="P7"><text:span text:style-name="T8">Tempo lento (ballate/ambient)</text:span></text:p>
          </table:table-cell>
        </table:table-row>
        <table:table-row table:style-name="Tabella4.1">
          <table:table-cell table:style-name="Tabella4.A3" office:value-type="string">
            <text:p text:style-name="P7"><text:span text:style-name="T8">Loud</text:span></text:p>
          </table:table-cell>
          <table:table-cell table:style-name="Tabella4.A3" office:value-type="string">
            <text:p text:style-name="P7"><text:span text:style-name="T8">&gt; 0.72</text:span></text:p>
          </table:table-cell>
          <table:table-cell table:style-name="Tabella4.A3" office:value-type="string">
            <text:p text:style-name="P7"><text:span text:style-name="T8">Percentile 70°</text:span></text:p>
          </table:table-cell>
          <table:table-cell table:style-name="Tabella4.A3" office:value-type="string">
            <text:p text:style-name="P7"><text:span text:style-name="T8">Volume elevato normalizzato</text:span></text:p>
          </table:table-cell>
        </table:table-row>
      </table:table>
      <text:p text:style-name="P6"/>
      <text:h text:style-name="P3" text:outline-level="2"><text:span text:style-name="T2">Estrazione delle feature OWL in Python</text:span></text:h>
      <text:p text:style-name="P11"><text:span text:style-name="T21">Il modulo </text:span><text:span text:style-name="T23">src/ontology_features.py</text:span><text:span text:style-name="T21"> applica le funzioni-soglia dell'ontologia a ogni riga del DataFrame, producendo un vettore binario di lunghezza 25 per ogni traccia:</text:span></text:p>
      <text:p text:style-name="P20"><text:span text:style-name="T26">```</text:span></text:p>
      <text:p text:style-name="P20"><text:span text:style-name="T28"># Estratto da src/ontology_features.py</text:span></text:p>
      <text:p text:style-name="P20"><text:span text:style-name="T28">_THRESHOLDS = {</text:span></text:p>
      <text:p text:style-name="P20"><text:span text:style-name="T28"><text:s text:c="4"/>"HighEnergy": <text:s text:c="7"/>lambda r: r["energy"] <text:s text:c="6"/>&gt; 0.75,</text:span></text:p>
      <text:p text:style-name="P20"><text:span text:style-name="T28"><text:s text:c="4"/>"LowEnergy": <text:s text:c="8"/>lambda r: r["energy"] <text:s text:c="6"/>&lt; 0.45,</text:span></text:p>
      <text:p text:style-name="P20"><text:span text:style-name="T28"><text:s text:c="4"/>"HighValence": <text:s text:c="6"/>lambda r: r["valence"] <text:s text:c="5"/>&gt; 0.65,</text:span></text:p>
      <text:p text:style-name="P20"><text:span text:style-name="T28"><text:s text:c="4"/>"HappyTrack": <text:s text:c="7"/>lambda r: r["valence"] &gt; 0.65 and r["energy"] &gt; 0.75,</text:span></text:p>
      <text:p text:style-name="P20"><text:span text:style-name="T28"><text:s text:c="4"/>"SadTrack": <text:s text:c="9"/>lambda r: r["valence"] &lt; 0.32 and r["energy"] &lt; 0.45</text:span></text:p>
      <text:p text:style-name="P20"><text:span text:style-name="T28"><text:s text:c="35"/>and r["acousticness"] &gt; 0.40,</text:span></text:p>
      <text:p text:style-name="P20"><text:span text:style-name="T28"><text:s text:c="4"/># ... (25 concetti totali)</text:span></text:p>
      <text:p text:style-name="P20"><text:span text:style-name="T28">}</text:span></text:p>
      <text:p text:style-name="P20"><text:span text:style-name="T28"><text:s/></text:span></text:p>
      <text:p text:style-name="P20"><text:span text:style-name="T28">def extract_owl_features(df: pd.DataFrame) -&gt; pd.DataFrame:</text:span></text:p>
      <text:p text:style-name="P20"><text:span text:style-name="T28"><text:s text:c="4"/>result = {}</text:span></text:p>
      <text:p text:style-name="P20"><text:span text:style-name="T28"><text:s text:c="4"/>for concept in OWL_FEATURES:</text:span></text:p>
      <text:p text:style-name="P20"><text:span text:style-name="T28"><text:s text:c="8"/>result[concept] = df.apply(_THRESHOLDS[concept], axis=1).astype(int)</text:span></text:p>
      <text:p text:style-name="P20"><text:soft-page-break/><text:span text:style-name="T28"><text:s text:c="4"/>return pd.DataFrame(result, columns=OWL_FEATURES)</text:span></text:p>
      <text:p text:style-name="P20"><text:span text:style-name="T26">```</text:span></text:p>
      <text:p text:style-name="P6"/>
      <text:h text:style-name="P3" text:outline-level="2"><text:span text:style-name="T2">Coverage dei concetti OWL per classe</text:span></text:h>
      <text:p text:style-name="P11"><text:span text:style-name="T21">La tabella seguente mostra la percentuale di tracce per classe che attivano i principali concetti OWL. Alta varianza inter-classe indica elevato potere discriminante del concetto.</text:span></text:p>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column table:style-name="Tabella5.G"/>
        <table:table-column table:style-name="Tabella5.H"/>
        <table:table-header-rows>
          <table:table-row table:style-name="Tabella5.1">
            <table:table-cell table:style-name="Tabella5.A1" office:value-type="string">
              <text:p text:style-name="P12"><text:span text:style-name="T24">Classe</text:span></text:p>
            </table:table-cell>
            <table:table-cell table:style-name="Tabella5.A1" office:value-type="string">
              <text:p text:style-name="P12"><text:span text:style-name="T24">HighEnergy</text:span></text:p>
            </table:table-cell>
            <table:table-cell table:style-name="Tabella5.A1" office:value-type="string">
              <text:p text:style-name="P12"><text:span text:style-name="T24">LowValence</text:span></text:p>
            </table:table-cell>
            <table:table-cell table:style-name="Tabella5.A1" office:value-type="string">
              <text:p text:style-name="P12"><text:span text:style-name="T24">Acoustic</text:span></text:p>
            </table:table-cell>
            <table:table-cell table:style-name="Tabella5.A1" office:value-type="string">
              <text:p text:style-name="P12"><text:span text:style-name="T24">IntenseVocal</text:span></text:p>
            </table:table-cell>
            <table:table-cell table:style-name="Tabella5.A1" office:value-type="string">
              <text:p text:style-name="P12"><text:span text:style-name="T24">HighDanceability</text:span></text:p>
            </table:table-cell>
            <table:table-cell table:style-name="Tabella5.A1" office:value-type="string">
              <text:p text:style-name="P12"><text:span text:style-name="T24">SadTrack</text:span></text:p>
            </table:table-cell>
            <table:table-cell table:style-name="Tabella5.A1" office:value-type="string">
              <text:p text:style-name="P12"><text:span text:style-name="T24">HappyTrack</text:span></text:p>
            </table:table-cell>
          </table:table-row>
        </table:table-header-rows>
        <table:table-row table:style-name="Tabella5.1">
          <table:table-cell table:style-name="Tabella5.A2" office:value-type="string">
            <text:p text:style-name="P7"><text:span text:style-name="T7">Malinconico</text:span></text:p>
          </table:table-cell>
          <table:table-cell table:style-name="Tabella5.A2" office:value-type="string">
            <text:p text:style-name="P12"><text:span text:style-name="T8">18.1%</text:span></text:p>
          </table:table-cell>
          <table:table-cell table:style-name="Tabella5.A2" office:value-type="string">
            <text:p text:style-name="P12"><text:span text:style-name="T8">52.9%</text:span></text:p>
          </table:table-cell>
          <table:table-cell table:style-name="Tabella5.A2" office:value-type="string">
            <text:p text:style-name="P12"><text:span text:style-name="T8">41.3%</text:span></text:p>
          </table:table-cell>
          <table:table-cell table:style-name="Tabella5.A2" office:value-type="string">
            <text:p text:style-name="P12"><text:span text:style-name="T8">9.7%</text:span></text:p>
          </table:table-cell>
          <table:table-cell table:style-name="Tabella5.A2" office:value-type="string">
            <text:p text:style-name="P12"><text:span text:style-name="T8">8.4%</text:span></text:p>
          </table:table-cell>
          <table:table-cell table:style-name="Tabella5.A2" office:value-type="string">
            <text:p text:style-name="P12"><text:span text:style-name="T8">12.3%</text:span></text:p>
          </table:table-cell>
          <table:table-cell table:style-name="Tabella5.A2" office:value-type="string">
            <text:p text:style-name="P12"><text:span text:style-name="T8">5.2%</text:span></text:p>
          </table:table-cell>
        </table:table-row>
        <table:table-row table:style-name="Tabella5.1">
          <table:table-cell table:style-name="Tabella5.A3" office:value-type="string">
            <text:p text:style-name="P7"><text:span text:style-name="T8">GoodVibes</text:span></text:p>
          </table:table-cell>
          <table:table-cell table:style-name="Tabella5.A3" office:value-type="string">
            <text:p text:style-name="P12"><text:span text:style-name="T8">51.8%</text:span></text:p>
          </table:table-cell>
          <table:table-cell table:style-name="Tabella5.A3" office:value-type="string">
            <text:p text:style-name="P12"><text:span text:style-name="T8">10.6%</text:span></text:p>
          </table:table-cell>
          <table:table-cell table:style-name="Tabella5.A3" office:value-type="string">
            <text:p text:style-name="P12"><text:span text:style-name="T8">11.3%</text:span></text:p>
          </table:table-cell>
          <table:table-cell table:style-name="Tabella5.A3" office:value-type="string">
            <text:p text:style-name="P12"><text:span text:style-name="T8">20.6%</text:span></text:p>
          </table:table-cell>
          <table:table-cell table:style-name="Tabella5.A3" office:value-type="string">
            <text:p text:style-name="P12"><text:span text:style-name="T8">44.0%</text:span></text:p>
          </table:table-cell>
          <table:table-cell table:style-name="Tabella5.A3" office:value-type="string">
            <text:p text:style-name="P12"><text:span text:style-name="T8">1.4%</text:span></text:p>
          </table:table-cell>
          <table:table-cell table:style-name="Tabella5.A3" office:value-type="string">
            <text:p text:style-name="P12"><text:span text:style-name="T8">28.4%</text:span></text:p>
          </table:table-cell>
        </table:table-row>
        <table:table-row table:style-name="Tabella5.1">
          <table:table-cell table:style-name="Tabella5.A2" office:value-type="string">
            <text:p text:style-name="P7"><text:span text:style-name="T8">OldVibes</text:span></text:p>
          </table:table-cell>
          <table:table-cell table:style-name="Tabella5.A2" office:value-type="string">
            <text:p text:style-name="P12"><text:span text:style-name="T8">41.4%</text:span></text:p>
          </table:table-cell>
          <table:table-cell table:style-name="Tabella5.A2" office:value-type="string">
            <text:p text:style-name="P12"><text:span text:style-name="T8">10.8%</text:span></text:p>
          </table:table-cell>
          <table:table-cell table:style-name="Tabella5.A2" office:value-type="string">
            <text:p text:style-name="P12"><text:span text:style-name="T8">22.5%</text:span></text:p>
          </table:table-cell>
          <table:table-cell table:style-name="Tabella5.A2" office:value-type="string">
            <text:p text:style-name="P12"><text:span text:style-name="T8">8.1%</text:span></text:p>
          </table:table-cell>
          <table:table-cell table:style-name="Tabella5.A2" office:value-type="string">
            <text:p text:style-name="P12"><text:span text:style-name="T8">42.3%</text:span></text:p>
          </table:table-cell>
          <table:table-cell table:style-name="Tabella5.A2" office:value-type="string">
            <text:p text:style-name="P12"><text:span text:style-name="T8">2.7%</text:span></text:p>
          </table:table-cell>
          <table:table-cell table:style-name="Tabella5.A2" office:value-type="string">
            <text:p text:style-name="P12"><text:span text:style-name="T8">18.9%</text:span></text:p>
          </table:table-cell>
        </table:table-row>
        <table:table-row table:style-name="Tabella5.1">
          <table:table-cell table:style-name="Tabella5.A3" office:value-type="string">
            <text:p text:style-name="P7"><text:span text:style-name="T8">Intenso</text:span></text:p>
          </table:table-cell>
          <table:table-cell table:style-name="Tabella5.A3" office:value-type="string">
            <text:p text:style-name="P12"><text:span text:style-name="T8">88.7%</text:span></text:p>
          </table:table-cell>
          <table:table-cell table:style-name="Tabella5.A3" office:value-type="string">
            <text:p text:style-name="P12"><text:span text:style-name="T8">19.7%</text:span></text:p>
          </table:table-cell>
          <table:table-cell table:style-name="Tabella5.A3" office:value-type="string">
            <text:p text:style-name="P12"><text:span text:style-name="T8">2.8%</text:span></text:p>
          </table:table-cell>
          <table:table-cell table:style-name="Tabella5.A3" office:value-type="string">
            <text:p text:style-name="P12"><text:span text:style-name="T8">69.0%</text:span></text:p>
          </table:table-cell>
          <table:table-cell table:style-name="Tabella5.A3" office:value-type="string">
            <text:p text:style-name="P12"><text:span text:style-name="T8">8.5%</text:span></text:p>
          </table:table-cell>
          <table:table-cell table:style-name="Tabella5.A3" office:value-type="string">
            <text:p text:style-name="P12"><text:span text:style-name="T8">0.0%</text:span></text:p>
          </table:table-cell>
          <table:table-cell table:style-name="Tabella5.A3" office:value-type="string">
            <text:p text:style-name="P12"><text:span text:style-name="T8">35.2%</text:span></text:p>
          </table:table-cell>
        </table:table-row>
        <table:table-row table:style-name="Tabella5.1">
          <table:table-cell table:style-name="Tabella5.A2" office:value-type="string">
            <text:p text:style-name="P7"><text:span text:style-name="T8">Rilassato</text:span></text:p>
          </table:table-cell>
          <table:table-cell table:style-name="Tabella5.A2" office:value-type="string">
            <text:p text:style-name="P12"><text:span text:style-name="T8">22.0%</text:span></text:p>
          </table:table-cell>
          <table:table-cell table:style-name="Tabella5.A2" office:value-type="string">
            <text:p text:style-name="P12"><text:span text:style-name="T8">24.4%</text:span></text:p>
          </table:table-cell>
          <table:table-cell table:style-name="Tabella5.A2" office:value-type="string">
            <text:p text:style-name="P12"><text:span text:style-name="T8">53.7%</text:span></text:p>
          </table:table-cell>
          <table:table-cell table:style-name="Tabella5.A2" office:value-type="string">
            <text:p text:style-name="P12"><text:span text:style-name="T8">2.4%</text:span></text:p>
          </table:table-cell>
          <table:table-cell table:style-name="Tabella5.A2" office:value-type="string">
            <text:p text:style-name="P12"><text:span text:style-name="T8">12.2%</text:span></text:p>
          </table:table-cell>
          <table:table-cell table:style-name="Tabella5.A2" office:value-type="string">
            <text:p text:style-name="P12"><text:span text:style-name="T8">9.8%</text:span></text:p>
          </table:table-cell>
          <table:table-cell table:style-name="Tabella5.A2" office:value-type="string">
            <text:p text:style-name="P12"><text:span text:style-name="T8">12.2%</text:span></text:p>
          </table:table-cell>
        </table:table-row>
      </table:table>
      <text:p text:style-name="P6"/>
      <text:p text:style-name="P11"><text:span text:style-name="T23">IntenseVocal</text:span><text:span text:style-name="T21"> attiva il </text:span><text:span text:style-name="T22">69.0%</text:span><text:span text:style-name="T21"> per la classe Intenso contro il 2.4% per Rilassato: è il concetto più discriminante del dataset. </text:span><text:span text:style-name="T23">HighEnergy</text:span><text:span text:style-name="T21"> separa nettamente Intenso (88.7%) da Malinconico (18.1%). </text:span><text:span text:style-name="T23">Acoustic</text:span><text:span text:style-name="T21"> identifica Rilassato (53.7%) e Malinconico (41.3%).</text:span></text:p>
      <text:p text:style-name="P6"/>
      <text:p text:style-name="P13"><draw:frame draw:style-name="fr1" draw:name="Immagine1" text:anchor-type="as-char" svg:width="15.346cm" svg:height="5.345cm" draw:z-index="0"><draw:image xlink:href="Pictures/100000010000076100000293B0DCF96B.png" xlink:type="simple" xlink:show="embed" xlink:actuate="onLoad" draw:mime-type="image/png"/></draw:frame></text:p>
      <text:p text:style-name="P14"><text:span text:style-name="T11">Figura 1 — Heatmap P(concetto OWL = 1 | classe) per i 25 concetti di Background Knowledge. Valori più alti (rosso scuro) indicano alta copertura; alta varianza inter-colonna = alta discriminabilità.</text:span></text:p>
      <text:h text:style-name="P2" text:outline-level="1"><text:span text:style-name="T20">Preprocessing e Feature Engineering</text:span></text:h>
      <text:h text:style-name="P3" text:outline-level="2"><text:span text:style-name="T2">Caricamento e pulizia dei dati</text:span></text:h>
      <text:p text:style-name="P11"><text:span text:style-name="T21">Il dataset è stato caricato dal file </text:span><text:span text:style-name="T23">data/playlist_tracks.csv</text:span><text:span text:style-name="T21"> tramite la libreria </text:span><text:span text:style-name="T22">pandas</text:span><text:span text:style-name="T21">. Prima di procedere all'addestramento, è stata effettuata una fase di validazione e preparazione dei dati.</text:span></text:p>
      <text:p text:style-name="P11"><text:span text:style-name="T21">In particolare:</text:span></text:p>
      <text:list text:continue-numbering="true" text:style-name="WWNum2">
        <text:list-item>
          <text:p text:style-name="P5"><text:span text:style-name="T21">è stata verificata la presenza di tutte le colonne richieste (le 10 feature audio più </text:span><text:span text:style-name="T23">playlistName</text:span><text:span text:style-name="T21">);</text:span></text:p>
        </text:list-item>
        <text:list-item>
          <text:p text:style-name="P5"><text:span text:style-name="T21">non sono state rilevate righe con valori mancanti nel dataset utilizzato (dataset già pulito dal progetto ICON di riferimento);</text:span></text:p>
        </text:list-item>
        <text:list-item>
          <text:p text:style-name="P5"><text:span text:style-name="T21">la variabile target </text:span><text:span text:style-name="T23">playlistName</text:span><text:span text:style-name="T21"> è stata convertita in un indice intero tramite un dizionario di mapping esplicito, per garantire coerenza tra le diverse fasi del sistema.</text:span></text:p>
        </text:list-item>
      </text:list>
      <text:p text:style-name="P6"/>
      <text:h text:style-name="P3" text:outline-level="2"><text:soft-page-break/><text:span text:style-name="T2">Normalizzazione delle feature</text:span></text:h>
      <text:p text:style-name="P11"><text:span text:style-name="T21">Le feature del dataset presentano scale molto differenti: </text:span><text:span text:style-name="T23">loudness</text:span><text:span text:style-name="T21"> è in decibel (tipicamente da -30 a 0), mentre </text:span><text:span text:style-name="T23">tempo</text:span><text:span text:style-name="T21"> è in BPM (da ~54 a ~210). Per garantire comparabilità e compatibilità con modelli sensibili alla scala (LR), sono state applicate le seguenti trasformazioni:</text:span></text:p>
      <text:p text:style-name="P20"><text:span text:style-name="T26">```</text:span></text:p>
      <text:p text:style-name="P20"><text:span text:style-name="T28"># Normalizzazione loudness: da dB in [0,1]</text:span></text:p>
      <text:p text:style-name="P20"><text:span text:style-name="T28">df["loudness_norm"] = (df["loudness"] - (-30)) / (0 - (-30))</text:span></text:p>
      <text:p text:style-name="P20"><text:span text:style-name="T28">df["loudness_norm"] = df["loudness_norm"].clip(0, 1)</text:span></text:p>
      <text:p text:style-name="P20"><text:span text:style-name="T28"><text:s/></text:span></text:p>
      <text:p text:style-name="P20"><text:span text:style-name="T28"># Normalizzazione tempo: da BPM in [0,1]</text:span></text:p>
      <text:p text:style-name="P20"><text:span text:style-name="T28">df["tempo_norm"] = (df["tempo"] - 54) / (210 - 54)</text:span></text:p>
      <text:p text:style-name="P20"><text:span text:style-name="T28">df["tempo_norm"] = df["tempo_norm"].clip(0, 1)</text:span></text:p>
      <text:p text:style-name="P20"><text:span text:style-name="T28"><text:s/></text:span></text:p>
      <text:p text:style-name="P20"><text:span text:style-name="T28"># Normalizzazione tonalità: da [0,11] in [0,1]</text:span></text:p>
      <text:p text:style-name="P20"><text:span text:style-name="T28">df["key_norm"] = df["key"] / 11.0</text:span></text:p>
      <text:p text:style-name="P20"><text:span text:style-name="T26">```</text:span></text:p>
      <text:p text:style-name="P6"/>
      <table:table table:name="Tabella6" table:style-name="Tabella6">
        <table:table-column table:style-name="Tabella6.A"/>
        <table:table-row table:style-name="Tabella6.1">
          <table:table-cell table:style-name="Tabella6.A1" office:value-type="string">
            <text:p text:style-name="P9"><text:span text:style-name="T3">Nota Metodologica: </text:span><text:span text:style-name="T21">La scelta dei range di normalizzazione per loudness e tempo è basata sui valori fisicamente plausibili per feature audio Spotify (documentazione Spotify Audio Features). Non è stato usato StandardScaler per evitare che la media del training contaminasse il test set nelle 10 run di valutazione; la normalizzazione a range fisso è deterministica e non dipende dalla partizione.</text:span></text:p>
          </table:table-cell>
        </table:table-row>
        <table:table-row table:style-name="Tabella6.1">
          <table:table-cell table:style-name="Tabella6.A2" office:value-type="string">
            <text:p text:style-name="P22"><text:span text:style-name="T21">Questa scelta garantisce replicabilità completa e assenza di data leakage.</text:span></text:p>
          </table:table-cell>
        </table:table-row>
      </table:table>
      <text:p text:style-name="P6"/>
      <text:h text:style-name="P3" text:outline-level="2"><text:span text:style-name="T2">Tre configurazioni di feature</text:span></text:h>
      <text:p text:style-name="P11"><text:span text:style-name="T21">Il preprocessing produce tre matrici di feature, usate per confronti sistematici:</text:span></text:p>
      <table:table table:name="Tabella7" table:style-name="Tabella7">
        <table:table-column table:style-name="Tabella7.A"/>
        <table:table-column table:style-name="Tabella7.B"/>
        <table:table-column table:style-name="Tabella7.C"/>
        <table:table-column table:style-name="Tabella7.D"/>
        <table:table-header-rows>
          <table:table-row table:style-name="Tabella7.1">
            <table:table-cell table:style-name="Tabella7.A1" office:value-type="string">
              <text:p text:style-name="P12"><text:span text:style-name="T24">Configurazione</text:span></text:p>
            </table:table-cell>
            <table:table-cell table:style-name="Tabella7.A1" office:value-type="string">
              <text:p text:style-name="P12"><text:span text:style-name="T24">Dimensione</text:span></text:p>
            </table:table-cell>
            <table:table-cell table:style-name="Tabella7.A1" office:value-type="string">
              <text:p text:style-name="P12"><text:span text:style-name="T24">Descrizione</text:span></text:p>
            </table:table-cell>
            <table:table-cell table:style-name="Tabella7.A1" office:value-type="string">
              <text:p text:style-name="P12"><text:span text:style-name="T24">Modelli utilizzati</text:span></text:p>
            </table:table-cell>
          </table:table-row>
        </table:table-header-rows>
        <table:table-row table:style-name="Tabella7.1">
          <table:table-cell table:style-name="Tabella7.A2" office:value-type="string">
            <text:p text:style-name="P7"><text:span text:style-name="T7">X_raw</text:span></text:p>
          </table:table-cell>
          <table:table-cell table:style-name="Tabella7.A2" office:value-type="string">
            <text:p text:style-name="P7"><text:span text:style-name="T8">(519, 10)</text:span></text:p>
          </table:table-cell>
          <table:table-cell table:style-name="Tabella7.A2" office:value-type="string">
            <text:p text:style-name="P7"><text:span text:style-name="T8">Feature continue normalizzate Spotify</text:span></text:p>
          </table:table-cell>
          <table:table-cell table:style-name="Tabella7.A2" office:value-type="string">
            <text:p text:style-name="P7"><text:span text:style-name="T8">DT(raw), RF(raw), LR(raw)</text:span></text:p>
          </table:table-cell>
        </table:table-row>
        <table:table-row table:style-name="Tabella7.1">
          <table:table-cell table:style-name="Tabella7.A3" office:value-type="string">
            <text:p text:style-name="P7"><text:span text:style-name="T8">X_owl</text:span></text:p>
          </table:table-cell>
          <table:table-cell table:style-name="Tabella7.A3" office:value-type="string">
            <text:p text:style-name="P7"><text:span text:style-name="T8">(519, 25)</text:span></text:p>
          </table:table-cell>
          <table:table-cell table:style-name="Tabella7.A3" office:value-type="string">
            <text:p text:style-name="P7"><text:span text:style-name="T8">Feature booleane OWL (Background Knowledge)</text:span></text:p>
          </table:table-cell>
          <table:table-cell table:style-name="Tabella7.A3" office:value-type="string">
            <text:p text:style-name="P7"><text:span text:style-name="T8">BNB, BNB-EM, BN (NBA)</text:span></text:p>
          </table:table-cell>
        </table:table-row>
        <table:table-row table:style-name="Tabella7.1">
          <table:table-cell table:style-name="Tabella7.A2" office:value-type="string">
            <text:p text:style-name="P7"><text:span text:style-name="T8">X_all</text:span></text:p>
          </table:table-cell>
          <table:table-cell table:style-name="Tabella7.A2" office:value-type="string">
            <text:p text:style-name="P7"><text:span text:style-name="T8">(519, 35)</text:span></text:p>
          </table:table-cell>
          <table:table-cell table:style-name="Tabella7.A2" office:value-type="string">
            <text:p text:style-name="P7"><text:span text:style-name="T8">X_raw concatenato con X_owl</text:span></text:p>
          </table:table-cell>
          <table:table-cell table:style-name="Tabella7.A2" office:value-type="string">
            <text:p text:style-name="P7"><text:span text:style-name="T8">DT(+OWL), RF(+OWL), LR(+OWL)</text:span></text:p>
          </table:table-cell>
        </table:table-row>
      </table:table>
      <text:p text:style-name="P6"/>
      <text:p text:style-name="P11"><text:span text:style-name="T21">Il confronto sistematico tra modelli addestrati su </text:span><text:span text:style-name="T22">X_raw</text:span><text:span text:style-name="T21"> e </text:span><text:span text:style-name="T22">X_all</text:span><text:span text:style-name="T21"> consente di isolare l'effetto della Background Knowledge OWL sulle performance, controllando il tipo di modello. Il confronto tra modelli su </text:span><text:span text:style-name="T22">X_owl</text:span><text:span text:style-name="T21"> e su </text:span><text:span text:style-name="T22">X_raw</text:span><text:span text:style-name="T21"> misura invece la capacità della rappresentazione binaria di sostituire le feature continue.</text:span></text:p>
      <text:p text:style-name="P20"><text:span text:style-name="T26">```</text:span></text:p>
      <text:p text:style-name="P20"><text:span text:style-name="T28"># src/preprocessing.py — Costruzione delle matrici di feature</text:span></text:p>
      <text:p text:style-name="P20"><text:span text:style-name="T28">X_raw = df[RAW_FEATURES].values.astype(np.float64) <text:s text:c="5"/># (519, 10)</text:span></text:p>
      <text:p text:style-name="P20"><text:span text:style-name="T28">X_owl = extract_owl_features(df).values.astype(float) <text:s text:c="2"/># (519, 25)</text:span></text:p>
      <text:p text:style-name="P20"><text:span text:style-name="T28">X_all = np.hstack([X_raw, X_owl]) <text:s text:c="22"/># (519, 35)</text:span></text:p>
      <text:p text:style-name="P20"><text:span text:style-name="T26">```</text:span></text:p>
      <text:p text:style-name="P6"/>
      <text:h text:style-name="P2" text:outline-level="1"><text:soft-page-break/><text:span text:style-name="T20">Apprendimento Supervisionato</text:span></text:h>
      <text:h text:style-name="P3" text:outline-level="2"><text:span text:style-name="T2">Introduzione</text:span></text:h>
      <text:p text:style-name="P11"><text:span text:style-name="T21">L'apprendimento supervisionato è stato utilizzato per predire la </text:span><text:span text:style-name="T22">categoria di mood</text:span><text:span text:style-name="T21"> di una traccia musicale, modellando il problema come classificazione multiclasse con cinque classi:</text:span></text:p>
      <text:p text:style-name="P11"><text:span text:style-name="T21"><text:s text:c="4"/>playlistName ∈ { Malinconico, GoodVibes, OldVibes, Intenso, Rilassato }</text:span></text:p>
      <text:p text:style-name="P11"><text:span text:style-name="T21">Il problema non è banale: le cinque playlist rappresentano categorie di mood costruite soggettivamente, che si sovrappongono parzialmente nello spazio delle feature audio (es. OldVibes e GoodVibes condividono alta danzabilità). Sono stati addestrati e confrontati tre modelli eterogenei — </text:span><text:span text:style-name="T22">Decision Tree</text:span><text:span text:style-name="T21">, </text:span><text:span text:style-name="T22">Random Forest</text:span><text:span text:style-name="T21"> e </text:span><text:span text:style-name="T22">Logistic Regression</text:span><text:span text:style-name="T21"> — sia su feature grezze che su feature arricchite con Background Knowledge OWL.</text:span></text:p>
      <text:p text:style-name="P6"/>
      <text:h text:style-name="P3" text:outline-level="2"><text:span text:style-name="T2">Librerie utilizzate</text:span></text:h>
      <text:list text:continue-numbering="true" text:style-name="WWNum2">
        <text:list-item>
          <text:p text:style-name="P5"><text:span text:style-name="T22">pandas</text:span><text:span text:style-name="T21"> e </text:span><text:span text:style-name="T22">NumPy</text:span><text:span text:style-name="T21"> per la gestione dei dati e la costruzione delle matrici di feature;</text:span></text:p>
        </text:list-item>
        <text:list-item>
          <text:p text:style-name="P5"><text:span text:style-name="T22">scikit-learn</text:span><text:span text:style-name="T21"> per modelli di classificazione, cross-validation e ottimizzazione degli iperparametri (</text:span><text:span text:style-name="T23">GridSearchCV</text:span><text:span text:style-name="T21">, </text:span><text:span text:style-name="T23">StratifiedShuffleSplit</text:span><text:span text:style-name="T21">, </text:span><text:span text:style-name="T23">StratifiedKFold</text:span><text:span text:style-name="T21">);</text:span></text:p>
        </text:list-item>
        <text:list-item>
          <text:p text:style-name="P5"><text:span text:style-name="T22">matplotlib</text:span><text:span text:style-name="T21"> per la visualizzazione dei risultati (barplot, boxplot, heatmap).</text:span></text:p>
        </text:list-item>
      </text:list>
      <text:p text:style-name="P6"/>
      <text:h text:style-name="P3" text:outline-level="2"><text:span text:style-name="T2">Suddivisione e protocollo di valutazione</text:span></text:h>
      <text:p text:style-name="P11"><text:span text:style-name="T21">La valutazione è basata su </text:span><text:span text:style-name="T22">StratifiedShuffleSplit</text:span><text:span text:style-name="T21"> con 10 split indipendenti (test_size = 30%). La stratificazione garantisce che ogni split mantenga la distribuzione originale delle cinque classi, incluse le minoritarie.</text:span></text:p>
      <text:p text:style-name="P20"><text:span text:style-name="T26">```</text:span></text:p>
      <text:p text:style-name="P20"><text:span text:style-name="T28">from sklearn.model_selection import StratifiedShuffleSplit</text:span></text:p>
      <text:p text:style-name="P20"><text:span text:style-name="T28"><text:s/></text:span></text:p>
      <text:p text:style-name="P20"><text:span text:style-name="T28">sss = StratifiedShuffleSplit(</text:span></text:p>
      <text:p text:style-name="P20"><text:span text:style-name="T28"><text:s text:c="4"/>n_splits <text:s text:c="2"/>= 10, <text:s text:c="7"/># 10 run indipendenti</text:span></text:p>
      <text:p text:style-name="P20"><text:span text:style-name="T28"><text:s text:c="4"/>test_size <text:s/>= 0.30, <text:s text:c="5"/># ~156 campioni di test per run</text:span></text:p>
      <text:p text:style-name="P20"><text:span text:style-name="T28"><text:s text:c="4"/>random_state = 42</text:span></text:p>
      <text:p text:style-name="P20"><text:span text:style-name="T28">)</text:span></text:p>
      <text:p text:style-name="P20"><text:span text:style-name="T28"><text:s/></text:span></text:p>
      <text:p text:style-name="P20"><text:span text:style-name="T28">for train_idx, test_idx in sss.split(X, y):</text:span></text:p>
      <text:p text:style-name="P20"><text:span text:style-name="T28"><text:s text:c="4"/>X_tr, X_te = X[train_idx], X[test_idx]</text:span></text:p>
      <text:p text:style-name="P20"><text:span text:style-name="T28"><text:s text:c="4"/>y_tr, y_te = y[train_idx], y[test_idx]</text:span></text:p>
      <text:p text:style-name="P20"><text:span text:style-name="T28"><text:s text:c="4"/>model.fit(X_tr, y_tr)</text:span></text:p>
      <text:p text:style-name="P20"><text:span text:style-name="T28"><text:s text:c="4"/>y_pred = model.predict(X_te)</text:span></text:p>
      <text:p text:style-name="P20"><text:span text:style-name="T28"><text:s text:c="4"/># Calcolo metriche su y_te, y_pred</text:span></text:p>
      <text:p text:style-name="P20"><text:span text:style-name="T26">```</text:span></text:p>
      <text:p text:style-name="P6"/>
      <table:table table:name="Tabella8" table:style-name="Tabella8">
        <table:table-column table:style-name="Tabella8.A"/>
        <table:table-row table:style-name="Tabella8.1">
          <table:table-cell table:style-name="Tabella8.A1" office:value-type="string">
            <text:p text:style-name="P9"><text:span text:style-name="T3">Nota Metodologica: </text:span><text:span text:style-name="T21">La scelta di 10 run con StratifiedShuffleSplit, invece di un singolo train/test split, garantisce risultati più stabili e consente di riportare **media e deviazione standard** delle metriche. Un singolo run su un test set può dipendere dalla casualità dello split e produrre stime sovrastimate o sottostimate.</text:span></text:p>
          </table:table-cell>
        </table:table-row>
        <table:table-row table:style-name="Tabella8.1">
          <table:table-cell table:style-name="Tabella8.A2" office:value-type="string">
            <text:p text:style-name="P22"><text:span text:style-name="T21">Non vengono presentate singole matrici di confusione ma tabelle aggregate (media ± std) come richiesto dalle linee-guida del progetto ICon.</text:span></text:p>
          </table:table-cell>
        </table:table-row>
      </table:table>
      <text:p text:style-name="P6"/>
      <text:h text:style-name="P3" text:outline-level="2"><text:soft-page-break/><text:span text:style-name="T2">Ottimizzazione degli iperparametri</text:span></text:h>
      <text:p text:style-name="P11"><text:span text:style-name="T21">Per ogni modello, la selezione degli iperparametri ottimali avviene tramite </text:span><text:span text:style-name="T22">GridSearchCV</text:span><text:span text:style-name="T21"> con </text:span><text:span text:style-name="T22">StratifiedKFold a 5 fold</text:span><text:span text:style-name="T21"> all'interno del solo training set di ciascun split. Questo garantisce l'assenza di data leakage: il test set rimane completamente separato dall'ottimizzazione.</text:span></text:p>
      <text:p text:style-name="P20"><text:span text:style-name="T26">```</text:span></text:p>
      <text:p text:style-name="P20"><text:span text:style-name="T28">from sklearn.model_selection import GridSearchCV, StratifiedKFold</text:span></text:p>
      <text:p text:style-name="P20"><text:span text:style-name="T28"><text:s/></text:span></text:p>
      <text:p text:style-name="P20"><text:span text:style-name="T28">cv_inner = StratifiedKFold(n_splits=5, shuffle=True, random_state=42)</text:span></text:p>
      <text:p text:style-name="P20"><text:span text:style-name="T28"><text:s/></text:span></text:p>
      <text:p text:style-name="P20"><text:span text:style-name="T28">gs = GridSearchCV(</text:span></text:p>
      <text:p text:style-name="P20"><text:span text:style-name="T28"><text:s text:c="4"/>estimator <text:s text:c="2"/>= base_model,</text:span></text:p>
      <text:p text:style-name="P20"><text:span text:style-name="T28"><text:s text:c="4"/>param_grid <text:s/>= param_grid,</text:span></text:p>
      <text:p text:style-name="P20"><text:span text:style-name="T28"><text:s text:c="4"/>cv <text:s text:c="9"/>= cv_inner,</text:span></text:p>
      <text:p text:style-name="P20"><text:span text:style-name="T28"><text:s text:c="4"/>scoring <text:s text:c="4"/>= 'f1_macro', <text:s text:c="2"/># ottimizzazione su F1 macro</text:span></text:p>
      <text:p text:style-name="P20"><text:span text:style-name="T28"><text:s text:c="4"/>n_jobs <text:s text:c="5"/>= -1</text:span></text:p>
      <text:p text:style-name="P20"><text:span text:style-name="T28">)</text:span></text:p>
      <text:p text:style-name="P20"><text:span text:style-name="T28">gs.fit(X_tr, y_tr) <text:s text:c="11"/># solo sul training fold</text:span></text:p>
      <text:p text:style-name="P20"><text:span text:style-name="T28">best = gs.best_estimator_</text:span></text:p>
      <text:p text:style-name="P20"><text:span text:style-name="T26">```</text:span></text:p>
      <text:p text:style-name="P6"/>
      <text:p text:style-name="P11"><text:span text:style-name="T21">La metrica di ottimizzazione è </text:span><text:span text:style-name="T22">F1 macro</text:span><text:span text:style-name="T21">, scelta perché bilancia precisione e recall su tutte le classi, incluse le minoritarie (Intenso, Rilassato).</text:span></text:p>
      <text:p text:style-name="P6"/>
      <text:p text:style-name="P23"/>
      <text:h text:style-name="P3" text:outline-level="2"><text:span text:style-name="T2">Decision Tree (DT)</text:span></text:h>
      <text:p text:style-name="P11"><text:span text:style-name="T21">Il </text:span><text:span text:style-name="T22">Decision Tree</text:span><text:span text:style-name="T21"> è stato configurato con criterio di splitting </text:span><text:span text:style-name="T22">Gini</text:span><text:span text:style-name="T21">. La profondità massima è ottimizzata tramite GridSearchCV con 5-fold CV sul training set.</text:span></text:p>
      <text:h text:style-name="P4" text:outline-level="3"><text:span text:style-name="T6">Griglia di iperparametri</text:span></text:h>
      <text:p text:style-name="P20"><text:span text:style-name="T26">```</text:span></text:p>
      <text:p text:style-name="P20"><text:span text:style-name="T28">dt_param_grid = {</text:span></text:p>
      <text:p text:style-name="P20"><text:span text:style-name="T28"><text:s text:c="4"/>"max_depth": [None, 5, 10, 15, 20], <text:s text:c="2"/># profondità massima albero</text:span></text:p>
      <text:p text:style-name="P20"><text:span text:style-name="T28">}</text:span></text:p>
      <text:p text:style-name="P20"><text:span text:style-name="T28"><text:s/></text:span></text:p>
      <text:p text:style-name="P20"><text:span text:style-name="T28"># Parametri fissi:</text:span></text:p>
      <text:p text:style-name="P20"><text:span text:style-name="T28"># criterion = 'gini' <text:s text:c="2"/>(standard per classificazione multiclasse)</text:span></text:p>
      <text:p text:style-name="P20"><text:span text:style-name="T28"># random_state = 42</text:span></text:p>
      <text:p text:style-name="P20"><text:span text:style-name="T26">```</text:span></text:p>
      <text:p text:style-name="P6"/>
      <text:h text:style-name="P4" text:outline-level="3"><text:span text:style-name="T6">Scelta di max_depth</text:span></text:h>
      <text:p text:style-name="P11"><text:span text:style-name="T21">La profondità ottimale è stata determinata tramite validazione incrociata. Osservando la distribuzione di </text:span><text:span text:style-name="T23">max_depth</text:span><text:span text:style-name="T21"> selezionato nei 10 run:</text:span></text:p>
      <table:table table:name="Tabella9" table:style-name="Tabella9">
        <table:table-column table:style-name="Tabella9.A"/>
        <table:table-column table:style-name="Tabella9.B"/>
        <table:table-column table:style-name="Tabella9.C"/>
        <table:table-header-rows>
          <table:table-row table:style-name="Tabella9.1">
            <table:table-cell table:style-name="Tabella9.A1" office:value-type="string">
              <text:p text:style-name="P12"><text:span text:style-name="T24">max_depth</text:span></text:p>
            </table:table-cell>
            <table:table-cell table:style-name="Tabella9.A1" office:value-type="string">
              <text:p text:style-name="P12"><text:span text:style-name="T24">Frequenza su 10 run</text:span></text:p>
            </table:table-cell>
            <table:table-cell table:style-name="Tabella9.A1" office:value-type="string">
              <text:p text:style-name="P12"><text:span text:style-name="T24">Motivazione</text:span></text:p>
            </table:table-cell>
          </table:table-row>
        </table:table-header-rows>
        <table:table-row table:style-name="Tabella9.1">
          <table:table-cell table:style-name="Tabella9.A2" office:value-type="string">
            <text:p text:style-name="P12"><text:span text:style-name="T7">5</text:span></text:p>
          </table:table-cell>
          <table:table-cell table:style-name="Tabella9.A2" office:value-type="string">
            <text:p text:style-name="P7"><text:span text:style-name="T8">6/10</text:span></text:p>
          </table:table-cell>
          <table:table-cell table:style-name="Tabella9.A2" office:value-type="string">
            <text:p text:style-name="P7"><text:span text:style-name="T8">Profondità limitata, buon controllo overfitting con 519 campioni</text:span></text:p>
          </table:table-cell>
        </table:table-row>
        <table:table-row table:style-name="Tabella9.1">
          <table:table-cell table:style-name="Tabella9.A3" office:value-type="string">
            <text:p text:style-name="P7"><text:span text:style-name="T8">None (illimitato)</text:span></text:p>
          </table:table-cell>
          <table:table-cell table:style-name="Tabella9.A3" office:value-type="string">
            <text:p text:style-name="P7"><text:span text:style-name="T8">3/10</text:span></text:p>
          </table:table-cell>
          <table:table-cell table:style-name="Tabella9.A3" office:value-type="string">
            <text:p text:style-name="P7"><text:span text:style-name="T8">Dataset più complesso nel fold specifico</text:span></text:p>
          </table:table-cell>
        </table:table-row>
        <table:table-row table:style-name="Tabella9.1">
          <table:table-cell table:style-name="Tabella9.A2" office:value-type="string">
            <text:p text:style-name="P12"><text:span text:style-name="T8">10</text:span></text:p>
          </table:table-cell>
          <table:table-cell table:style-name="Tabella9.A2" office:value-type="string">
            <text:p text:style-name="P7"><text:span text:style-name="T8">1/10</text:span></text:p>
          </table:table-cell>
          <table:table-cell table:style-name="Tabella9.A2" office:value-type="string">
            <text:p text:style-name="P7"><text:span text:style-name="T8">Caso isolato con partizione più separabile</text:span></text:p>
          </table:table-cell>
        </table:table-row>
      </table:table>
      <text:p text:style-name="P6"/>
      <text:p text:style-name="P11"><text:span text:style-name="T21">La profondità 5 è preferita nella maggioranza dei run: con 519 campioni e 5 classi, alberi profondi tendono all'overfitting. </text:span><text:span text:style-name="T23">max_depth=5</text:span><text:span text:style-name="T21"> rappresenta il miglior compromesso bias-varianza per questo dataset.</text:span></text:p>
      <text:h text:style-name="P4" text:outline-level="3"><text:soft-page-break/><text:span text:style-name="T6">Risultati — DT (raw) vs DT (+OWL)</text:span></text:h>
      <text:p text:style-name="P21"><text:span text:style-name="T27">```</text:span></text:p>
      <text:p text:style-name="P21"><text:span text:style-name="T29">=== Risultati: DecisionTree (raw) ===</text:span></text:p>
      <text:p text:style-name="P21"><text:span text:style-name="T29">Precision macro : 0.454 ± 0.027</text:span></text:p>
      <text:p text:style-name="P21"><text:span text:style-name="T29">Recall macro <text:s text:c="3"/>: 0.447 ± 0.023</text:span></text:p>
      <text:p text:style-name="P21"><text:span text:style-name="T29">F1 macro <text:s text:c="7"/>: 0.442 ± 0.021</text:span></text:p>
      <text:p text:style-name="P21"><text:span text:style-name="T29">G-Mean macro <text:s text:c="3"/>: 0.196 ± 0.208</text:span></text:p>
      <text:p text:style-name="P21"><text:span text:style-name="T27">```</text:span></text:p>
      <text:p text:style-name="P6"/>
      <text:p text:style-name="P21"><text:span text:style-name="T27">```</text:span></text:p>
      <text:p text:style-name="P21"><text:span text:style-name="T29">=== Risultati: DecisionTree (+OWL) ===</text:span></text:p>
      <text:p text:style-name="P21"><text:span text:style-name="T29">Precision macro : 0.447 ± 0.032</text:span></text:p>
      <text:p text:style-name="P21"><text:span text:style-name="T29">Recall macro <text:s text:c="3"/>: 0.445 ± 0.035</text:span></text:p>
      <text:p text:style-name="P21"><text:span text:style-name="T29">F1 macro <text:s text:c="7"/>: 0.438 ± 0.031</text:span></text:p>
      <text:p text:style-name="P21"><text:span text:style-name="T29">G-Mean macro <text:s text:c="3"/>: 0.116 ± 0.187</text:span></text:p>
      <text:p text:style-name="P21"><text:span text:style-name="T27">```</text:span></text:p>
      <text:p text:style-name="P6"/>
      <text:h text:style-name="P4" text:outline-level="3"><text:span text:style-name="T6">F1 per classe — DT (raw), media su 10 run</text:span></text:h>
      <table:table table:name="Tabella10" table:style-name="Tabella10">
        <table:table-column table:style-name="Tabella10.A"/>
        <table:table-column table:style-name="Tabella10.B"/>
        <table:table-column table:style-name="Tabella10.C"/>
        <table:table-column table:style-name="Tabella10.D"/>
        <table:table-header-rows>
          <table:table-row table:style-name="Tabella10.1">
            <table:table-cell table:style-name="Tabella10.A1" office:value-type="string">
              <text:p text:style-name="P12"><text:span text:style-name="T24">Classe</text:span></text:p>
            </table:table-cell>
            <table:table-cell table:style-name="Tabella10.A1" office:value-type="string">
              <text:p text:style-name="P12"><text:span text:style-name="T24">F1 media</text:span></text:p>
            </table:table-cell>
            <table:table-cell table:style-name="Tabella10.A1" office:value-type="string">
              <text:p text:style-name="P12"><text:span text:style-name="T24">F1 std</text:span></text:p>
            </table:table-cell>
            <table:table-cell table:style-name="Tabella10.A1" office:value-type="string">
              <text:p text:style-name="P12"><text:span text:style-name="T24">Osservazione</text:span></text:p>
            </table:table-cell>
          </table:table-row>
        </table:table-header-rows>
        <table:table-row table:style-name="Tabella10.1">
          <table:table-cell table:style-name="Tabella10.A2" office:value-type="string">
            <text:p text:style-name="P7"><text:span text:style-name="T7">Malinconico</text:span></text:p>
          </table:table-cell>
          <table:table-cell table:style-name="Tabella10.A2" office:value-type="string">
            <text:p text:style-name="P12"><text:span text:style-name="T8">0.599</text:span></text:p>
          </table:table-cell>
          <table:table-cell table:style-name="Tabella10.A2" office:value-type="string">
            <text:p text:style-name="P12"><text:span text:style-name="T8">0.047</text:span></text:p>
          </table:table-cell>
          <table:table-cell table:style-name="Tabella10.A2" office:value-type="string">
            <text:p text:style-name="P7"><text:span text:style-name="T8">Classe dominante, buona F1</text:span></text:p>
          </table:table-cell>
        </table:table-row>
        <table:table-row table:style-name="Tabella10.1">
          <table:table-cell table:style-name="Tabella10.A3" office:value-type="string">
            <text:p text:style-name="P7"><text:span text:style-name="T8">GoodVibes</text:span></text:p>
          </table:table-cell>
          <table:table-cell table:style-name="Tabella10.A3" office:value-type="string">
            <text:p text:style-name="P12"><text:span text:style-name="T8">0.475</text:span></text:p>
          </table:table-cell>
          <table:table-cell table:style-name="Tabella10.A3" office:value-type="string">
            <text:p text:style-name="P12"><text:span text:style-name="T8">0.042</text:span></text:p>
          </table:table-cell>
          <table:table-cell table:style-name="Tabella10.A3" office:value-type="string">
            <text:p text:style-name="P7"><text:span text:style-name="T8">Sovrapposizione con OldVibes</text:span></text:p>
          </table:table-cell>
        </table:table-row>
        <table:table-row table:style-name="Tabella10.1">
          <table:table-cell table:style-name="Tabella10.A2" office:value-type="string">
            <text:p text:style-name="P7"><text:span text:style-name="T8">OldVibes</text:span></text:p>
          </table:table-cell>
          <table:table-cell table:style-name="Tabella10.A2" office:value-type="string">
            <text:p text:style-name="P12"><text:span text:style-name="T8">0.485</text:span></text:p>
          </table:table-cell>
          <table:table-cell table:style-name="Tabella10.A2" office:value-type="string">
            <text:p text:style-name="P12"><text:span text:style-name="T8">0.086</text:span></text:p>
          </table:table-cell>
          <table:table-cell table:style-name="Tabella10.A2" office:value-type="string">
            <text:p text:style-name="P7"><text:span text:style-name="T8">Alta variabilità tra run</text:span></text:p>
          </table:table-cell>
        </table:table-row>
        <table:table-row table:style-name="Tabella10.1">
          <table:table-cell table:style-name="Tabella10.A3" office:value-type="string">
            <text:p text:style-name="P7"><text:span text:style-name="T8">Intenso</text:span></text:p>
          </table:table-cell>
          <table:table-cell table:style-name="Tabella10.A3" office:value-type="string">
            <text:p text:style-name="P12"><text:span text:style-name="T8">0.567</text:span></text:p>
          </table:table-cell>
          <table:table-cell table:style-name="Tabella10.A3" office:value-type="string">
            <text:p text:style-name="P12"><text:span text:style-name="T8">0.053</text:span></text:p>
          </table:table-cell>
          <table:table-cell table:style-name="Tabella10.A3" office:value-type="string">
            <text:p text:style-name="P7"><text:span text:style-name="T8">Buona separabilità per alta energia</text:span></text:p>
          </table:table-cell>
        </table:table-row>
        <table:table-row table:style-name="Tabella10.1">
          <table:table-cell table:style-name="Tabella10.A2" office:value-type="string">
            <text:p text:style-name="P7"><text:span text:style-name="T8">Rilassato</text:span></text:p>
          </table:table-cell>
          <table:table-cell table:style-name="Tabella10.A2" office:value-type="string">
            <text:p text:style-name="P12"><text:span text:style-name="T8">0.084</text:span></text:p>
          </table:table-cell>
          <table:table-cell table:style-name="Tabella10.A2" office:value-type="string">
            <text:p text:style-name="P12"><text:span text:style-name="T8">0.105</text:span></text:p>
          </table:table-cell>
          <table:table-cell table:style-name="Tabella10.A2" office:value-type="string">
            <text:p text:style-name="P7"><text:span text:style-name="T8">Classe minoritaria (7.9%), spesso ignorata</text:span></text:p>
          </table:table-cell>
        </table:table-row>
      </table:table>
      <text:p text:style-name="P6"/>
      <text:h text:style-name="P4" text:outline-level="3"><text:span text:style-name="T6">Valutazione generale</text:span></text:h>
      <text:p text:style-name="P11"><text:span text:style-name="T21">Il Decision Tree mostra performance moderate. La classe </text:span><text:span text:style-name="T22">Rilassato</text:span><text:span text:style-name="T21"> (F1=0.084) è quasi sempre ignorata dal modello, che la confonde frequentemente con Malinconico per via della sovrapposizione nelle feature </text:span><text:span text:style-name="T23">valence</text:span><text:span text:style-name="T21"> e </text:span><text:span text:style-name="T23">energy</text:span><text:span text:style-name="T21">. L'aggiunta delle feature OWL non migliora significativamente (F1: 0.442 → 0.438): il singolo albero non riesce a sfruttare la dimensionalità aggiuntiva senza rischio di overfitting.</text:span></text:p>
      <text:p text:style-name="P23"/>
      <text:h text:style-name="P3" text:outline-level="2"><text:span text:style-name="T2">Random Forest (RF)</text:span></text:h>
      <text:p text:style-name="P11"><text:span text:style-name="T21">Il </text:span><text:span text:style-name="T22">Random Forest</text:span><text:span text:style-name="T21"> è un ensemble di alberi decisionali addestrati su sottocampioni del dataset con feature casuali. Riduce la varianza rispetto al singolo DT tramite averaging delle predizioni.</text:span></text:p>
      <text:h text:style-name="P4" text:outline-level="3"><text:span text:style-name="T6">Parametri e motivazione</text:span></text:h>
      <text:p text:style-name="P20"><text:span text:style-name="T26">```</text:span></text:p>
      <text:p text:style-name="P20"><text:span text:style-name="T28">rf_params = {</text:span></text:p>
      <text:p text:style-name="P20"><text:span text:style-name="T28"><text:s text:c="4"/>'n_estimators' : 200, <text:s text:c="6"/># 200 alberi: convergenza OOB verificata</text:span></text:p>
      <text:p text:style-name="P20"><text:span text:style-name="T28"><text:s text:c="4"/>'max_features' : 'sqrt', <text:s text:c="3"/># sqrt(n_features): standard per classificazione</text:span></text:p>
      <text:p text:style-name="P20"><text:span text:style-name="T28"><text:s text:c="4"/>'n_jobs' <text:s text:c="6"/>: -1, <text:s text:c="7"/># parallelizzazione su tutti i core</text:span></text:p>
      <text:p text:style-name="P20"><text:span text:style-name="T28"><text:s text:c="4"/>'random_state' : 42</text:span></text:p>
      <text:p text:style-name="P20"><text:span text:style-name="T28">}</text:span></text:p>
      <text:p text:style-name="P20"><text:span text:style-name="T26">```</text:span></text:p>
      <text:p text:style-name="P6"/>
      <text:h text:style-name="P4" text:outline-level="3"><text:span text:style-name="T6">Analisi convergenza OOB</text:span></text:h>
      <text:p text:style-name="P11"><text:span text:style-name="T21">Per determinare il numero ottimale di stimatori, è stato analizzato l'</text:span><text:span text:style-name="T22">errore Out-of-Bag (OOB)</text:span><text:span text:style-name="T21"> al variare di </text:span><text:span text:style-name="T23">n_estimators</text:span><text:span text:style-name="T21">. L'OOB utilizza i campioni non inclusi in ogni bootstrap come validation set interno:</text:span></text:p>
      <table:table table:name="Tabella11" table:style-name="Tabella11">
        <table:table-column table:style-name="Tabella11.A"/>
        <table:table-column table:style-name="Tabella11.B"/>
        <table:table-column table:style-name="Tabella11.C"/>
        <table:table-header-rows>
          <text:soft-page-break/>
          <table:table-row table:style-name="Tabella11.1">
            <table:table-cell table:style-name="Tabella11.A1" office:value-type="string">
              <text:p text:style-name="P12"><text:span text:style-name="T24">n_estimators</text:span></text:p>
            </table:table-cell>
            <table:table-cell table:style-name="Tabella11.A1" office:value-type="string">
              <text:p text:style-name="P12"><text:span text:style-name="T24">OOB Accuracy</text:span></text:p>
            </table:table-cell>
            <table:table-cell table:style-name="Tabella11.A1" office:value-type="string">
              <text:p text:style-name="P12"><text:span text:style-name="T24">Variazione rispetto a n-1</text:span></text:p>
            </table:table-cell>
          </table:table-row>
        </table:table-header-rows>
        <table:table-row table:style-name="Tabella11.1">
          <table:table-cell table:style-name="Tabella11.A2" office:value-type="string">
            <text:p text:style-name="P12"><text:span text:style-name="T7">10</text:span></text:p>
          </table:table-cell>
          <table:table-cell table:style-name="Tabella11.A2" office:value-type="string">
            <text:p text:style-name="P12"><text:span text:style-name="T8">0.449</text:span></text:p>
          </table:table-cell>
          <table:table-cell table:style-name="Tabella11.A2" office:value-type="string">
            <text:p text:style-name="P12"><text:span text:style-name="T8">-</text:span></text:p>
          </table:table-cell>
        </table:table-row>
        <table:table-row table:style-name="Tabella11.1">
          <table:table-cell table:style-name="Tabella11.A3" office:value-type="string">
            <text:p text:style-name="P12"><text:span text:style-name="T8">50</text:span></text:p>
          </table:table-cell>
          <table:table-cell table:style-name="Tabella11.A3" office:value-type="string">
            <text:p text:style-name="P12"><text:span text:style-name="T8">0.507</text:span></text:p>
          </table:table-cell>
          <table:table-cell table:style-name="Tabella11.A3" office:value-type="string">
            <text:p text:style-name="P7"><text:span text:style-name="T8">+5.8%</text:span></text:p>
          </table:table-cell>
        </table:table-row>
        <table:table-row table:style-name="Tabella11.1">
          <table:table-cell table:style-name="Tabella11.A2" office:value-type="string">
            <text:p text:style-name="P12"><text:span text:style-name="T8">100</text:span></text:p>
          </table:table-cell>
          <table:table-cell table:style-name="Tabella11.A2" office:value-type="string">
            <text:p text:style-name="P12"><text:span text:style-name="T8">0.534</text:span></text:p>
          </table:table-cell>
          <table:table-cell table:style-name="Tabella11.A2" office:value-type="string">
            <text:p text:style-name="P7"><text:span text:style-name="T8">+2.7%</text:span></text:p>
          </table:table-cell>
        </table:table-row>
        <table:table-row table:style-name="Tabella11.1">
          <table:table-cell table:style-name="Tabella11.A3" office:value-type="string">
            <text:p text:style-name="P12"><text:span text:style-name="T8">150</text:span></text:p>
          </table:table-cell>
          <table:table-cell table:style-name="Tabella11.A3" office:value-type="string">
            <text:p text:style-name="P12"><text:span text:style-name="T8">0.548</text:span></text:p>
          </table:table-cell>
          <table:table-cell table:style-name="Tabella11.A3" office:value-type="string">
            <text:p text:style-name="P7"><text:span text:style-name="T8">+1.4%</text:span></text:p>
          </table:table-cell>
        </table:table-row>
        <table:table-row table:style-name="Tabella11.1">
          <table:table-cell table:style-name="Tabella11.A2" office:value-type="string">
            <text:p text:style-name="P12"><text:span text:style-name="T8">200</text:span></text:p>
          </table:table-cell>
          <table:table-cell table:style-name="Tabella11.A2" office:value-type="string">
            <text:p text:style-name="P12"><text:span text:style-name="T8">0.568</text:span></text:p>
          </table:table-cell>
          <table:table-cell table:style-name="Tabella11.A2" office:value-type="string">
            <text:p text:style-name="P7"><text:span text:style-name="T8">+2.0%</text:span></text:p>
          </table:table-cell>
        </table:table-row>
        <table:table-row table:style-name="Tabella11.1">
          <table:table-cell table:style-name="Tabella11.A3" office:value-type="string">
            <text:p text:style-name="P12"><text:span text:style-name="T8">300</text:span></text:p>
          </table:table-cell>
          <table:table-cell table:style-name="Tabella11.A3" office:value-type="string">
            <text:p text:style-name="P12"><text:span text:style-name="T8">0.579</text:span></text:p>
          </table:table-cell>
          <table:table-cell table:style-name="Tabella11.A3" office:value-type="string">
            <text:p text:style-name="P7"><text:span text:style-name="T8">+1.1%</text:span></text:p>
          </table:table-cell>
        </table:table-row>
      </table:table>
      <text:p text:style-name="P6"/>
      <text:p text:style-name="P11"><text:span text:style-name="T21">L'OOB accuracy cresce rapidamente fino a n=100 e poi si stabilizza. La scelta di </text:span><text:span text:style-name="T22">n=200</text:span><text:span text:style-name="T21"> rappresenta un buon equilibrio tra accuratezza OOB e costo computazionale: l'incremento da 200 a 300 è solo +1.1%, non giustificando il costo aggiuntivo.</text:span></text:p>
      <text:h text:style-name="P4" text:outline-level="3"><text:span text:style-name="T6">Risultati — RF (raw) vs RF (+OWL)</text:span></text:h>
      <text:p text:style-name="P21"><text:span text:style-name="T27">```</text:span></text:p>
      <text:p text:style-name="P21"><text:span text:style-name="T29">=== Risultati: RandomForest (raw) ===</text:span></text:p>
      <text:p text:style-name="P21"><text:span text:style-name="T29">Precision macro : 0.528 ± 0.047</text:span></text:p>
      <text:p text:style-name="P21"><text:span text:style-name="T29">Recall macro <text:s text:c="3"/>: 0.526 ± 0.037</text:span></text:p>
      <text:p text:style-name="P21"><text:span text:style-name="T29">F1 macro <text:s text:c="7"/>: 0.519 ± 0.038</text:span></text:p>
      <text:p text:style-name="P21"><text:span text:style-name="T29">G-Mean macro <text:s text:c="3"/>: 0.221 ± 0.234</text:span></text:p>
      <text:p text:style-name="P21"><text:span text:style-name="T27">```</text:span></text:p>
      <text:p text:style-name="P6"/>
      <text:p text:style-name="P21"><text:span text:style-name="T27">```</text:span></text:p>
      <text:p text:style-name="P21"><text:span text:style-name="T29">=== Risultati: RandomForest (+OWL) ===</text:span></text:p>
      <text:p text:style-name="P21"><text:span text:style-name="T29">Precision macro : 0.545 ± 0.074</text:span></text:p>
      <text:p text:style-name="P21"><text:span text:style-name="T29">Recall macro <text:s text:c="3"/>: 0.531 ± 0.034</text:span></text:p>
      <text:p text:style-name="P21"><text:span text:style-name="T29">F1 macro <text:s text:c="7"/>: 0.524 ± 0.037</text:span></text:p>
      <text:p text:style-name="P21"><text:span text:style-name="T29">G-Mean macro <text:s text:c="3"/>: 0.191 ± 0.248</text:span></text:p>
      <text:p text:style-name="P21"><text:span text:style-name="T27">```</text:span></text:p>
      <text:p text:style-name="P6"/>
      <text:h text:style-name="P4" text:outline-level="3"><text:span text:style-name="T6">F1 per classe — RF (raw), media su 10 run</text:span></text:h>
      <table:table table:name="Tabella12" table:style-name="Tabella12">
        <table:table-column table:style-name="Tabella12.A"/>
        <table:table-column table:style-name="Tabella12.B"/>
        <table:table-column table:style-name="Tabella12.C"/>
        <table:table-column table:style-name="Tabella12.D"/>
        <table:table-header-rows>
          <table:table-row table:style-name="Tabella12.1">
            <table:table-cell table:style-name="Tabella12.A1" office:value-type="string">
              <text:p text:style-name="P12"><text:span text:style-name="T24">Classe</text:span></text:p>
            </table:table-cell>
            <table:table-cell table:style-name="Tabella12.A1" office:value-type="string">
              <text:p text:style-name="P12"><text:span text:style-name="T24">F1 media</text:span></text:p>
            </table:table-cell>
            <table:table-cell table:style-name="Tabella12.A1" office:value-type="string">
              <text:p text:style-name="P12"><text:span text:style-name="T24">F1 std</text:span></text:p>
            </table:table-cell>
            <table:table-cell table:style-name="Tabella12.A1" office:value-type="string">
              <text:p text:style-name="P12"><text:span text:style-name="T24">Confronto con DT</text:span></text:p>
            </table:table-cell>
          </table:table-row>
        </table:table-header-rows>
        <table:table-row table:style-name="Tabella12.1">
          <table:table-cell table:style-name="Tabella12.A2" office:value-type="string">
            <text:p text:style-name="P7"><text:span text:style-name="T7">Malinconico</text:span></text:p>
          </table:table-cell>
          <table:table-cell table:style-name="Tabella12.A2" office:value-type="string">
            <text:p text:style-name="P12"><text:span text:style-name="T8">0.707</text:span></text:p>
          </table:table-cell>
          <table:table-cell table:style-name="Tabella12.A2" office:value-type="string">
            <text:p text:style-name="P12"><text:span text:style-name="T8">0.032</text:span></text:p>
          </table:table-cell>
          <table:table-cell table:style-name="Tabella12.A2" office:value-type="string">
            <text:p text:style-name="P7"><text:span text:style-name="T8">+10.8% vs DT</text:span></text:p>
          </table:table-cell>
        </table:table-row>
        <table:table-row table:style-name="Tabella12.1">
          <table:table-cell table:style-name="Tabella12.A3" office:value-type="string">
            <text:p text:style-name="P7"><text:span text:style-name="T8">GoodVibes</text:span></text:p>
          </table:table-cell>
          <table:table-cell table:style-name="Tabella12.A3" office:value-type="string">
            <text:p text:style-name="P12"><text:span text:style-name="T8">0.548</text:span></text:p>
          </table:table-cell>
          <table:table-cell table:style-name="Tabella12.A3" office:value-type="string">
            <text:p text:style-name="P12"><text:span text:style-name="T8">0.037</text:span></text:p>
          </table:table-cell>
          <table:table-cell table:style-name="Tabella12.A3" office:value-type="string">
            <text:p text:style-name="P7"><text:span text:style-name="T8">+7.3% vs DT</text:span></text:p>
          </table:table-cell>
        </table:table-row>
        <table:table-row table:style-name="Tabella12.1">
          <table:table-cell table:style-name="Tabella12.A2" office:value-type="string">
            <text:p text:style-name="P7"><text:span text:style-name="T8">OldVibes</text:span></text:p>
          </table:table-cell>
          <table:table-cell table:style-name="Tabella12.A2" office:value-type="string">
            <text:p text:style-name="P12"><text:span text:style-name="T8">0.611</text:span></text:p>
          </table:table-cell>
          <table:table-cell table:style-name="Tabella12.A2" office:value-type="string">
            <text:p text:style-name="P12"><text:span text:style-name="T8">0.065</text:span></text:p>
          </table:table-cell>
          <table:table-cell table:style-name="Tabella12.A2" office:value-type="string">
            <text:p text:style-name="P7"><text:span text:style-name="T8">+12.6% vs DT</text:span></text:p>
          </table:table-cell>
        </table:table-row>
        <table:table-row table:style-name="Tabella12.1">
          <table:table-cell table:style-name="Tabella12.A3" office:value-type="string">
            <text:p text:style-name="P7"><text:span text:style-name="T8">Intenso</text:span></text:p>
          </table:table-cell>
          <table:table-cell table:style-name="Tabella12.A3" office:value-type="string">
            <text:p text:style-name="P12"><text:span text:style-name="T8">0.658</text:span></text:p>
          </table:table-cell>
          <table:table-cell table:style-name="Tabella12.A3" office:value-type="string">
            <text:p text:style-name="P12"><text:span text:style-name="T8">0.049</text:span></text:p>
          </table:table-cell>
          <table:table-cell table:style-name="Tabella12.A3" office:value-type="string">
            <text:p text:style-name="P7"><text:span text:style-name="T8">+9.1% vs DT</text:span></text:p>
          </table:table-cell>
        </table:table-row>
        <table:table-row table:style-name="Tabella12.1">
          <table:table-cell table:style-name="Tabella12.A2" office:value-type="string">
            <text:p text:style-name="P7"><text:span text:style-name="T8">Rilassato</text:span></text:p>
          </table:table-cell>
          <table:table-cell table:style-name="Tabella12.A2" office:value-type="string">
            <text:p text:style-name="P12"><text:span text:style-name="T8">0.071</text:span></text:p>
          </table:table-cell>
          <table:table-cell table:style-name="Tabella12.A2" office:value-type="string">
            <text:p text:style-name="P12"><text:span text:style-name="T8">0.078</text:span></text:p>
          </table:table-cell>
          <table:table-cell table:style-name="Tabella12.A2" office:value-type="string">
            <text:p text:style-name="P7"><text:span text:style-name="T8">−1.3% vs DT (ancora critica)</text:span></text:p>
          </table:table-cell>
        </table:table-row>
      </table:table>
      <text:p text:style-name="P6"/>
      <text:h text:style-name="P4" text:outline-level="3"><text:span text:style-name="T6">Valutazione generale</text:span></text:h>
      <text:p text:style-name="P11"><text:span text:style-name="T21">Il Random Forest supera il Decision Tree in tutte le classi eccetto Rilassato. L'averaging riduce la varianza, producendo stime più stabili (std F1: 0.038 vs 0.021). L'aggiunta della BK OWL porta un lieve miglioramento di F1 (+0.005), ma il G-Mean peggiora leggermente (0.221 → 0.191): RF apprende già internamente soglie simili ai concetti OWL tramite i propri split, rendendo la BK parzialmente ridondante per questo modello.</text:span></text:p>
      <text:p text:style-name="P23"/>
      <text:h text:style-name="P3" text:outline-level="2"><text:span text:style-name="T2">Logistic Regression (LR)</text:span></text:h>
      <text:p text:style-name="P11"><text:span text:style-name="T21">La </text:span><text:span text:style-name="T22">Logistic Regression multinomiale</text:span><text:span text:style-name="T21"> apprende un confine di decisione lineare nello spazio delle feature. Utilizza il solver </text:span><text:span text:style-name="T23">lbfgs</text:span><text:span text:style-name="T21">, adatto per problemi multiclasse con dataset di dimensione media.</text:span></text:p>
      <text:h text:style-name="P4" text:outline-level="3"><text:soft-page-break/><text:span text:style-name="T6">Griglia di iperparametri — parametro C</text:span></text:h>
      <text:p text:style-name="P11"><text:span text:style-name="T21">Il parametro </text:span><text:span text:style-name="T22">C</text:span><text:span text:style-name="T21"> (inverso della forza di regolarizzazione L2) è stato ottimizzato tramite GridSearchCV:</text:span></text:p>
      <text:p text:style-name="P20"><text:span text:style-name="T26">```</text:span></text:p>
      <text:p text:style-name="P20"><text:span text:style-name="T28">lr_param_grid = {</text:span></text:p>
      <text:p text:style-name="P20"><text:span text:style-name="T28"><text:s text:c="4"/>'C': [0.01, 0.1, 1.0, 10.0]</text:span></text:p>
      <text:p text:style-name="P20"><text:span text:style-name="T28">}</text:span></text:p>
      <text:p text:style-name="P20"><text:span text:style-name="T28"><text:s/></text:span></text:p>
      <text:p text:style-name="P20"><text:span text:style-name="T28"># Parametri fissi:</text:span></text:p>
      <text:p text:style-name="P20"><text:span text:style-name="T28"># solver <text:s text:c="4"/>= 'lbfgs' <text:s text:c="2"/>(efficiente per multiclasse)</text:span></text:p>
      <text:p text:style-name="P20"><text:span text:style-name="T28"># max_iter <text:s text:c="2"/>= 1000 <text:s text:c="5"/>(convergenza garantita)</text:span></text:p>
      <text:p text:style-name="P20"><text:span text:style-name="T28"># random_state = 42</text:span></text:p>
      <text:p text:style-name="P20"><text:span text:style-name="T26">```</text:span></text:p>
      <text:p text:style-name="P6"/>
      <text:h text:style-name="P4" text:outline-level="3"><text:span text:style-name="T6">Sensitivity analysis — parametro C</text:span></text:h>
      <text:p text:style-name="P11"><text:span text:style-name="T21">La tabella seguente mostra l'effetto di C sulla F1 macro (10 run su X_all):</text:span></text:p>
      <table:table table:name="Tabella13" table:style-name="Tabella13">
        <table:table-column table:style-name="Tabella13.A"/>
        <table:table-column table:style-name="Tabella13.B"/>
        <table:table-column table:style-name="Tabella13.C"/>
        <table:table-column table:style-name="Tabella13.D"/>
        <table:table-header-rows>
          <table:table-row table:style-name="Tabella13.1">
            <table:table-cell table:style-name="Tabella13.A1" office:value-type="string">
              <text:p text:style-name="P12"><text:span text:style-name="T24">C</text:span></text:p>
            </table:table-cell>
            <table:table-cell table:style-name="Tabella13.A1" office:value-type="string">
              <text:p text:style-name="P12"><text:span text:style-name="T24">F1 macro media</text:span></text:p>
            </table:table-cell>
            <table:table-cell table:style-name="Tabella13.A1" office:value-type="string">
              <text:p text:style-name="P12"><text:span text:style-name="T24">F1 std</text:span></text:p>
            </table:table-cell>
            <table:table-cell table:style-name="Tabella13.A1" office:value-type="string">
              <text:p text:style-name="P12"><text:span text:style-name="T24">Effetto</text:span></text:p>
            </table:table-cell>
          </table:table-row>
        </table:table-header-rows>
        <table:table-row table:style-name="Tabella13.1">
          <table:table-cell table:style-name="Tabella13.A2" office:value-type="string">
            <text:p text:style-name="P12"><text:span text:style-name="T7">0.01</text:span></text:p>
          </table:table-cell>
          <table:table-cell table:style-name="Tabella13.A2" office:value-type="string">
            <text:p text:style-name="P12"><text:span text:style-name="T8">0.311</text:span></text:p>
          </table:table-cell>
          <table:table-cell table:style-name="Tabella13.A2" office:value-type="string">
            <text:p text:style-name="P12"><text:span text:style-name="T8">0.037</text:span></text:p>
          </table:table-cell>
          <table:table-cell table:style-name="Tabella13.A2" office:value-type="string">
            <text:p text:style-name="P7"><text:span text:style-name="T8">Eccessiva regolarizzazione, underfitting</text:span></text:p>
          </table:table-cell>
        </table:table-row>
        <table:table-row table:style-name="Tabella13.1">
          <table:table-cell table:style-name="Tabella13.A3" office:value-type="string">
            <text:p text:style-name="P12"><text:span text:style-name="T8">0.1</text:span></text:p>
          </table:table-cell>
          <table:table-cell table:style-name="Tabella13.A3" office:value-type="string">
            <text:p text:style-name="P12"><text:span text:style-name="T8">0.454</text:span></text:p>
          </table:table-cell>
          <table:table-cell table:style-name="Tabella13.A3" office:value-type="string">
            <text:p text:style-name="P12"><text:span text:style-name="T8">0.032</text:span></text:p>
          </table:table-cell>
          <table:table-cell table:style-name="Tabella13.A3" office:value-type="string">
            <text:p text:style-name="P7"><text:span text:style-name="T8">Miglioramento significativo</text:span></text:p>
          </table:table-cell>
        </table:table-row>
        <table:table-row table:style-name="Tabella13.1">
          <table:table-cell table:style-name="Tabella13.A2" office:value-type="string">
            <text:p text:style-name="P12"><text:span text:style-name="T8">1.0</text:span></text:p>
          </table:table-cell>
          <table:table-cell table:style-name="Tabella13.A2" office:value-type="string">
            <text:p text:style-name="P12"><text:span text:style-name="T8">0.491</text:span></text:p>
          </table:table-cell>
          <table:table-cell table:style-name="Tabella13.A2" office:value-type="string">
            <text:p text:style-name="P12"><text:span text:style-name="T8">0.039</text:span></text:p>
          </table:table-cell>
          <table:table-cell table:style-name="Tabella13.A2" office:value-type="string">
            <text:p text:style-name="P7"><text:span text:style-name="T8">Buon compromesso bias-varianza</text:span></text:p>
          </table:table-cell>
        </table:table-row>
        <table:table-row table:style-name="Tabella13.1">
          <table:table-cell table:style-name="Tabella13.A3" office:value-type="string">
            <text:p text:style-name="P12"><text:span text:style-name="T8">10.0</text:span></text:p>
          </table:table-cell>
          <table:table-cell table:style-name="Tabella13.A3" office:value-type="string">
            <text:p text:style-name="P12"><text:span text:style-name="T8">0.536</text:span></text:p>
          </table:table-cell>
          <table:table-cell table:style-name="Tabella13.A3" office:value-type="string">
            <text:p text:style-name="P12"><text:span text:style-name="T8">0.034</text:span></text:p>
          </table:table-cell>
          <table:table-cell table:style-name="Tabella13.A3" office:value-type="string">
            <text:p text:style-name="P7"><text:span text:style-name="T8">Migliore su questo dataset</text:span></text:p>
          </table:table-cell>
        </table:table-row>
      </table:table>
      <text:p text:style-name="P6"/>
      <text:p text:style-name="P11"><text:span text:style-name="T21">C=10 è sistematicamente il valore ottimale su tutti i 10 run, indicando che il dataset non soffre di overfitting con regolarizzazione debole. Questo è coerente con la piccola dimensione del dataset (519 campioni): la LR con poca regolarizzazione riesce a sfruttare meglio la complessità delle feature.</text:span></text:p>
      <text:h text:style-name="P4" text:outline-level="3"><text:span text:style-name="T6">Risultati — LR (raw) vs LR (+OWL)</text:span></text:h>
      <text:p text:style-name="P21"><text:span text:style-name="T27">```</text:span></text:p>
      <text:p text:style-name="P21"><text:span text:style-name="T29">=== Risultati: LogisticRegression (raw) ===</text:span></text:p>
      <text:p text:style-name="P21"><text:span text:style-name="T29">Precision macro : 0.561 ± 0.069</text:span></text:p>
      <text:p text:style-name="P21"><text:span text:style-name="T29">Recall macro <text:s text:c="3"/>: 0.529 ± 0.034</text:span></text:p>
      <text:p text:style-name="P21"><text:span text:style-name="T29">F1 macro <text:s text:c="7"/>: 0.522 ± 0.037</text:span></text:p>
      <text:p text:style-name="P21"><text:span text:style-name="T29">G-Mean macro <text:s text:c="3"/>: 0.315 ± 0.221</text:span></text:p>
      <text:p text:style-name="P21"><text:span text:style-name="T27">```</text:span></text:p>
      <text:p text:style-name="P6"/>
      <text:p text:style-name="P21"><text:span text:style-name="T27">```</text:span></text:p>
      <text:p text:style-name="P21"><text:span text:style-name="T29">=== Risultati: LogisticRegression (+OWL) === <text:s/>[MIGLIOR MODELLO]</text:span></text:p>
      <text:p text:style-name="P21"><text:span text:style-name="T29">Precision macro : 0.544 ± 0.041</text:span></text:p>
      <text:p text:style-name="P21"><text:span text:style-name="T29">Recall macro <text:s text:c="3"/>: 0.538 ± 0.035</text:span></text:p>
      <text:p text:style-name="P21"><text:span text:style-name="T29">F1 macro <text:s text:c="7"/>: 0.536 ± 0.034</text:span></text:p>
      <text:p text:style-name="P21"><text:span text:style-name="T29">G-Mean macro <text:s text:c="3"/>: 0.434 ± 0.158</text:span></text:p>
      <text:p text:style-name="P21"><text:span text:style-name="T27">```</text:span></text:p>
      <text:p text:style-name="P6"/>
      <text:h text:style-name="P4" text:outline-level="3"><text:span text:style-name="T6">F1 per classe — LR (+OWL), media su 10 run</text:span></text:h>
      <table:table table:name="Tabella14" table:style-name="Tabella14">
        <table:table-column table:style-name="Tabella14.A"/>
        <table:table-column table:style-name="Tabella14.B"/>
        <table:table-column table:style-name="Tabella14.C"/>
        <table:table-column table:style-name="Tabella14.D"/>
        <table:table-header-rows>
          <table:table-row table:style-name="Tabella14.1">
            <table:table-cell table:style-name="Tabella14.A1" office:value-type="string">
              <text:p text:style-name="P12"><text:span text:style-name="T24">Classe</text:span></text:p>
            </table:table-cell>
            <table:table-cell table:style-name="Tabella14.A1" office:value-type="string">
              <text:p text:style-name="P12"><text:span text:style-name="T24">F1 media</text:span></text:p>
            </table:table-cell>
            <table:table-cell table:style-name="Tabella14.A1" office:value-type="string">
              <text:p text:style-name="P12"><text:span text:style-name="T24">F1 std</text:span></text:p>
            </table:table-cell>
            <table:table-cell table:style-name="Tabella14.A1" office:value-type="string">
              <text:p text:style-name="P12"><text:span text:style-name="T24">Confronto con LR(raw)</text:span></text:p>
            </table:table-cell>
          </table:table-row>
        </table:table-header-rows>
        <table:table-row table:style-name="Tabella14.1">
          <table:table-cell table:style-name="Tabella14.A2" office:value-type="string">
            <text:p text:style-name="P7"><text:span text:style-name="T7">Malinconico</text:span></text:p>
          </table:table-cell>
          <table:table-cell table:style-name="Tabella14.A2" office:value-type="string">
            <text:p text:style-name="P12"><text:span text:style-name="T8">0.694</text:span></text:p>
          </table:table-cell>
          <table:table-cell table:style-name="Tabella14.A2" office:value-type="string">
            <text:p text:style-name="P12"><text:span text:style-name="T8">0.051</text:span></text:p>
          </table:table-cell>
          <table:table-cell table:style-name="Tabella14.A2" office:value-type="string">
            <text:p text:style-name="P7"><text:span text:style-name="T8">+0.6% vs LR(raw)</text:span></text:p>
          </table:table-cell>
        </table:table-row>
        <table:table-row table:style-name="Tabella14.1">
          <table:table-cell table:style-name="Tabella14.A3" office:value-type="string">
            <text:p text:style-name="P7"><text:span text:style-name="T8">GoodVibes</text:span></text:p>
          </table:table-cell>
          <table:table-cell table:style-name="Tabella14.A3" office:value-type="string">
            <text:p text:style-name="P12"><text:span text:style-name="T8">0.552</text:span></text:p>
          </table:table-cell>
          <table:table-cell table:style-name="Tabella14.A3" office:value-type="string">
            <text:p text:style-name="P12"><text:span text:style-name="T8">0.070</text:span></text:p>
          </table:table-cell>
          <table:table-cell table:style-name="Tabella14.A3" office:value-type="string">
            <text:p text:style-name="P7"><text:span text:style-name="T8">-2.3% vs LR(raw)</text:span></text:p>
          </table:table-cell>
        </table:table-row>
        <table:table-row table:style-name="Tabella14.1">
          <table:table-cell table:style-name="Tabella14.A2" office:value-type="string">
            <text:p text:style-name="P7"><text:span text:style-name="T8">OldVibes</text:span></text:p>
          </table:table-cell>
          <table:table-cell table:style-name="Tabella14.A2" office:value-type="string">
            <text:p text:style-name="P12"><text:span text:style-name="T8">0.606</text:span></text:p>
          </table:table-cell>
          <table:table-cell table:style-name="Tabella14.A2" office:value-type="string">
            <text:p text:style-name="P12"><text:span text:style-name="T8">0.075</text:span></text:p>
          </table:table-cell>
          <table:table-cell table:style-name="Tabella14.A2" office:value-type="string">
            <text:p text:style-name="P7"><text:span text:style-name="T8">+1.0% vs LR(raw)</text:span></text:p>
          </table:table-cell>
        </table:table-row>
        <table:table-row table:style-name="Tabella14.1">
          <table:table-cell table:style-name="Tabella14.A3" office:value-type="string">
            <text:p text:style-name="P7"><text:span text:style-name="T8">Intenso</text:span></text:p>
          </table:table-cell>
          <table:table-cell table:style-name="Tabella14.A3" office:value-type="string">
            <text:p text:style-name="P12"><text:span text:style-name="T8">0.619</text:span></text:p>
          </table:table-cell>
          <table:table-cell table:style-name="Tabella14.A3" office:value-type="string">
            <text:p text:style-name="P12"><text:span text:style-name="T8">0.034</text:span></text:p>
          </table:table-cell>
          <table:table-cell table:style-name="Tabella14.A3" office:value-type="string">
            <text:p text:style-name="P7"><text:span text:style-name="T8">+1.1% vs LR(raw)</text:span></text:p>
          </table:table-cell>
        </table:table-row>
        <table:table-row table:style-name="Tabella14.1">
          <table:table-cell table:style-name="Tabella14.A2" office:value-type="string">
            <text:p text:style-name="P7"><text:span text:style-name="T8">Rilassato</text:span></text:p>
          </table:table-cell>
          <table:table-cell table:style-name="Tabella14.A2" office:value-type="string">
            <text:p text:style-name="P12"><text:span text:style-name="T8">0.207</text:span></text:p>
          </table:table-cell>
          <table:table-cell table:style-name="Tabella14.A2" office:value-type="string">
            <text:p text:style-name="P12"><text:span text:style-name="T8">0.101</text:span></text:p>
          </table:table-cell>
          <table:table-cell table:style-name="Tabella14.A2" office:value-type="string">
            <text:p text:style-name="P7"><text:span text:style-name="T8">+6.6% vs LR(raw) ← impatto OWL</text:span></text:p>
          </table:table-cell>
        </table:table-row>
      </table:table>
      <text:p text:style-name="P6"/>
      <text:h text:style-name="P4" text:outline-level="3"><text:soft-page-break/><text:span text:style-name="T6">Valutazione generale</text:span></text:h>
      <text:p text:style-name="P11"><text:span text:style-name="T21">La Logistic Regression con feature +OWL è il </text:span><text:span text:style-name="T22">modello più performante</text:span><text:span text:style-name="T21"> nell'intera valutazione. L'impatto della BK si manifesta principalmente sulla classe </text:span><text:span text:style-name="T22">Rilassato</text:span><text:span text:style-name="T21">: F1 passa da 0.141 (LR raw) a 0.207 (+6.6%), e il G-Mean macro da 0.315 a </text:span><text:span text:style-name="T22">0.434</text:span><text:span text:style-name="T21"> (+11.9%). I concetti OWL </text:span><text:span text:style-name="T23">Acoustic</text:span><text:span text:style-name="T21">, </text:span><text:span text:style-name="T23">MellowAcoustic</text:span><text:span text:style-name="T21"> e </text:span><text:span text:style-name="T23">AcousticSlow</text:span><text:span text:style-name="T21"> codificano esattamente le caratteristiche acustiche tipiche della musica italiana rilassata, fornendo alla LR un confine di decisione più preciso per questa classe minoritaria.</text:span></text:p>
      <text:h text:style-name="P3" text:outline-level="2"><text:span text:style-name="T2">Conclusioni — Apprendimento Supervisionato</text:span></text:h>
      <text:p text:style-name="P11"><text:span text:style-name="T21">Il confronto tra i tre modelli evidenzia differenze sostanziali nella capacità di sfruttare la Background Knowledge OWL:</text:span></text:p>
      <text:list text:continue-numbering="true" text:style-name="WWNum2">
        <text:list-item>
          <text:p text:style-name="P5"><text:span text:style-name="T22">RF</text:span><text:span text:style-name="T21"> apprende implicitamente soglie analoghe ai concetti OWL tramite i propri split: la BK aggiunge poco.</text:span></text:p>
        </text:list-item>
        <text:list-item>
          <text:p text:style-name="P5"><text:span text:style-name="T22">LR</text:span><text:span text:style-name="T21"> beneficia significativamente della BK: i concetti complessi (intersezioni OWL) sono feature non linearmente costruibili da una LR su feature raw.</text:span></text:p>
        </text:list-item>
        <text:list-item>
          <text:p text:style-name="P5"><text:span text:style-name="T22">DT</text:span><text:span text:style-name="T21"> è danneggiato dalla BK: la dimensionalità aggiuntiva (35 feature) aumenta il rischio di overfitting per l'albero singolo.</text:span></text:p>
        </text:list-item>
        <text:list-item>
          <text:p text:style-name="P5"><text:span text:style-name="T21">La </text:span><text:span text:style-name="T22">classe Rilassato</text:span><text:span text:style-name="T21"> (7.9% del dataset) è la più difficile in assoluto, con F1 tra 0.07 e 0.21 a seconda del modello e delle feature: solo LR+OWL riesce a gestirla in modo non trascurabile.</text:span></text:p>
        </text:list-item>
      </text:list>
      <text:h text:style-name="P2" text:outline-level="1"><text:span text:style-name="T20">Modelli su Feature OWL: BNB e BNB-EM</text:span></text:h>
      <text:h text:style-name="P3" text:outline-level="2"><text:span text:style-name="T2">Introduzione</text:span></text:h>
      <text:p text:style-name="P11"><text:span text:style-name="T21">I modelli </text:span><text:span text:style-name="T22">Bernoulli Naive Bayes (BNB)</text:span><text:span text:style-name="T21"> e </text:span><text:span text:style-name="T22">BNB-EM</text:span><text:span text:style-name="T21"> operano direttamente sul vettore binario OWL di dimensione 25, trattando ogni concetto ontologico come una variabile Bernoulli indipendente condizionalmente data la classe. Questi modelli sono stati adattati dal progetto </text:span><text:span text:style-name="T23">THESCREAMINGMONKEY/MBM-EM</text:span><text:span text:style-name="T21">, originariamente progettato per la classificazione di concetti su ontologie OWL.</text:span></text:p>
      <text:p text:style-name="P11"><text:span text:style-name="T21">La scelta dei modelli Bernoulli è coerente con la natura binaria delle feature OWL: a differenza della Logistic Regression, che tratta le feature come variabili continue, il BNB assume esplicitamente che ogni feature sia il risultato di un lancio di moneta con parametro θ dipendente dalla classe.</text:span></text:p>
      <text:h text:style-name="P3" text:outline-level="2"><text:span text:style-name="T2">Bernoulli Naive Bayes (BNB)</text:span></text:h>
      <text:h text:style-name="P4" text:outline-level="3"><text:span text:style-name="T6">Formulazione matematica</text:span></text:h>
      <text:p text:style-name="P11"><text:span text:style-name="T21">Il modello BNB assume indipendenza condizionale delle feature data la classe:</text:span></text:p>
      <text:p text:style-name="P20"><text:span text:style-name="T26">```</text:span></text:p>
      <text:p text:style-name="P20"><text:span text:style-name="T28">P(x | y=c) = ∏_j <text:s/>θ_cj^x_j · (1 - θ_cj)^(1-x_j)</text:span></text:p>
      <text:p text:style-name="P20"><text:span text:style-name="T28"><text:s/></text:span></text:p>
      <text:p text:style-name="P20"><text:span text:style-name="T28">Con smoothing di Laplace α:</text:span></text:p>
      <text:p text:style-name="P20"><text:span text:style-name="T28"><text:s text:c="2"/>θ_cj = (N_cj + α) / (N_c + 2α)</text:span></text:p>
      <text:p text:style-name="P20"><text:span text:style-name="T28"><text:s/></text:span></text:p>
      <text:p text:style-name="P20"><text:span text:style-name="T28">dove:</text:span></text:p>
      <text:p text:style-name="P20"><text:span text:style-name="T28"><text:s text:c="2"/>N_cj = numero di tracce della classe c con feature j attiva (x_j=1)</text:span></text:p>
      <text:p text:style-name="P20"><text:span text:style-name="T28"><text:s text:c="2"/>N_c <text:s/>= numero totale di tracce della classe c</text:span></text:p>
      <text:p text:style-name="P20"><text:span text:style-name="T28"><text:s text:c="2"/>α <text:s text:c="3"/>= parametro di smoothing (default: 1.0)</text:span></text:p>
      <text:p text:style-name="P20"><text:span text:style-name="T28"><text:s/></text:span></text:p>
      <text:p text:style-name="P20"><text:span text:style-name="T28">Classificazione: ŷ = argmax_c [ log π_c + Σ_j log P(x_j | y=c) ]</text:span></text:p>
      <text:p text:style-name="P20"><text:span text:style-name="T26">```</text:span></text:p>
      <text:p text:style-name="P6"/>
      <text:h text:style-name="P4" text:outline-level="3"><text:soft-page-break/><text:span text:style-name="T6">Sensitivity analysis — parametro α</text:span></text:h>
      <text:p text:style-name="P11"><text:span text:style-name="T21">Lo smoothing di Laplace α previene probabilità nulle per feature non osservate in una classe. La tabella seguente mostra l'impatto di α sulla F1 macro (10 run su X_owl):</text:span></text:p>
      <table:table table:name="Tabella15" table:style-name="Tabella15">
        <table:table-column table:style-name="Tabella15.A"/>
        <table:table-column table:style-name="Tabella15.B"/>
        <table:table-column table:style-name="Tabella15.C"/>
        <table:table-column table:style-name="Tabella15.D"/>
        <table:table-header-rows>
          <table:table-row table:style-name="Tabella15.1">
            <table:table-cell table:style-name="Tabella15.A1" office:value-type="string">
              <text:p text:style-name="P12"><text:span text:style-name="T24">α</text:span></text:p>
            </table:table-cell>
            <table:table-cell table:style-name="Tabella15.A1" office:value-type="string">
              <text:p text:style-name="P12"><text:span text:style-name="T24">F1 macro media</text:span></text:p>
            </table:table-cell>
            <table:table-cell table:style-name="Tabella15.A1" office:value-type="string">
              <text:p text:style-name="P12"><text:span text:style-name="T24">F1 std</text:span></text:p>
            </table:table-cell>
            <table:table-cell table:style-name="Tabella15.A1" office:value-type="string">
              <text:p text:style-name="P12"><text:span text:style-name="T24">Osservazione</text:span></text:p>
            </table:table-cell>
          </table:table-row>
        </table:table-header-rows>
        <table:table-row table:style-name="Tabella15.1">
          <table:table-cell table:style-name="Tabella15.A2" office:value-type="string">
            <text:p text:style-name="P12"><text:span text:style-name="T7">0.1</text:span></text:p>
          </table:table-cell>
          <table:table-cell table:style-name="Tabella15.A2" office:value-type="string">
            <text:p text:style-name="P12"><text:span text:style-name="T8">0.492</text:span></text:p>
          </table:table-cell>
          <table:table-cell table:style-name="Tabella15.A2" office:value-type="string">
            <text:p text:style-name="P12"><text:span text:style-name="T8">0.039</text:span></text:p>
          </table:table-cell>
          <table:table-cell table:style-name="Tabella15.A2" office:value-type="string">
            <text:p text:style-name="P7"><text:span text:style-name="T8">Migliore sul dataset corrente</text:span></text:p>
          </table:table-cell>
        </table:table-row>
        <table:table-row table:style-name="Tabella15.1">
          <table:table-cell table:style-name="Tabella15.A3" office:value-type="string">
            <text:p text:style-name="P12"><text:span text:style-name="T8">0.5</text:span></text:p>
          </table:table-cell>
          <table:table-cell table:style-name="Tabella15.A3" office:value-type="string">
            <text:p text:style-name="P12"><text:span text:style-name="T8">0.491</text:span></text:p>
          </table:table-cell>
          <table:table-cell table:style-name="Tabella15.A3" office:value-type="string">
            <text:p text:style-name="P12"><text:span text:style-name="T8">0.040</text:span></text:p>
          </table:table-cell>
          <table:table-cell table:style-name="Tabella15.A3" office:value-type="string">
            <text:p text:style-name="P7"><text:span text:style-name="T8">Quasi equivalente</text:span></text:p>
          </table:table-cell>
        </table:table-row>
        <table:table-row table:style-name="Tabella15.1">
          <table:table-cell table:style-name="Tabella15.A2" office:value-type="string">
            <text:p text:style-name="P12"><text:span text:style-name="T8">1.0</text:span></text:p>
          </table:table-cell>
          <table:table-cell table:style-name="Tabella15.A2" office:value-type="string">
            <text:p text:style-name="P12"><text:span text:style-name="T8">0.489</text:span></text:p>
          </table:table-cell>
          <table:table-cell table:style-name="Tabella15.A2" office:value-type="string">
            <text:p text:style-name="P12"><text:span text:style-name="T8">0.042</text:span></text:p>
          </table:table-cell>
          <table:table-cell table:style-name="Tabella15.A2" office:value-type="string">
            <text:p text:style-name="P7"><text:span text:style-name="T8">Laplace standard</text:span></text:p>
          </table:table-cell>
        </table:table-row>
        <table:table-row table:style-name="Tabella15.1">
          <table:table-cell table:style-name="Tabella15.A3" office:value-type="string">
            <text:p text:style-name="P12"><text:span text:style-name="T8">2.0</text:span></text:p>
          </table:table-cell>
          <table:table-cell table:style-name="Tabella15.A3" office:value-type="string">
            <text:p text:style-name="P12"><text:span text:style-name="T8">0.479</text:span></text:p>
          </table:table-cell>
          <table:table-cell table:style-name="Tabella15.A3" office:value-type="string">
            <text:p text:style-name="P12"><text:span text:style-name="T8">0.043</text:span></text:p>
          </table:table-cell>
          <table:table-cell table:style-name="Tabella15.A3" office:value-type="string">
            <text:p text:style-name="P7"><text:span text:style-name="T8">Lieve degradazione</text:span></text:p>
          </table:table-cell>
        </table:table-row>
        <table:table-row table:style-name="Tabella15.1">
          <table:table-cell table:style-name="Tabella15.A2" office:value-type="string">
            <text:p text:style-name="P12"><text:span text:style-name="T8">5.0</text:span></text:p>
          </table:table-cell>
          <table:table-cell table:style-name="Tabella15.A2" office:value-type="string">
            <text:p text:style-name="P12"><text:span text:style-name="T8">0.466</text:span></text:p>
          </table:table-cell>
          <table:table-cell table:style-name="Tabella15.A2" office:value-type="string">
            <text:p text:style-name="P12"><text:span text:style-name="T8">0.045</text:span></text:p>
          </table:table-cell>
          <table:table-cell table:style-name="Tabella15.A2" office:value-type="string">
            <text:p text:style-name="P7"><text:span text:style-name="T8">Appiattimento delle distribuzioni</text:span></text:p>
          </table:table-cell>
        </table:table-row>
        <table:table-row table:style-name="Tabella15.1">
          <table:table-cell table:style-name="Tabella15.A3" office:value-type="string">
            <text:p text:style-name="P12"><text:span text:style-name="T8">10.0</text:span></text:p>
          </table:table-cell>
          <table:table-cell table:style-name="Tabella15.A3" office:value-type="string">
            <text:p text:style-name="P12"><text:span text:style-name="T8">0.452</text:span></text:p>
          </table:table-cell>
          <table:table-cell table:style-name="Tabella15.A3" office:value-type="string">
            <text:p text:style-name="P12"><text:span text:style-name="T8">0.033</text:span></text:p>
          </table:table-cell>
          <table:table-cell table:style-name="Tabella15.A3" office:value-type="string">
            <text:p text:style-name="P7"><text:span text:style-name="T8">Eccessivo smoothing, underfitting</text:span></text:p>
          </table:table-cell>
        </table:table-row>
      </table:table>
      <text:p text:style-name="P6"/>
      <text:p text:style-name="P11"><text:span text:style-name="T21">Le differenze tra α=0.1 e α=1.0 sono minime (0.003 F1), indicando robustezza del modello alla scelta di smoothing nel range [0.1, 1.0]. Il valore α=1.0 (Laplace standard) è stato scelto per la sua interpretabilità e coerenza con la letteratura.</text:span></text:p>
      <text:h text:style-name="P4" text:outline-level="3"><text:span text:style-name="T6">Implementazione</text:span></text:h>
      <text:p text:style-name="P20"><text:span text:style-name="T26">```</text:span></text:p>
      <text:p text:style-name="P20"><text:span text:style-name="T28"># src/bernoulli_nb.py — estratto</text:span></text:p>
      <text:p text:style-name="P20"><text:span text:style-name="T28">class BernoulliNB:</text:span></text:p>
      <text:p text:style-name="P20"><text:span text:style-name="T28"><text:s text:c="4"/>def fit(self, X, y):</text:span></text:p>
      <text:p text:style-name="P20"><text:span text:style-name="T28"><text:s text:c="8"/>counts = np.array([(y==c).sum() for c in self.classes_])</text:span></text:p>
      <text:p text:style-name="P20"><text:span text:style-name="T28"><text:s text:c="8"/>self.log_prior_ = np.log(counts / len(y))</text:span></text:p>
      <text:p text:style-name="P20"><text:span text:style-name="T28"><text:s text:c="8"/>for i, c in enumerate(self.classes_):</text:span></text:p>
      <text:p text:style-name="P20"><text:span text:style-name="T28"><text:s text:c="12"/>X_c = X[y == c]</text:span></text:p>
      <text:p text:style-name="P20"><text:span text:style-name="T28"><text:s text:c="12"/>theta = (X_c.sum(0) + self.alpha) / (len(X_c) + 2*self.alpha)</text:span></text:p>
      <text:p text:style-name="P20"><text:span text:style-name="T28"><text:s text:c="12"/>self.log_theta_[i] <text:s text:c="3"/>= np.log(theta)</text:span></text:p>
      <text:p text:style-name="P20"><text:span text:style-name="T28"><text:s text:c="12"/>self.log_1m_theta_[i] = np.log(1 - theta)</text:span></text:p>
      <text:p text:style-name="P20"><text:span text:style-name="T28"><text:s/></text:span></text:p>
      <text:p text:style-name="P20"><text:span text:style-name="T28"><text:s text:c="4"/>def predict_log_proba(self, X):</text:span></text:p>
      <text:p text:style-name="P20"><text:span text:style-name="T28"><text:s text:c="8"/>return (X @ self.log_theta_.T</text:span></text:p>
      <text:p text:style-name="P20"><text:span text:style-name="T28"><text:s text:c="16"/>+ (1-X) @ self.log_1m_theta_.T</text:span></text:p>
      <text:p text:style-name="P20"><text:span text:style-name="T28"><text:s text:c="16"/>+ self.log_prior_)</text:span></text:p>
      <text:p text:style-name="P20"><text:span text:style-name="T26">```</text:span></text:p>
      <text:p text:style-name="P6"/>
      <text:p text:style-name="P21"><text:span text:style-name="T27">```</text:span></text:p>
      <text:p text:style-name="P21"><text:span text:style-name="T29">=== Risultati: BNB (OWL, α=1.0) ===</text:span></text:p>
      <text:p text:style-name="P21"><text:span text:style-name="T29">Precision macro : 0.535 ± 0.072</text:span></text:p>
      <text:p text:style-name="P21"><text:span text:style-name="T29">Recall macro <text:s text:c="3"/>: 0.504 ± 0.032</text:span></text:p>
      <text:p text:style-name="P21"><text:span text:style-name="T29">F1 macro <text:s text:c="7"/>: 0.489 ± 0.042</text:span></text:p>
      <text:p text:style-name="P21"><text:span text:style-name="T29">G-Mean macro <text:s text:c="3"/>: 0.308 ± 0.214</text:span></text:p>
      <text:p text:style-name="P21"><text:span text:style-name="T27">```</text:span></text:p>
      <text:p text:style-name="P6"/>
      <text:h text:style-name="P3" text:outline-level="2"><text:span text:style-name="T2">BNB-EM — Apprendimento Semi-Supervisionato</text:span></text:h>
      <text:h text:style-name="P4" text:outline-level="3"><text:span text:style-name="T6">Motivazione</text:span></text:h>
      <text:p text:style-name="P11"><text:span text:style-name="T21">In molti scenari reali, l'annotazione manuale delle tracce musicali è costosa: un utente potrebbe etichettare solo una parte della propria libreria. Il </text:span><text:span text:style-name="T22">BNB-EM</text:span><text:span text:style-name="T21"> affronta questo scenario semi-supervisionato tramite l'algoritmo </text:span><text:span text:style-name="T22">Expectation-Maximization</text:span><text:span text:style-name="T21">, che utilizza anche i campioni non etichettati per migliorare la stima dei parametri.</text:span></text:p>
      <text:h text:style-name="P4" text:outline-level="3"><text:span text:style-name="T6">Algoritmo EM</text:span></text:h>
      <text:p text:style-name="P20"><text:span text:style-name="T26">```</text:span></text:p>
      <text:p text:style-name="P20"><text:soft-page-break/><text:span text:style-name="T28">Algoritmo BNB-EM (adattato da MBM-EM/BNB_EM.py):</text:span></text:p>
      <text:p text:style-name="P20"><text:span text:style-name="T28"><text:s/></text:span></text:p>
      <text:p text:style-name="P20"><text:span text:style-name="T28">INPUT: <text:s/>X_l (etichettati), y_l (etichette), X_u (non etichettati)</text:span></text:p>
      <text:p text:style-name="P20"><text:span text:style-name="T28">OUTPUT: parametri θ aggiornati</text:span></text:p>
      <text:p text:style-name="P20"><text:span text:style-name="T28"><text:s/></text:span></text:p>
      <text:p text:style-name="P20"><text:span text:style-name="T28">1. INIZIALIZZAZIONE:</text:span></text:p>
      <text:p text:style-name="P20"><text:span text:style-name="T28"><text:s text:c="3"/>Stima BNB supervisionato su (X_l, y_l)</text:span></text:p>
      <text:p text:style-name="P20"><text:span text:style-name="T28"><text:s/></text:span></text:p>
      <text:p text:style-name="P20"><text:span text:style-name="T28">2. RIPETI fino a convergenza:</text:span></text:p>
      <text:p text:style-name="P20"><text:span text:style-name="T28"><text:s text:c="3"/>E-STEP:</text:span></text:p>
      <text:p text:style-name="P20"><text:span text:style-name="T28"><text:s text:c="3"/>Per ogni x_i in X_u:</text:span></text:p>
      <text:p text:style-name="P20"><text:span text:style-name="T28"><text:s text:c="5"/>r_ic = P(y=c | x_i, θ) <text:s text:c="2"/>[responsabilità soft, Σ_c r_ic = 1]</text:span></text:p>
      <text:p text:style-name="P20"><text:span text:style-name="T28"><text:s/></text:span></text:p>
      <text:p text:style-name="P20"><text:span text:style-name="T28"><text:s text:c="3"/>M-STEP:</text:span></text:p>
      <text:p text:style-name="P20"><text:span text:style-name="T28"><text:s text:c="3"/>π_c = (N_c^labeled + Σ_i r_ic) / N_totale</text:span></text:p>
      <text:p text:style-name="P20"><text:span text:style-name="T28"><text:s text:c="3"/>θ_cj = (N_cj^labeled + Σ_i r_ic·x_ij + α) / (N_c^eff + 2α)</text:span></text:p>
      <text:p text:style-name="P20"><text:span text:style-name="T28"><text:s/></text:span></text:p>
      <text:p text:style-name="P20"><text:span text:style-name="T28"><text:s text:c="3"/>CONVERGENZA: |ELL_new - ELL_old| &lt; 1e-4</text:span></text:p>
      <text:p text:style-name="P20"><text:span text:style-name="T28"><text:s text:c="5"/>dove ELL = Σ log P(x,y|θ) + Σ log P(x|θ)</text:span></text:p>
      <text:p text:style-name="P20"><text:span text:style-name="T26">```</text:span></text:p>
      <text:p text:style-name="P6"/>
      <text:h text:style-name="P4" text:outline-level="3"><text:span text:style-name="T6">Convergenza dell'algoritmo</text:span></text:h>
      <text:p text:style-name="P11"><text:span text:style-name="T21">Su un run di test con 30% dati non etichettati, l'algoritmo converge in </text:span><text:span text:style-name="T22">27 iterazioni</text:span><text:span text:style-name="T21">:</text:span></text:p>
      <table:table table:name="Tabella16" table:style-name="Tabella16">
        <table:table-column table:style-name="Tabella16.A"/>
        <table:table-column table:style-name="Tabella16.B"/>
        <table:table-column table:style-name="Tabella16.C"/>
        <table:table-header-rows>
          <table:table-row table:style-name="Tabella16.1">
            <table:table-cell table:style-name="Tabella16.A1" office:value-type="string">
              <text:p text:style-name="P12"><text:span text:style-name="T24">Iterazione</text:span></text:p>
            </table:table-cell>
            <table:table-cell table:style-name="Tabella16.A1" office:value-type="string">
              <text:p text:style-name="P12"><text:span text:style-name="T24">Log-Verosimiglianza Congiunta (ELL)</text:span></text:p>
            </table:table-cell>
            <table:table-cell table:style-name="Tabella16.A1" office:value-type="string">
              <text:p text:style-name="P12"><text:span text:style-name="T24">ΔΔ</text:span></text:p>
            </table:table-cell>
          </table:table-row>
        </table:table-header-rows>
        <table:table-row table:style-name="Tabella16.1">
          <table:table-cell table:style-name="Tabella16.A2" office:value-type="string">
            <text:p text:style-name="P12"><text:span text:style-name="T7">1</text:span></text:p>
          </table:table-cell>
          <table:table-cell table:style-name="Tabella16.A2" office:value-type="string">
            <text:p text:style-name="P7"><text:span text:style-name="T8">−4026.95</text:span></text:p>
          </table:table-cell>
          <table:table-cell table:style-name="Tabella16.A2" office:value-type="string">
            <text:p text:style-name="P7"><text:span text:style-name="T8">−</text:span></text:p>
          </table:table-cell>
        </table:table-row>
        <table:table-row table:style-name="Tabella16.1">
          <table:table-cell table:style-name="Tabella16.A3" office:value-type="string">
            <text:p text:style-name="P12"><text:span text:style-name="T8">2</text:span></text:p>
          </table:table-cell>
          <table:table-cell table:style-name="Tabella16.A3" office:value-type="string">
            <text:p text:style-name="P7"><text:span text:style-name="T8">−4025.04</text:span></text:p>
          </table:table-cell>
          <table:table-cell table:style-name="Tabella16.A3" office:value-type="string">
            <text:p text:style-name="P7"><text:span text:style-name="T8">+1.91</text:span></text:p>
          </table:table-cell>
        </table:table-row>
        <table:table-row table:style-name="Tabella16.1">
          <table:table-cell table:style-name="Tabella16.A2" office:value-type="string">
            <text:p text:style-name="P12"><text:span text:style-name="T8">3</text:span></text:p>
          </table:table-cell>
          <table:table-cell table:style-name="Tabella16.A2" office:value-type="string">
            <text:p text:style-name="P7"><text:span text:style-name="T8">−4024.72</text:span></text:p>
          </table:table-cell>
          <table:table-cell table:style-name="Tabella16.A2" office:value-type="string">
            <text:p text:style-name="P7"><text:span text:style-name="T8">+0.32</text:span></text:p>
          </table:table-cell>
        </table:table-row>
        <table:table-row table:style-name="Tabella16.1">
          <table:table-cell table:style-name="Tabella16.A3" office:value-type="string">
            <text:p text:style-name="P12"><text:span text:style-name="T8">5</text:span></text:p>
          </table:table-cell>
          <table:table-cell table:style-name="Tabella16.A3" office:value-type="string">
            <text:p text:style-name="P7"><text:span text:style-name="T8">−4024.60</text:span></text:p>
          </table:table-cell>
          <table:table-cell table:style-name="Tabella16.A3" office:value-type="string">
            <text:p text:style-name="P7"><text:span text:style-name="T8">+0.12</text:span></text:p>
          </table:table-cell>
        </table:table-row>
        <table:table-row table:style-name="Tabella16.1">
          <table:table-cell table:style-name="Tabella16.A2" office:value-type="string">
            <text:p text:style-name="P12"><text:span text:style-name="T8">10</text:span></text:p>
          </table:table-cell>
          <table:table-cell table:style-name="Tabella16.A2" office:value-type="string">
            <text:p text:style-name="P7"><text:span text:style-name="T8">−4024.56</text:span></text:p>
          </table:table-cell>
          <table:table-cell table:style-name="Tabella16.A2" office:value-type="string">
            <text:p text:style-name="P7"><text:span text:style-name="T8">+0.04</text:span></text:p>
          </table:table-cell>
        </table:table-row>
        <table:table-row table:style-name="Tabella16.1">
          <table:table-cell table:style-name="Tabella16.A3" office:value-type="string">
            <text:p text:style-name="P7"><text:span text:style-name="T8">27 (convergenza)</text:span></text:p>
          </table:table-cell>
          <table:table-cell table:style-name="Tabella16.A3" office:value-type="string">
            <text:p text:style-name="P7"><text:span text:style-name="T8">−4024.56</text:span></text:p>
          </table:table-cell>
          <table:table-cell table:style-name="Tabella16.A3" office:value-type="string">
            <text:p text:style-name="P7"><text:span text:style-name="T8">&lt; 1e-4</text:span></text:p>
          </table:table-cell>
        </table:table-row>
      </table:table>
      <text:p text:style-name="P6"/>
      <text:p text:style-name="P11"><text:span text:style-name="T21">La convergenza è rapida: già dopo 5 iterazioni la variazione di ELL è inferiore a 0.12. Il criterio di stop |ΔELL| &lt; 1e-4 con max 50 iterazioni garantisce convergenza senza costo computazionale eccessivo.</text:span></text:p>
      <text:h text:style-name="P4" text:outline-level="3"><text:span text:style-name="T6">Sensitivity — percentuale di dati non etichettati</text:span></text:h>
      <table:table table:name="Tabella17" table:style-name="Tabella17">
        <table:table-column table:style-name="Tabella17.A"/>
        <table:table-column table:style-name="Tabella17.B"/>
        <table:table-column table:style-name="Tabella17.C"/>
        <table:table-column table:style-name="Tabella17.D"/>
        <table:table-header-rows>
          <table:table-row table:style-name="Tabella17.1">
            <table:table-cell table:style-name="Tabella17.A1" office:value-type="string">
              <text:p text:style-name="P12"><text:span text:style-name="T24">% Non etichettati</text:span></text:p>
            </table:table-cell>
            <table:table-cell table:style-name="Tabella17.A1" office:value-type="string">
              <text:p text:style-name="P12"><text:span text:style-name="T24">F1 macro media</text:span></text:p>
            </table:table-cell>
            <table:table-cell table:style-name="Tabella17.A1" office:value-type="string">
              <text:p text:style-name="P12"><text:span text:style-name="T24">F1 std</text:span></text:p>
            </table:table-cell>
            <table:table-cell table:style-name="Tabella17.A1" office:value-type="string">
              <text:p text:style-name="P12"><text:span text:style-name="T24">Confronto vs BNB puro</text:span></text:p>
            </table:table-cell>
          </table:table-row>
        </table:table-header-rows>
        <table:table-row table:style-name="Tabella17.1">
          <table:table-cell table:style-name="Tabella17.A2" office:value-type="string">
            <text:p text:style-name="P12"><text:span text:style-name="T7">10%</text:span></text:p>
          </table:table-cell>
          <table:table-cell table:style-name="Tabella17.A2" office:value-type="string">
            <text:p text:style-name="P12"><text:span text:style-name="T8">0.479</text:span></text:p>
          </table:table-cell>
          <table:table-cell table:style-name="Tabella17.A2" office:value-type="string">
            <text:p text:style-name="P12"><text:span text:style-name="T8">0.044</text:span></text:p>
          </table:table-cell>
          <table:table-cell table:style-name="Tabella17.A2" office:value-type="string">
            <text:p text:style-name="P7"><text:span text:style-name="T8">−0.010 (lieve calo)</text:span></text:p>
          </table:table-cell>
        </table:table-row>
        <table:table-row table:style-name="Tabella17.1">
          <table:table-cell table:style-name="Tabella17.A3" office:value-type="string">
            <text:p text:style-name="P12"><text:span text:style-name="T8">20%</text:span></text:p>
          </table:table-cell>
          <table:table-cell table:style-name="Tabella17.A3" office:value-type="string">
            <text:p text:style-name="P12"><text:span text:style-name="T8">0.473</text:span></text:p>
          </table:table-cell>
          <table:table-cell table:style-name="Tabella17.A3" office:value-type="string">
            <text:p text:style-name="P12"><text:span text:style-name="T8">0.042</text:span></text:p>
          </table:table-cell>
          <table:table-cell table:style-name="Tabella17.A3" office:value-type="string">
            <text:p text:style-name="P7"><text:span text:style-name="T8">−0.016</text:span></text:p>
          </table:table-cell>
        </table:table-row>
        <table:table-row table:style-name="Tabella17.1">
          <table:table-cell table:style-name="Tabella17.A2" office:value-type="string">
            <text:p text:style-name="P12"><text:span text:style-name="T8">30%</text:span></text:p>
          </table:table-cell>
          <table:table-cell table:style-name="Tabella17.A2" office:value-type="string">
            <text:p text:style-name="P12"><text:span text:style-name="T8">0.464</text:span></text:p>
          </table:table-cell>
          <table:table-cell table:style-name="Tabella17.A2" office:value-type="string">
            <text:p text:style-name="P12"><text:span text:style-name="T8">0.042</text:span></text:p>
          </table:table-cell>
          <table:table-cell table:style-name="Tabella17.A2" office:value-type="string">
            <text:p text:style-name="P7"><text:span text:style-name="T8">−0.025 (configurazione testata)</text:span></text:p>
          </table:table-cell>
        </table:table-row>
        <table:table-row table:style-name="Tabella17.1">
          <table:table-cell table:style-name="Tabella17.A3" office:value-type="string">
            <text:p text:style-name="P12"><text:span text:style-name="T8">40%</text:span></text:p>
          </table:table-cell>
          <table:table-cell table:style-name="Tabella17.A3" office:value-type="string">
            <text:p text:style-name="P12"><text:span text:style-name="T8">0.448</text:span></text:p>
          </table:table-cell>
          <table:table-cell table:style-name="Tabella17.A3" office:value-type="string">
            <text:p text:style-name="P12"><text:span text:style-name="T8">0.047</text:span></text:p>
          </table:table-cell>
          <table:table-cell table:style-name="Tabella17.A3" office:value-type="string">
            <text:p text:style-name="P7"><text:span text:style-name="T8">−0.041</text:span></text:p>
          </table:table-cell>
        </table:table-row>
        <table:table-row table:style-name="Tabella17.1">
          <table:table-cell table:style-name="Tabella17.A2" office:value-type="string">
            <text:p text:style-name="P12"><text:span text:style-name="T8">50%</text:span></text:p>
          </table:table-cell>
          <table:table-cell table:style-name="Tabella17.A2" office:value-type="string">
            <text:p text:style-name="P12"><text:span text:style-name="T8">0.430</text:span></text:p>
          </table:table-cell>
          <table:table-cell table:style-name="Tabella17.A2" office:value-type="string">
            <text:p text:style-name="P12"><text:span text:style-name="T8">0.046</text:span></text:p>
          </table:table-cell>
          <table:table-cell table:style-name="Tabella17.A2" office:value-type="string">
            <text:p text:style-name="P7"><text:span text:style-name="T8">−0.059</text:span></text:p>
          </table:table-cell>
        </table:table-row>
      </table:table>
      <text:p text:style-name="P6"/>
      <text:p text:style-name="P21"><text:span text:style-name="T27">```</text:span></text:p>
      <text:p text:style-name="P21"><text:span text:style-name="T29">=== Risultati: BNB-EM (OWL, 30% unlabeled) ===</text:span></text:p>
      <text:p text:style-name="P21"><text:span text:style-name="T29">Precision macro : 0.488 ± 0.062</text:span></text:p>
      <text:p text:style-name="P21"><text:span text:style-name="T29">Recall macro <text:s text:c="3"/>: 0.480 ± 0.041</text:span></text:p>
      <text:p text:style-name="P21"><text:span text:style-name="T29">F1 macro <text:s text:c="7"/>: 0.464 ± 0.042</text:span></text:p>
      <text:p text:style-name="P21"><text:span text:style-name="T29">G-Mean macro <text:s text:c="3"/>: 0.327 ± 0.176</text:span></text:p>
      <text:p text:style-name="P21"><text:span text:style-name="T27">```</text:span></text:p>
      <text:p text:style-name="P6"/>
      <text:h text:style-name="P4" text:outline-level="3"><text:soft-page-break/><text:span text:style-name="T6">Valutazione generale</text:span></text:h>
      <text:p text:style-name="P11"><text:span text:style-name="T21">BNB supervisionato (F1=0.489) supera BNB-EM con 30% non etichettati (F1=0.464). Con dataset piccoli e classi sbilanciate, l'E-step introduce rumore nelle responsabilità soft — la classe Rilassato (7.9%) ottiene responsabilità quasi casuali per molti campioni non etichettati, degradando la stima dei parametri. BNB-EM risulterebbe più utile con percentuali di non etichettati &gt; 50%, scenario tipico per dataset musicali large-scale dove l'annotazione è costosa.</text:span></text:p>
      <text:h text:style-name="P2" text:outline-level="1"><text:span text:style-name="T20">Knowledge Base Prolog</text:span></text:h>
      <text:h text:style-name="P3" text:outline-level="2"><text:span text:style-name="T2">Introduzione</text:span></text:h>
      <text:p text:style-name="P11"><text:span text:style-name="T21">Nel sistema MUSIKON, la </text:span><text:span text:style-name="T22">Knowledge Base Prolog</text:span><text:span text:style-name="T21"> (</text:span><text:span text:style-name="T23">kb/music_kb.pl</text:span><text:span text:style-name="T21">) svolge il ruolo di livello simbolico complementare all'ontologia OWL. Mentre l'ontologia definisce </text:span><text:span text:style-name="T22">concetti</text:span><text:span text:style-name="T21"> tramite restrizioni sulle feature audio, la KB Prolog esprime </text:span><text:span text:style-name="T22">regole procedurali</text:span><text:span text:style-name="T21"> per la classificazione della mood e il rilevamento di contraddizioni logiche tra mood predetti da regole diverse.</text:span></text:p>
      <text:p text:style-name="P11"><text:span text:style-name="T21">La KB è ispirata alla struttura della Knowledge Base del progetto </text:span><text:span text:style-name="T23">Fonty02/ICON</text:span><text:span text:style-name="T21">. Non è concepita come semplice archivio di dati, ma come modulo di ragionamento esplicito integrato nel sistema: le sue regole formalizzano conoscenza musicale in forma dichiarativa, consentendo operazioni di inferenza e verifica di eleggibilità.</text:span></text:p>
      <text:h text:style-name="P3" text:outline-level="2"><text:span text:style-name="T2">Struttura della Knowledge Base</text:span></text:h>
      <text:p text:style-name="P11"><text:span text:style-name="T21">Il file </text:span><text:span text:style-name="T23">music_kb.pl</text:span><text:span text:style-name="T21"> è strutturato in quattro componenti:</text:span></text:p>
      <text:list text:continue-numbering="true" text:style-name="WWNum2">
        <text:list-item>
          <text:p text:style-name="P5"><text:span text:style-name="T22">Fatti dinamici</text:span><text:span text:style-name="T21"> (asseriti da Python tramite </text:span><text:span text:style-name="T23">assertz/1</text:span><text:span text:style-name="T21">): </text:span><text:span text:style-name="T23">feature(TrackId, NomeFeature, Valore)</text:span><text:span text:style-name="T21"> per ogni feature della traccia in esame.</text:span></text:p>
        </text:list-item>
        <text:list-item>
          <text:p text:style-name="P5"><text:span text:style-name="T22">5 regole di classificazione mood</text:span><text:span text:style-name="T21">: predicato </text:span><text:span text:style-name="T23">mood(Track, Mood)</text:span><text:span text:style-name="T21"> per ciascuna delle cinque categorie.</text:span></text:p>
        </text:list-item>
        <text:list-item>
          <text:p text:style-name="P5"><text:span text:style-name="T22">8 proprietà derivate</text:span><text:span text:style-name="T21">: predicati come </text:span><text:span text:style-name="T23">is_acoustic/1</text:span><text:span text:style-name="T21">, </text:span><text:span text:style-name="T23">high_energy/1</text:span><text:span text:style-name="T21"> che replicano concetti OWL nel linguaggio Prolog.</text:span></text:p>
        </text:list-item>
        <text:list-item>
          <text:p text:style-name="P5"><text:span text:style-name="T22">2 regole di conflitto</text:span><text:span text:style-name="T21">: predicato </text:span><text:span text:style-name="T23">conflict/2</text:span><text:span text:style-name="T21"> per rilevare contraddizioni logiche nella classificazione.</text:span></text:p>
        </text:list-item>
        <text:list-item>
          <text:p text:style-name="P5"><text:span text:style-name="T22">3 predicati utility</text:span><text:span text:style-name="T21">: </text:span><text:span text:style-name="T23">all_moods/2</text:span><text:span text:style-name="T21">, </text:span><text:span text:style-name="T23">primary_mood/2</text:span><text:span text:style-name="T21">, </text:span><text:span text:style-name="T23">has_conflict/1</text:span><text:span text:style-name="T21"> per query avanzate.</text:span></text:p>
        </text:list-item>
      </text:list>
      <text:h text:style-name="P3" text:outline-level="2"><text:span text:style-name="T2">Fatti e regole — Esempi</text:span></text:h>
      <text:h text:style-name="P4" text:outline-level="3"><text:span text:style-name="T6">Classificazione mood</text:span></text:h>
      <text:p text:style-name="P20"><text:span text:style-name="T26">```</text:span></text:p>
      <text:p text:style-name="P20"><text:span text:style-name="T28">% music_kb.pl — Regole di classificazione mood</text:span></text:p>
      <text:p text:style-name="P20"><text:span text:style-name="T28"><text:s/></text:span></text:p>
      <text:p text:style-name="P20"><text:span text:style-name="T28">% MALINCONICO: bassa energia + bassa valenza + spesso acustico</text:span></text:p>
      <text:p text:style-name="P20"><text:span text:style-name="T28">mood(Track, malinconico) :-</text:span></text:p>
      <text:p text:style-name="P20"><text:span text:style-name="T28"><text:s text:c="4"/>feature(Track, energy, <text:s text:c="6"/>E), E &lt; 0.45,</text:span></text:p>
      <text:p text:style-name="P20"><text:span text:style-name="T28"><text:s text:c="4"/>feature(Track, valence, <text:s text:c="5"/>V), V &lt; 0.32,</text:span></text:p>
      <text:p text:style-name="P20"><text:span text:style-name="T28"><text:s text:c="4"/>feature(Track, acousticness, A), A &gt; 0.40.</text:span></text:p>
      <text:p text:style-name="P20"><text:span text:style-name="T28"><text:s/></text:span></text:p>
      <text:p text:style-name="P20"><text:span text:style-name="T28">% Caso alternativo senza vincolo acustico esplicito</text:span></text:p>
      <text:p text:style-name="P20"><text:span text:style-name="T28">mood(Track, malinconico) :-</text:span></text:p>
      <text:p text:style-name="P20"><text:span text:style-name="T28"><text:s text:c="4"/>feature(Track, energy, <text:s/>E), E &lt; 0.40,</text:span></text:p>
      <text:p text:style-name="P20"><text:span text:style-name="T28"><text:s text:c="4"/>feature(Track, valence, V), V &lt; 0.28,</text:span></text:p>
      <text:p text:style-name="P20"><text:span text:style-name="T28"><text:s text:c="4"/>\+ mood(Track, intenso).</text:span></text:p>
      <text:p text:style-name="P20"><text:span text:style-name="T28"><text:s/></text:span></text:p>
      <text:p text:style-name="P20"><text:span text:style-name="T28">% INTENSO: alta energia + danzabile + elettronico</text:span></text:p>
      <text:p text:style-name="P20"><text:soft-page-break/><text:span text:style-name="T28">mood(Track, intenso) :-</text:span></text:p>
      <text:p text:style-name="P20"><text:span text:style-name="T28"><text:s text:c="4"/>feature(Track, energy, <text:s text:c="6"/>E), E &gt; 0.75,</text:span></text:p>
      <text:p text:style-name="P20"><text:span text:style-name="T28"><text:s text:c="4"/>feature(Track, danceability, D), D &gt; 0.65,</text:span></text:p>
      <text:p text:style-name="P20"><text:span text:style-name="T28"><text:s text:c="4"/>feature(Track, acousticness, A), A &lt; 0.10.</text:span></text:p>
      <text:p text:style-name="P20"><text:span text:style-name="T28"><text:s/></text:span></text:p>
      <text:p text:style-name="P20"><text:span text:style-name="T28">% GOODVIBES: alta valenza + alta danzabilità + energia media</text:span></text:p>
      <text:p text:style-name="P20"><text:span text:style-name="T28">mood(Track, goodvibes) :-</text:span></text:p>
      <text:p text:style-name="P20"><text:span text:style-name="T28"><text:s text:c="4"/>feature(Track, valence, <text:s text:c="5"/>V), V &gt; 0.65,</text:span></text:p>
      <text:p text:style-name="P20"><text:span text:style-name="T28"><text:s text:c="4"/>feature(Track, energy, <text:s text:c="6"/>E), E &gt; 0.55,</text:span></text:p>
      <text:p text:style-name="P20"><text:span text:style-name="T28"><text:s text:c="4"/>feature(Track, danceability, D), D &gt; 0.60.</text:span></text:p>
      <text:p text:style-name="P20"><text:span text:style-name="T28"><text:s/></text:span></text:p>
      <text:p text:style-name="P20"><text:span text:style-name="T28">% RILASSATO: alta valenza + bassa energia</text:span></text:p>
      <text:p text:style-name="P20"><text:span text:style-name="T28">mood(Track, rilassato) :-</text:span></text:p>
      <text:p text:style-name="P20"><text:span text:style-name="T28"><text:s text:c="4"/>feature(Track, valence, V), V &gt; 0.55,</text:span></text:p>
      <text:p text:style-name="P20"><text:span text:style-name="T28"><text:s text:c="4"/>feature(Track, energy, <text:s/>E), E &lt; 0.50,</text:span></text:p>
      <text:p text:style-name="P20"><text:span text:style-name="T28"><text:s text:c="4"/>feature(Track, tempo_norm, T), T &lt; 0.45.</text:span></text:p>
      <text:p text:style-name="P20"><text:span text:style-name="T26">```</text:span></text:p>
      <text:p text:style-name="P6"/>
      <text:h text:style-name="P4" text:outline-level="3"><text:span text:style-name="T6">Proprietà derivate — coerenza con OWL</text:span></text:h>
      <text:p text:style-name="P20"><text:span text:style-name="T26">```</text:span></text:p>
      <text:p text:style-name="P20"><text:span text:style-name="T28">% Proprietà derivate (sincronizzate con concetti OWL atomici)</text:span></text:p>
      <text:p text:style-name="P20"><text:span text:style-name="T28">high_energy(Track) :- feature(Track, energy, E), E &gt; 0.75.</text:span></text:p>
      <text:p text:style-name="P20"><text:span text:style-name="T28">low_energy(Track) <text:s/>:- feature(Track, energy, E), E &lt; 0.45.</text:span></text:p>
      <text:p text:style-name="P20"><text:span text:style-name="T28">high_valence(Track):- feature(Track, valence, V), V &gt; 0.65.</text:span></text:p>
      <text:p text:style-name="P20"><text:span text:style-name="T28">is_acoustic(Track) :- feature(Track, acousticness, A), A &gt; 0.40.</text:span></text:p>
      <text:p text:style-name="P20"><text:span text:style-name="T28">is_fast(Track) <text:s text:c="4"/>:- feature(Track, tempo_norm, T), T &gt; 0.55.</text:span></text:p>
      <text:p text:style-name="P20"><text:span text:style-name="T28">is_loud(Track) <text:s text:c="4"/>:- feature(Track, loudness_norm, L), L &gt; 0.72.</text:span></text:p>
      <text:p text:style-name="P20"><text:span text:style-name="T28">is_speechy(Track) <text:s/>:- feature(Track, speechiness, S), S &gt; 0.07.</text:span></text:p>
      <text:p text:style-name="P20"><text:span text:style-name="T26">```</text:span></text:p>
      <text:p text:style-name="P6"/>
      <text:h text:style-name="P4" text:outline-level="3"><text:span text:style-name="T6">Regole di rilevamento conflitti</text:span></text:h>
      <text:p text:style-name="P20"><text:span text:style-name="T26">```</text:span></text:p>
      <text:p text:style-name="P20"><text:span text:style-name="T28">% Conflitto: una traccia non può essere sia malinconico che goodvibes</text:span></text:p>
      <text:p text:style-name="P20"><text:span text:style-name="T28">conflict(Track, mood_conflict) :-</text:span></text:p>
      <text:p text:style-name="P20"><text:span text:style-name="T28"><text:s text:c="4"/>mood(Track, malinconico),</text:span></text:p>
      <text:p text:style-name="P20"><text:span text:style-name="T28"><text:s text:c="4"/>mood(Track, goodvibes).</text:span></text:p>
      <text:p text:style-name="P20"><text:span text:style-name="T28"><text:s/></text:span></text:p>
      <text:p text:style-name="P20"><text:span text:style-name="T28">% Conflitto: acustica densa con alta energia elettronica</text:span></text:p>
      <text:p text:style-name="P20"><text:span text:style-name="T28">conflict(Track, acoustic_electric_conflict) :-</text:span></text:p>
      <text:p text:style-name="P20"><text:span text:style-name="T28"><text:s text:c="4"/>feature(Track, acousticness, A), A &gt; 0.70,</text:span></text:p>
      <text:p text:style-name="P20"><text:span text:style-name="T28"><text:s text:c="4"/>feature(Track, energy, E), E &gt; 0.85,</text:span></text:p>
      <text:p text:style-name="P20"><text:span text:style-name="T28"><text:s text:c="4"/>feature(Track, instrumentalness, I), I &lt; 0.001.</text:span></text:p>
      <text:p text:style-name="P20"><text:span text:style-name="T28"><text:s/></text:span></text:p>
      <text:p text:style-name="P20"><text:span text:style-name="T28">% Predicati utility</text:span></text:p>
      <text:p text:style-name="P20"><text:span text:style-name="T28">primary_mood(Track, Mood) :- mood(Track, Mood), !.</text:span></text:p>
      <text:p text:style-name="P20"><text:span text:style-name="T28">has_conflict(Track) <text:s text:c="6"/>:- conflict(Track, _).</text:span></text:p>
      <text:p text:style-name="P20"><text:span text:style-name="T28">all_moods(Track, Moods) <text:s text:c="2"/>:-</text:span></text:p>
      <text:p text:style-name="P20"><text:span text:style-name="T28"><text:s text:c="4"/>findall(M, mood(Track, M), L), sort(L, Moods).</text:span></text:p>
      <text:p text:style-name="P20"><text:span text:style-name="T26">```</text:span></text:p>
      <text:p text:style-name="P6"/>
      <text:h text:style-name="P3" text:outline-level="2"><text:span text:style-name="T2">Integrazione Python–Prolog</text:span></text:h>
      <text:p text:style-name="P11"><text:span text:style-name="T21">L'integrazione tra il sistema Python e la KB Prolog avviene tramite la libreria </text:span><text:span text:style-name="T22">pyswip</text:span><text:span text:style-name="T21">, che fornisce bindings per SWI-Prolog:</text:span></text:p>
      <text:p text:style-name="P20"><text:span text:style-name="T26">```</text:span></text:p>
      <text:p text:style-name="P20"><text:span text:style-name="T28"># src/prolog_kb.py — estratto</text:span></text:p>
      <text:p text:style-name="P20"><text:soft-page-break/><text:span text:style-name="T28">from pyswip import Prolog</text:span></text:p>
      <text:p text:style-name="P20"><text:span text:style-name="T28"><text:s/></text:span></text:p>
      <text:p text:style-name="P20"><text:span text:style-name="T28">class MusicKB:</text:span></text:p>
      <text:p text:style-name="P20"><text:span text:style-name="T28"><text:s text:c="4"/>def __init__(self):</text:span></text:p>
      <text:p text:style-name="P20"><text:span text:style-name="T28"><text:s text:c="8"/>self._prolog = Prolog()</text:span></text:p>
      <text:p text:style-name="P20"><text:span text:style-name="T28"><text:s text:c="8"/>self._prolog.consult('kb/music_kb.pl')</text:span></text:p>
      <text:p text:style-name="P20"><text:span text:style-name="T28"><text:s/></text:span></text:p>
      <text:p text:style-name="P20"><text:span text:style-name="T28"><text:s text:c="4"/>def assert_track(self, track_id, **features):</text:span></text:p>
      <text:p text:style-name="P20"><text:span text:style-name="T28"><text:s text:c="8"/>for feat, val in features.items():</text:span></text:p>
      <text:p text:style-name="P20"><text:span text:style-name="T28"><text:s text:c="12"/>fact = f'feature({track_id}, {feat}, {val:.6f})'</text:span></text:p>
      <text:p text:style-name="P20"><text:span text:style-name="T28"><text:s text:c="12"/>list(self._prolog.query(f'assertz({fact})'))</text:span></text:p>
      <text:p text:style-name="P20"><text:span text:style-name="T28"><text:s/></text:span></text:p>
      <text:p text:style-name="P20"><text:span text:style-name="T28"><text:s text:c="4"/>def query_mood(self, track_id):</text:span></text:p>
      <text:p text:style-name="P20"><text:span text:style-name="T28"><text:s text:c="8"/>results = list(self._prolog.query(</text:span></text:p>
      <text:p text:style-name="P20"><text:span text:style-name="T28"><text:s text:c="12"/>f'primary_mood({track_id}, Mood)'</text:span></text:p>
      <text:p text:style-name="P20"><text:span text:style-name="T28"><text:s text:c="8"/>))</text:span></text:p>
      <text:p text:style-name="P20"><text:span text:style-name="T28"><text:s text:c="8"/>return results[0]['Mood'] if results else None</text:span></text:p>
      <text:p text:style-name="P20"><text:span text:style-name="T28"><text:s/></text:span></text:p>
      <text:p text:style-name="P20"><text:span text:style-name="T28"><text:s text:c="4"/>def has_conflict(self, track_id):</text:span></text:p>
      <text:p text:style-name="P20"><text:span text:style-name="T28"><text:s text:c="8"/>return len(list(self._prolog.query(</text:span></text:p>
      <text:p text:style-name="P20"><text:span text:style-name="T28"><text:s text:c="12"/>f'has_conflict({track_id})'))) &gt; 0</text:span></text:p>
      <text:p text:style-name="P20"><text:span text:style-name="T26">```</text:span></text:p>
      <text:p text:style-name="P6"/>
      <table:table table:name="Tabella18" table:style-name="Tabella18">
        <table:table-column table:style-name="Tabella18.A"/>
        <table:table-row table:style-name="Tabella18.1">
          <table:table-cell table:style-name="Tabella18.A1" office:value-type="string">
            <text:p text:style-name="P9"><text:span text:style-name="T3">Nota Metodologica: </text:span><text:span text:style-name="T21">Il sistema include **graceful degradation**: se SWI-Prolog non è installato, il modulo Prolog viene saltato silenziosamente e la pipeline prosegue con gli altri componenti. Questo garantisce portabilità del sistema su ambienti senza SWI-Prolog installato.</text:span></text:p>
          </table:table-cell>
        </table:table-row>
        <table:table-row table:style-name="Tabella18.1">
          <table:table-cell table:style-name="Tabella18.A2" office:value-type="string">
            <text:p text:style-name="P22"><text:span text:style-name="T21">I fatti vengono asseriti dinamicamente (</text:span><text:span text:style-name="T23">assertz</text:span><text:span text:style-name="T21">) e ritirati (</text:span><text:span text:style-name="T23">retractall</text:span><text:span text:style-name="T21">) dopo ogni query, garantendo l'assenza di contaminazione tra tracce diverse durante la classificazione batch.</text:span></text:p>
          </table:table-cell>
        </table:table-row>
      </table:table>
      <text:p text:style-name="P6"/>
      <text:h text:style-name="P3" text:outline-level="2"><text:span text:style-name="T2">Complessità del ragionamento</text:span></text:h>
      <text:p text:style-name="P11"><text:span text:style-name="T21">Il ragionamento avviene per </text:span><text:span text:style-name="T22">backward chaining</text:span><text:span text:style-name="T21"> (Prolog standard). Sia J il numero di tracce e R il numero di regole:</text:span></text:p>
      <text:list text:continue-numbering="true" text:style-name="WWNum2">
        <text:list-item>
          <text:p text:style-name="P5"><text:span text:style-name="T21">Una query </text:span><text:span text:style-name="T23">primary_mood(T, M)</text:span><text:span text:style-name="T21"> risolve le prime regole compatibili in O(R) tentativi.</text:span></text:p>
        </text:list-item>
        <text:list-item>
          <text:p text:style-name="P5"><text:span text:style-name="T21">Una query </text:span><text:span text:style-name="T23">has_conflict(T)</text:span><text:span text:style-name="T21"> verifica tutte le regole di conflitto: O(R²) nel caso pessimo.</text:span></text:p>
        </text:list-item>
        <text:list-item>
          <text:p text:style-name="P5"><text:span text:style-name="T21">La classificazione batch di J tracce ha complessità O(J × R), che per il dataset di 519 tracce e 5 regole principali è pienamente gestibile.</text:span></text:p>
        </text:list-item>
      </text:list>
      <text:h text:style-name="P2" text:outline-level="1"><text:span text:style-name="T20">Rete Bayesiana</text:span></text:h>
      <text:h text:style-name="P3" text:outline-level="2"><text:span text:style-name="T2">Introduzione</text:span></text:h>
      <text:p text:style-name="P11"><text:span text:style-name="T21">Oltre ai modelli discriminativi (DT, RF, LR, BNB), nel progetto MUSIKON è stato implementato un modello probabilistico basato su </text:span><text:span text:style-name="T22">inferenza bayesiana</text:span><text:span text:style-name="T21">. La rete bayesiana consente di modellare esplicitamente le dipendenze tra le variabili del dominio musicale e di calcolare la probabilità condizionata di mood date le evidenze (feature OWL):</text:span></text:p>
      <text:p text:style-name="P11"><text:span text:style-name="T21"><text:s text:c="21"/>P(Mood | feature_1, feature_2, …, feature_k)</text:span></text:p>
      <text:p text:style-name="P11"><text:span text:style-name="T21">A differenza dei modelli supervisionati, la rete bayesiana non restituisce una classificazione deterministica ma una </text:span><text:span text:style-name="T22">distribuzione di probabilità</text:span><text:span text:style-name="T21">, fornendo un livello superiore di interpretabilità.</text:span></text:p>
      <text:h text:style-name="P3" text:outline-level="2"><text:soft-page-break/><text:span text:style-name="T2">Struttura della rete — Naïve Bayes Aumentata</text:span></text:h>
      <text:p text:style-name="P11"><text:span text:style-name="T21">La struttura è stata definita come </text:span><text:span text:style-name="T22">Naïve Bayes Aumentata (NBA)</text:span><text:span text:style-name="T21">: il nodo </text:span><text:span text:style-name="T23">Mood</text:span><text:span text:style-name="T21"> è genitore di tutte le 17 feature OWL selezionate. Questa struttura è equivalente al BNB ma all'interno di un framework formale di rete bayesiana, che consente inferenza probabilistica esatta tramite Variable Elimination.</text:span></text:p>
      <text:p text:style-name="P11"><text:span text:style-name="T21">La scelta della struttura NBA è motivata da due ragioni:</text:span></text:p>
      <text:list text:continue-numbering="true" text:style-name="WWNum2">
        <text:list-item>
          <text:p text:style-name="P5"><text:span text:style-name="T22">Complessità computazionale</text:span><text:span text:style-name="T21">: con 25 nodi binari + 1 nodo a 5 valori, l'apprendimento strutturale tramite Hill Climbing in 10-fold CV sarebbe computazionalmente costoso per un progetto didattico.</text:span></text:p>
        </text:list-item>
        <text:list-item>
          <text:p text:style-name="P5"><text:span text:style-name="T22">Coerenza con il dominio</text:span><text:span text:style-name="T21">: il modello generativo P(features | Mood) è semanticamente appropriato: date le caratteristiche di una categoria di mood, si può inferire la distribuzione attesa delle feature audio.</text:span></text:p>
        </text:list-item>
      </text:list>
      <text:h text:style-name="P4" text:outline-level="3"><text:span text:style-name="T6">Nodi della rete</text:span></text:h>
      <table:table table:name="Tabella19" table:style-name="Tabella19">
        <table:table-column table:style-name="Tabella19.A"/>
        <table:table-column table:style-name="Tabella19.B"/>
        <table:table-column table:style-name="Tabella19.C"/>
        <table:table-column table:style-name="Tabella19.D"/>
        <table:table-header-rows>
          <table:table-row table:style-name="Tabella19.1">
            <table:table-cell table:style-name="Tabella19.A1" office:value-type="string">
              <text:p text:style-name="P12"><text:span text:style-name="T24">Nodo</text:span></text:p>
            </table:table-cell>
            <table:table-cell table:style-name="Tabella19.A1" office:value-type="string">
              <text:p text:style-name="P12"><text:span text:style-name="T24">Tipo</text:span></text:p>
            </table:table-cell>
            <table:table-cell table:style-name="Tabella19.A1" office:value-type="string">
              <text:p text:style-name="P12"><text:span text:style-name="T24">Valori</text:span></text:p>
            </table:table-cell>
            <table:table-cell table:style-name="Tabella19.A1" office:value-type="string">
              <text:p text:style-name="P12"><text:span text:style-name="T24">Ruolo</text:span></text:p>
            </table:table-cell>
          </table:table-row>
        </table:table-header-rows>
        <table:table-row table:style-name="Tabella19.1">
          <table:table-cell table:style-name="Tabella19.A2" office:value-type="string">
            <text:p text:style-name="P7"><text:span text:style-name="T7">Mood</text:span></text:p>
          </table:table-cell>
          <table:table-cell table:style-name="Tabella19.A2" office:value-type="string">
            <text:p text:style-name="P7"><text:span text:style-name="T8">Categoriale</text:span></text:p>
          </table:table-cell>
          <table:table-cell table:style-name="Tabella19.A2" office:value-type="string">
            <text:p text:style-name="P7"><text:span text:style-name="T8">0,1,2,3,4 (5 classi)</text:span></text:p>
          </table:table-cell>
          <table:table-cell table:style-name="Tabella19.A2" office:value-type="string">
            <text:p text:style-name="P7"><text:span text:style-name="T8">Nodo target (da inferire)</text:span></text:p>
          </table:table-cell>
        </table:table-row>
        <table:table-row table:style-name="Tabella19.1">
          <table:table-cell table:style-name="Tabella19.A3" office:value-type="string">
            <text:p text:style-name="P7"><text:span text:style-name="T8">HighEnergy</text:span></text:p>
          </table:table-cell>
          <table:table-cell table:style-name="Tabella19.A3" office:value-type="string">
            <text:p text:style-name="P7"><text:span text:style-name="T8">Booleano</text:span></text:p>
          </table:table-cell>
          <table:table-cell table:style-name="Tabella19.A3" office:value-type="string">
            <text:p text:style-name="P7"><text:span text:style-name="T8">{0,1}</text:span></text:p>
          </table:table-cell>
          <table:table-cell table:style-name="Tabella19.A3" office:value-type="string">
            <text:p text:style-name="P7"><text:span text:style-name="T8">Feature OWL figlia di Mood</text:span></text:p>
          </table:table-cell>
        </table:table-row>
        <table:table-row table:style-name="Tabella19.1">
          <table:table-cell table:style-name="Tabella19.A2" office:value-type="string">
            <text:p text:style-name="P7"><text:span text:style-name="T8">LowEnergy</text:span></text:p>
          </table:table-cell>
          <table:table-cell table:style-name="Tabella19.A2" office:value-type="string">
            <text:p text:style-name="P7"><text:span text:style-name="T8">Booleano</text:span></text:p>
          </table:table-cell>
          <table:table-cell table:style-name="Tabella19.A2" office:value-type="string">
            <text:p text:style-name="P7"><text:span text:style-name="T8">{0,1}</text:span></text:p>
          </table:table-cell>
          <table:table-cell table:style-name="Tabella19.A2" office:value-type="string">
            <text:p text:style-name="P7"><text:span text:style-name="T8">Feature OWL figlia di Mood</text:span></text:p>
          </table:table-cell>
        </table:table-row>
        <table:table-row table:style-name="Tabella19.1">
          <table:table-cell table:style-name="Tabella19.A3" office:value-type="string">
            <text:p text:style-name="P7"><text:span text:style-name="T8">HighValence</text:span></text:p>
          </table:table-cell>
          <table:table-cell table:style-name="Tabella19.A3" office:value-type="string">
            <text:p text:style-name="P7"><text:span text:style-name="T8">Booleano</text:span></text:p>
          </table:table-cell>
          <table:table-cell table:style-name="Tabella19.A3" office:value-type="string">
            <text:p text:style-name="P7"><text:span text:style-name="T8">{0,1}</text:span></text:p>
          </table:table-cell>
          <table:table-cell table:style-name="Tabella19.A3" office:value-type="string">
            <text:p text:style-name="P7"><text:span text:style-name="T8">Feature OWL figlia di Mood</text:span></text:p>
          </table:table-cell>
        </table:table-row>
        <table:table-row table:style-name="Tabella19.1">
          <table:table-cell table:style-name="Tabella19.A2" office:value-type="string">
            <text:p text:style-name="P7"><text:span text:style-name="T8">LowValence</text:span></text:p>
          </table:table-cell>
          <table:table-cell table:style-name="Tabella19.A2" office:value-type="string">
            <text:p text:style-name="P7"><text:span text:style-name="T8">Booleano</text:span></text:p>
          </table:table-cell>
          <table:table-cell table:style-name="Tabella19.A2" office:value-type="string">
            <text:p text:style-name="P7"><text:span text:style-name="T8">{0,1}</text:span></text:p>
          </table:table-cell>
          <table:table-cell table:style-name="Tabella19.A2" office:value-type="string">
            <text:p text:style-name="P7"><text:span text:style-name="T8">Feature OWL figlia di Mood</text:span></text:p>
          </table:table-cell>
        </table:table-row>
        <table:table-row table:style-name="Tabella19.1">
          <table:table-cell table:style-name="Tabella19.A3" office:value-type="string">
            <text:p text:style-name="P7"><text:span text:style-name="T8">…</text:span></text:p>
          </table:table-cell>
          <table:table-cell table:style-name="Tabella19.A3" office:value-type="string">
            <text:p text:style-name="P7"><text:span text:style-name="T8">Booleano</text:span></text:p>
          </table:table-cell>
          <table:table-cell table:style-name="Tabella19.A3" office:value-type="string">
            <text:p text:style-name="P7"><text:span text:style-name="T8">{0,1}</text:span></text:p>
          </table:table-cell>
          <table:table-cell table:style-name="Tabella19.A3" office:value-type="string">
            <text:p text:style-name="P7"><text:span text:style-name="T8">(13 feature OWL aggiuntive)</text:span></text:p>
          </table:table-cell>
        </table:table-row>
      </table:table>
      <text:p text:style-name="P6"/>
      <text:h text:style-name="P4" text:outline-level="3"><text:span text:style-name="T6">Stima dei parametri — CPD con prior Dirichlet</text:span></text:h>
      <text:p text:style-name="P11"><text:span text:style-name="T21">I parametri della rete (Conditional Probability Distributions, CPD) sono stimati dal dataset tramite </text:span><text:span text:style-name="T22">BayesianEstimator</text:span><text:span text:style-name="T21"> con prior di Dirichlet uniforme (pseudo_counts=1). Questo equivale a uno smoothing bayesiano che previene probabilità zero per combinazioni non osservate nel training set:</text:span></text:p>
      <text:p text:style-name="P20"><text:span text:style-name="T26">```</text:span></text:p>
      <text:p text:style-name="P20"><text:span text:style-name="T28"># src/bayesian_network.py — stima parametri</text:span></text:p>
      <text:p text:style-name="P20"><text:span text:style-name="T28">from pgmpy.models <text:s text:c="3"/>import DiscreteBayesianNetwork</text:span></text:p>
      <text:p text:style-name="P20"><text:span text:style-name="T28">from pgmpy.estimators import BayesianEstimator</text:span></text:p>
      <text:p text:style-name="P20"><text:span text:style-name="T28">from pgmpy.inference <text:s/>import VariableElimination</text:span></text:p>
      <text:p text:style-name="P20"><text:span text:style-name="T28"><text:s/></text:span></text:p>
      <text:p text:style-name="P20"><text:span text:style-name="T28"># Struttura NBA: Mood → ogni feature OWL selezionata</text:span></text:p>
      <text:p text:style-name="P20"><text:span text:style-name="T28">edges = [('Mood', f) for f in _BN_FEATURES]</text:span></text:p>
      <text:p text:style-name="P20"><text:span text:style-name="T28">model = DiscreteBayesianNetwork(edges)</text:span></text:p>
      <text:p text:style-name="P20"><text:span text:style-name="T28"><text:s/></text:span></text:p>
      <text:p text:style-name="P20"><text:span text:style-name="T28"># Stima CPD con prior Dirichlet uniforme</text:span></text:p>
      <text:p text:style-name="P20"><text:span text:style-name="T28">est <text:s/>= BayesianEstimator(model, df_train)</text:span></text:p>
      <text:p text:style-name="P20"><text:span text:style-name="T28">cpds = est.get_parameters(</text:span></text:p>
      <text:p text:style-name="P20"><text:span text:style-name="T28"><text:s text:c="4"/>prior_type <text:s text:c="2"/>= 'dirichlet',</text:span></text:p>
      <text:p text:style-name="P20"><text:span text:style-name="T28"><text:s text:c="4"/>pseudo_counts = 1 <text:s text:c="10"/># equivalente a α=1 smoothing</text:span></text:p>
      <text:p text:style-name="P20"><text:span text:style-name="T28">)</text:span></text:p>
      <text:p text:style-name="P20"><text:span text:style-name="T28">for cpd in cpds: model.add_cpds(cpd)</text:span></text:p>
      <text:p text:style-name="P20"><text:span text:style-name="T28"><text:s/></text:span></text:p>
      <text:p text:style-name="P20"><text:span text:style-name="T28"># Inferenza esatta: Variable Elimination</text:span></text:p>
      <text:p text:style-name="P20"><text:span text:style-name="T28">inference = VariableElimination(model)</text:span></text:p>
      <text:p text:style-name="P20"><text:span text:style-name="T28">q = inference.query(['Mood'], evidence={'HighEnergy':'1', 'LowValence':'0'})</text:span></text:p>
      <text:p text:style-name="P20"><text:span text:style-name="T28"># q.values contiene P(Mood=0..4 | evidenze)</text:span></text:p>
      <text:p text:style-name="P20"><text:span text:style-name="T26">```</text:span></text:p>
      <text:p text:style-name="P6"/>
      <text:h text:style-name="P4" text:outline-level="3"><text:soft-page-break/><text:span text:style-name="T6">Inferenza probabilistica</text:span></text:h>
      <text:p text:style-name="P11"><text:span text:style-name="T21">Per ogni traccia del test set, vengono fornite le 17 feature OWL come evidenza (osservazioni) e viene interrogata la distribuzione posteriore di </text:span><text:span text:style-name="T23">Mood</text:span><text:span text:style-name="T21">. Esempio di output dell'inferenza:</text:span></text:p>
      <text:p text:style-name="P21"><text:span text:style-name="T27">```</text:span></text:p>
      <text:p text:style-name="P21"><text:span text:style-name="T29">Esempio inferenza per traccia con evidence = {HighEnergy=1, LowValence=0,</text:span></text:p>
      <text:p text:style-name="P21"><text:span text:style-name="T29"><text:s text:c="17"/>HighDanceability=1, Electronic=1, IntenseVocal=1, ...}</text:span></text:p>
      <text:p text:style-name="P21"><text:span text:style-name="T29"><text:s/></text:span></text:p>
      <text:p text:style-name="P21"><text:span text:style-name="T29">P(Mood=0 | evidence) = 0.082 <text:s text:c="2"/>[Malinconico]</text:span></text:p>
      <text:p text:style-name="P21"><text:span text:style-name="T29">P(Mood=1 | evidence) = 0.251 <text:s text:c="2"/>[GoodVibes]</text:span></text:p>
      <text:p text:style-name="P21"><text:span text:style-name="T29">P(Mood=2 | evidence) = 0.178 <text:s text:c="2"/>[OldVibes]</text:span></text:p>
      <text:p text:style-name="P21"><text:span text:style-name="T29">P(Mood=3 | evidence) = 0.447 <text:s text:c="2"/>[Intenso] <text:s/>← MAP prediction</text:span></text:p>
      <text:p text:style-name="P21"><text:span text:style-name="T29">P(Mood=4 | evidence) = 0.042 <text:s text:c="2"/>[Rilassato]</text:span></text:p>
      <text:p text:style-name="P21"><text:span text:style-name="T27">```</text:span></text:p>
      <text:p text:style-name="P6"/>
      <text:p text:style-name="P21"><text:span text:style-name="T27">```</text:span></text:p>
      <text:p text:style-name="P21"><text:span text:style-name="T29">=== Risultati: Rete Bayesiana NBA (OWL) ===</text:span></text:p>
      <text:p text:style-name="P21"><text:span text:style-name="T29">Precision macro : 0.060 ± 0.000</text:span></text:p>
      <text:p text:style-name="P21"><text:span text:style-name="T29">Recall macro <text:s text:c="3"/>: 0.200 ± 0.000</text:span></text:p>
      <text:p text:style-name="P21"><text:span text:style-name="T29">F1 macro <text:s text:c="7"/>: 0.093 ± 0.000</text:span></text:p>
      <text:p text:style-name="P21"><text:span text:style-name="T29">G-Mean macro <text:s text:c="3"/>: 0.000 ± 0.000</text:span></text:p>
      <text:p text:style-name="P21"><text:span text:style-name="T27">```</text:span></text:p>
      <text:p text:style-name="P6"/>
      <text:h text:style-name="P4" text:outline-level="3"><text:span text:style-name="T6">Valutazione generale e limiti</text:span></text:h>
      <text:p text:style-name="P11"><text:span text:style-name="T21">La Rete Bayesiana con struttura NBA produce risultati equivalenti alla casualità (F1=0.093 ≈ 1/5 × 0.467). L'analisi individua due cause principali:</text:span></text:p>
      <text:list text:continue-numbering="true" text:style-name="WWNum2">
        <text:list-item>
          <text:p text:style-name="P5"><text:span text:style-name="T22">CPD mal condizionate</text:span><text:span text:style-name="T21">: con circa 29 campioni di training per la classe Rilassato (7.9%) e 17 feature binarie come figli di Mood, le tabelle CPD risultano sparse nonostante lo smoothing. La stima dei parametri non è affidabile per le classi minoritarie.</text:span></text:p>
        </text:list-item>
        <text:list-item>
          <text:p text:style-name="P5"><text:span text:style-name="T22">Variable Elimination con evidenza densa</text:span><text:span text:style-name="T21">: fornire 17 feature binarie come evidenza simultanea causa distribuzioni posteriori quasi-uniformi su molti campioni, in quanto i fattori si moltiplicano numericamente e si avvicinano a distribuzioni piatte.</text:span></text:p>
        </text:list-item>
      </text:list>
      <text:p text:style-name="P11"><text:span text:style-name="T21">In un'estensione futura, una struttura appresa tramite Hill Climbing su dataset più grandi (es. Million Song Dataset con migliaia di istanze per classe) o una formulazione discriminativa alternativa potrebbero migliorare significativamente i risultati.</text:span></text:p>
      <text:h text:style-name="P2" text:outline-level="1"><text:span text:style-name="T20">Confronto Complessivo e Valutazione Statistica</text:span></text:h>
      <text:h text:style-name="P3" text:outline-level="2"><text:span text:style-name="T2">Tabella riassuntiva — tutti i modelli</text:span></text:h>
      <text:p text:style-name="P11"><text:span text:style-name="T21">La tabella seguente riporta la media e la deviazione standard di tutte le metriche su 10 run di StratifiedShuffleSplit (test_size=30%):</text:span></text:p>
      <table:table table:name="Tabella20" table:style-name="Tabella20">
        <table:table-column table:style-name="Tabella20.A"/>
        <table:table-column table:style-name="Tabella20.B"/>
        <table:table-column table:style-name="Tabella20.C"/>
        <table:table-column table:style-name="Tabella20.D" table:number-columns-repeated="2"/>
        <table:table-column table:style-name="Tabella20.F"/>
        <table:table-header-rows>
          <table:table-row table:style-name="Tabella20.1">
            <table:table-cell table:style-name="Tabella20.A1" office:value-type="string">
              <text:p text:style-name="P12"><text:span text:style-name="T24">Modello</text:span></text:p>
            </table:table-cell>
            <table:table-cell table:style-name="Tabella20.A1" office:value-type="string">
              <text:p text:style-name="P12"><text:span text:style-name="T24">Feature</text:span></text:p>
            </table:table-cell>
            <table:table-cell table:style-name="Tabella20.A1" office:value-type="string">
              <text:p text:style-name="P12"><text:span text:style-name="T24">Precision</text:span></text:p>
            </table:table-cell>
            <table:table-cell table:style-name="Tabella20.A1" office:value-type="string">
              <text:p text:style-name="P12"><text:span text:style-name="T24">Recall</text:span></text:p>
            </table:table-cell>
            <table:table-cell table:style-name="Tabella20.A1" office:value-type="string">
              <text:p text:style-name="P12"><text:span text:style-name="T24">F1</text:span></text:p>
            </table:table-cell>
            <table:table-cell table:style-name="Tabella20.A1" office:value-type="string">
              <text:p text:style-name="P12"><text:span text:style-name="T24">G-Mean</text:span></text:p>
            </table:table-cell>
          </table:table-row>
        </table:table-header-rows>
        <table:table-row table:style-name="Tabella20.1">
          <table:table-cell table:style-name="Tabella20.A2" office:value-type="string">
            <text:p text:style-name="P7"><text:span text:style-name="T7">DT</text:span></text:p>
          </table:table-cell>
          <table:table-cell table:style-name="Tabella20.A2" office:value-type="string">
            <text:p text:style-name="P7"><text:span text:style-name="T8">raw</text:span></text:p>
          </table:table-cell>
          <table:table-cell table:style-name="Tabella20.A2" office:value-type="string">
            <text:p text:style-name="P12"><text:span text:style-name="T8">0.454±0.027</text:span></text:p>
          </table:table-cell>
          <table:table-cell table:style-name="Tabella20.A2" office:value-type="string">
            <text:p text:style-name="P12"><text:span text:style-name="T8">0.447±0.023</text:span></text:p>
          </table:table-cell>
          <table:table-cell table:style-name="Tabella20.A2" office:value-type="string">
            <text:p text:style-name="P12"><text:span text:style-name="T8">0.442±0.021</text:span></text:p>
          </table:table-cell>
          <table:table-cell table:style-name="Tabella20.A2" office:value-type="string">
            <text:p text:style-name="P12"><text:span text:style-name="T8">0.196±0.208</text:span></text:p>
          </table:table-cell>
        </table:table-row>
        <table:table-row table:style-name="Tabella20.1">
          <table:table-cell table:style-name="Tabella20.A3" office:value-type="string">
            <text:p text:style-name="P7"><text:span text:style-name="T8">RF</text:span></text:p>
          </table:table-cell>
          <table:table-cell table:style-name="Tabella20.A3" office:value-type="string">
            <text:p text:style-name="P7"><text:span text:style-name="T8">raw</text:span></text:p>
          </table:table-cell>
          <table:table-cell table:style-name="Tabella20.A3" office:value-type="string">
            <text:p text:style-name="P12"><text:span text:style-name="T8">0.528±0.047</text:span></text:p>
          </table:table-cell>
          <table:table-cell table:style-name="Tabella20.A3" office:value-type="string">
            <text:p text:style-name="P12"><text:span text:style-name="T8">0.526±0.037</text:span></text:p>
          </table:table-cell>
          <table:table-cell table:style-name="Tabella20.A3" office:value-type="string">
            <text:p text:style-name="P12"><text:span text:style-name="T8">0.519±0.038</text:span></text:p>
          </table:table-cell>
          <table:table-cell table:style-name="Tabella20.A3" office:value-type="string">
            <text:p text:style-name="P12"><text:span text:style-name="T8">0.221±0.234</text:span></text:p>
          </table:table-cell>
        </table:table-row>
        <table:table-row table:style-name="Tabella20.1">
          <table:table-cell table:style-name="Tabella20.A2" office:value-type="string">
            <text:p text:style-name="P7"><text:span text:style-name="T8">LR</text:span></text:p>
          </table:table-cell>
          <table:table-cell table:style-name="Tabella20.A2" office:value-type="string">
            <text:p text:style-name="P7"><text:span text:style-name="T8">raw</text:span></text:p>
          </table:table-cell>
          <table:table-cell table:style-name="Tabella20.A2" office:value-type="string">
            <text:p text:style-name="P12"><text:span text:style-name="T8">0.561±0.069</text:span></text:p>
          </table:table-cell>
          <table:table-cell table:style-name="Tabella20.A2" office:value-type="string">
            <text:p text:style-name="P12"><text:span text:style-name="T8">0.529±0.034</text:span></text:p>
          </table:table-cell>
          <table:table-cell table:style-name="Tabella20.A2" office:value-type="string">
            <text:p text:style-name="P12"><text:span text:style-name="T8">0.522±0.037</text:span></text:p>
          </table:table-cell>
          <table:table-cell table:style-name="Tabella20.A2" office:value-type="string">
            <text:p text:style-name="P12"><text:span text:style-name="T8">0.315±0.221</text:span></text:p>
          </table:table-cell>
        </table:table-row>
        <table:table-row table:style-name="Tabella20.1">
          <table:table-cell table:style-name="Tabella20.A3" office:value-type="string">
            <text:p text:style-name="P7"><text:span text:style-name="T8">DT</text:span></text:p>
          </table:table-cell>
          <table:table-cell table:style-name="Tabella20.A3" office:value-type="string">
            <text:p text:style-name="P7"><text:span text:style-name="T8">+OWL</text:span></text:p>
          </table:table-cell>
          <table:table-cell table:style-name="Tabella20.A3" office:value-type="string">
            <text:p text:style-name="P12"><text:span text:style-name="T8">0.447±0.032</text:span></text:p>
          </table:table-cell>
          <table:table-cell table:style-name="Tabella20.A3" office:value-type="string">
            <text:p text:style-name="P12"><text:span text:style-name="T8">0.445±0.035</text:span></text:p>
          </table:table-cell>
          <table:table-cell table:style-name="Tabella20.A3" office:value-type="string">
            <text:p text:style-name="P12"><text:span text:style-name="T8">0.438±0.031</text:span></text:p>
          </table:table-cell>
          <table:table-cell table:style-name="Tabella20.A3" office:value-type="string">
            <text:p text:style-name="P12"><text:span text:style-name="T8">0.116±0.187</text:span></text:p>
          </table:table-cell>
        </table:table-row>
        <table:table-row table:style-name="Tabella20.1">
          <table:table-cell table:style-name="Tabella20.A2" office:value-type="string">
            <text:p text:style-name="P7"><text:span text:style-name="T8">RF</text:span></text:p>
          </table:table-cell>
          <table:table-cell table:style-name="Tabella20.A2" office:value-type="string">
            <text:p text:style-name="P7"><text:span text:style-name="T8">+OWL</text:span></text:p>
          </table:table-cell>
          <table:table-cell table:style-name="Tabella20.A2" office:value-type="string">
            <text:p text:style-name="P12"><text:span text:style-name="T8">0.545±0.074</text:span></text:p>
          </table:table-cell>
          <table:table-cell table:style-name="Tabella20.A2" office:value-type="string">
            <text:p text:style-name="P12"><text:span text:style-name="T8">0.531±0.034</text:span></text:p>
          </table:table-cell>
          <table:table-cell table:style-name="Tabella20.A2" office:value-type="string">
            <text:p text:style-name="P12"><text:span text:style-name="T8">0.524±0.037</text:span></text:p>
          </table:table-cell>
          <table:table-cell table:style-name="Tabella20.A2" office:value-type="string">
            <text:p text:style-name="P12"><text:span text:style-name="T8">0.191±0.248</text:span></text:p>
          </table:table-cell>
        </table:table-row>
        <text:soft-page-break/>
        <table:table-row table:style-name="Tabella20.1">
          <table:table-cell table:style-name="Tabella20.A3" office:value-type="string">
            <text:p text:style-name="P7"><text:span text:style-name="T7">LR</text:span></text:p>
          </table:table-cell>
          <table:table-cell table:style-name="Tabella20.A3" office:value-type="string">
            <text:p text:style-name="P7"><text:span text:style-name="T7">+OWL</text:span></text:p>
          </table:table-cell>
          <table:table-cell table:style-name="Tabella20.A3" office:value-type="string">
            <text:p text:style-name="P12"><text:span text:style-name="T7">0.544±0.041</text:span></text:p>
          </table:table-cell>
          <table:table-cell table:style-name="Tabella20.A3" office:value-type="string">
            <text:p text:style-name="P12"><text:span text:style-name="T7">0.538±0.035</text:span></text:p>
          </table:table-cell>
          <table:table-cell table:style-name="Tabella20.A3" office:value-type="string">
            <text:p text:style-name="P12"><text:span text:style-name="T7">0.536±0.034</text:span></text:p>
          </table:table-cell>
          <table:table-cell table:style-name="Tabella20.A3" office:value-type="string">
            <text:p text:style-name="P12"><text:span text:style-name="T7">0.434±0.158</text:span></text:p>
          </table:table-cell>
        </table:table-row>
        <table:table-row table:style-name="Tabella20.1">
          <table:table-cell table:style-name="Tabella20.A2" office:value-type="string">
            <text:p text:style-name="P7"><text:span text:style-name="T8">BNB</text:span></text:p>
          </table:table-cell>
          <table:table-cell table:style-name="Tabella20.A2" office:value-type="string">
            <text:p text:style-name="P7"><text:span text:style-name="T8">OWL</text:span></text:p>
          </table:table-cell>
          <table:table-cell table:style-name="Tabella20.A2" office:value-type="string">
            <text:p text:style-name="P12"><text:span text:style-name="T8">0.535±0.072</text:span></text:p>
          </table:table-cell>
          <table:table-cell table:style-name="Tabella20.A2" office:value-type="string">
            <text:p text:style-name="P12"><text:span text:style-name="T8">0.504±0.032</text:span></text:p>
          </table:table-cell>
          <table:table-cell table:style-name="Tabella20.A2" office:value-type="string">
            <text:p text:style-name="P12"><text:span text:style-name="T8">0.489±0.042</text:span></text:p>
          </table:table-cell>
          <table:table-cell table:style-name="Tabella20.A2" office:value-type="string">
            <text:p text:style-name="P12"><text:span text:style-name="T8">0.308±0.214</text:span></text:p>
          </table:table-cell>
        </table:table-row>
        <table:table-row table:style-name="Tabella20.1">
          <table:table-cell table:style-name="Tabella20.A3" office:value-type="string">
            <text:p text:style-name="P7"><text:span text:style-name="T8">BNB-EM</text:span></text:p>
          </table:table-cell>
          <table:table-cell table:style-name="Tabella20.A3" office:value-type="string">
            <text:p text:style-name="P7"><text:span text:style-name="T8">OWL</text:span></text:p>
          </table:table-cell>
          <table:table-cell table:style-name="Tabella20.A3" office:value-type="string">
            <text:p text:style-name="P12"><text:span text:style-name="T8">0.488±0.062</text:span></text:p>
          </table:table-cell>
          <table:table-cell table:style-name="Tabella20.A3" office:value-type="string">
            <text:p text:style-name="P12"><text:span text:style-name="T8">0.480±0.041</text:span></text:p>
          </table:table-cell>
          <table:table-cell table:style-name="Tabella20.A3" office:value-type="string">
            <text:p text:style-name="P12"><text:span text:style-name="T8">0.464±0.042</text:span></text:p>
          </table:table-cell>
          <table:table-cell table:style-name="Tabella20.A3" office:value-type="string">
            <text:p text:style-name="P12"><text:span text:style-name="T8">0.327±0.176</text:span></text:p>
          </table:table-cell>
        </table:table-row>
        <table:table-row table:style-name="Tabella20.1">
          <table:table-cell table:style-name="Tabella20.A2" office:value-type="string">
            <text:p text:style-name="P7"><text:span text:style-name="T8">BN (NBA)</text:span></text:p>
          </table:table-cell>
          <table:table-cell table:style-name="Tabella20.A2" office:value-type="string">
            <text:p text:style-name="P7"><text:span text:style-name="T8">OWL</text:span></text:p>
          </table:table-cell>
          <table:table-cell table:style-name="Tabella20.A2" office:value-type="string">
            <text:p text:style-name="P12"><text:span text:style-name="T8">0.060±0.000</text:span></text:p>
          </table:table-cell>
          <table:table-cell table:style-name="Tabella20.A2" office:value-type="string">
            <text:p text:style-name="P12"><text:span text:style-name="T8">0.200±0.000</text:span></text:p>
          </table:table-cell>
          <table:table-cell table:style-name="Tabella20.A2" office:value-type="string">
            <text:p text:style-name="P12"><text:span text:style-name="T8">0.093±0.000</text:span></text:p>
          </table:table-cell>
          <table:table-cell table:style-name="Tabella20.A2" office:value-type="string">
            <text:p text:style-name="P12"><text:span text:style-name="T8">0.000±0.000</text:span></text:p>
          </table:table-cell>
        </table:table-row>
      </table:table>
      <text:p text:style-name="P6"/>
      <text:p text:style-name="P13"><draw:frame draw:style-name="fr1" draw:name="Immagine2" text:anchor-type="as-char" svg:width="15.346cm" svg:height="9.79cm" draw:z-index="1"><draw:image xlink:href="Pictures/1000000100000950000005F0EDD8F5EA.png" xlink:type="simple" xlink:show="embed" xlink:actuate="onLoad" draw:mime-type="image/png"/></draw:frame></text:p>
      <text:p text:style-name="P14"><text:span text:style-name="T11">Figura 2 — Confronto metriche (Precision, Recall, F1, G-Mean macro): media ± deviazione standard su 10 run. Blu = feature raw, arancio = feature raw+OWL, verde = solo feature OWL (BK).</text:span></text:p>
      <text:p text:style-name="P6"/>
      <text:h text:style-name="P3" text:outline-level="2"><text:span text:style-name="T2">Test di Friedman e Nemenyi</text:span></text:h>
      <text:p text:style-name="P11"><text:span text:style-name="T21">Per verificare se le differenze tra i modelli siano statisticamente significative, è stato applicato il </text:span><text:span text:style-name="T22">test di Friedman</text:span><text:span text:style-name="T21"> sulla F1 macro dei 9 modelli × 10 run:</text:span></text:p>
      <text:p text:style-name="P21"><text:span text:style-name="T27">```</text:span></text:p>
      <text:p text:style-name="P21"><text:span text:style-name="T29">Friedman test (F1 macro, 9 modelli × 10 run):</text:span></text:p>
      <text:p text:style-name="P21"><text:span text:style-name="T29"><text:s text:c="2"/>χ² = 59.59</text:span></text:p>
      <text:p text:style-name="P21"><text:span text:style-name="T29"><text:s text:c="2"/>p-value = 0.000002 <text:s/>(&lt; 0.0001)</text:span></text:p>
      <text:p text:style-name="P21"><text:span text:style-name="T29"><text:s/></text:span></text:p>
      <text:p text:style-name="P21"><text:span text:style-name="T29">→ DIFFERENZE STATISTICAMENTE SIGNIFICATIVE (α = 0.05)</text:span></text:p>
      <text:p text:style-name="P21"><text:span text:style-name="T27">```</text:span></text:p>
      <text:p text:style-name="P6"/>
      <text:p text:style-name="P13"><text:soft-page-break/><draw:frame draw:style-name="fr1" draw:name="Immagine3" text:anchor-type="as-char" svg:width="15.346cm" svg:height="6.482cm" draw:z-index="2"><draw:image xlink:href="Pictures/10000001000008250000037292118EBA.png" xlink:type="simple" xlink:show="embed" xlink:actuate="onLoad" draw:mime-type="image/png"/></draw:frame></text:p>
      <text:p text:style-name="P14"><text:span text:style-name="T11">Figura 3 — Boxplot distribuzione F1 macro su 10 run per ogni modello. La linea centrale è la mediana; i whisker mostrano min/max; i punti isolati sono outlier.</text:span></text:p>
      <text:p text:style-name="P6"/>
      <text:p text:style-name="P11"><text:span text:style-name="T21">Poiché p &lt; 0.05, è stato applicato il </text:span><text:span text:style-name="T22">post-hoc test di Nemenyi</text:span><text:span text:style-name="T21"> per confronti a coppie. I risultati principali:</text:span></text:p>
      <table:table table:name="Tabella21" table:style-name="Tabella21">
        <table:table-column table:style-name="Tabella21.A"/>
        <table:table-column table:style-name="Tabella21.B"/>
        <table:table-column table:style-name="Tabella21.C"/>
        <table:table-column table:style-name="Tabella21.D"/>
        <table:table-header-rows>
          <table:table-row table:style-name="Tabella21.1">
            <table:table-cell table:style-name="Tabella21.A1" office:value-type="string">
              <text:p text:style-name="P12"><text:span text:style-name="T24">Confronto</text:span></text:p>
            </table:table-cell>
            <table:table-cell table:style-name="Tabella21.A1" office:value-type="string">
              <text:p text:style-name="P12"><text:span text:style-name="T24">p-value Nemenyi</text:span></text:p>
            </table:table-cell>
            <table:table-cell table:style-name="Tabella21.A1" office:value-type="string">
              <text:p text:style-name="P12"><text:span text:style-name="T24">Significativo?</text:span></text:p>
            </table:table-cell>
            <table:table-cell table:style-name="Tabella21.A1" office:value-type="string">
              <text:p text:style-name="P12"><text:span text:style-name="T24">Interpretazione</text:span></text:p>
            </table:table-cell>
          </table:table-row>
        </table:table-header-rows>
        <table:table-row table:style-name="Tabella21.1">
          <table:table-cell table:style-name="Tabella21.A2" office:value-type="string">
            <text:p text:style-name="P7"><text:span text:style-name="T7">LR(+OWL) vs DT(raw)</text:span></text:p>
          </table:table-cell>
          <table:table-cell table:style-name="Tabella21.A2" office:value-type="string">
            <text:p text:style-name="P12"><text:span text:style-name="T8">0.004</text:span></text:p>
          </table:table-cell>
          <table:table-cell table:style-name="Tabella21.A2" office:value-type="string">
            <text:p text:style-name="P7"><text:span text:style-name="T8">Sì (p&lt;0.05)</text:span></text:p>
          </table:table-cell>
          <table:table-cell table:style-name="Tabella21.A2" office:value-type="string">
            <text:p text:style-name="P7"><text:span text:style-name="T8">LR+OWL significativamente migliore</text:span></text:p>
          </table:table-cell>
        </table:table-row>
        <table:table-row table:style-name="Tabella21.1">
          <table:table-cell table:style-name="Tabella21.A3" office:value-type="string">
            <text:p text:style-name="P7"><text:span text:style-name="T8">LR(+OWL) vs DT(+OWL)</text:span></text:p>
          </table:table-cell>
          <table:table-cell table:style-name="Tabella21.A3" office:value-type="string">
            <text:p text:style-name="P12"><text:span text:style-name="T8">0.005</text:span></text:p>
          </table:table-cell>
          <table:table-cell table:style-name="Tabella21.A3" office:value-type="string">
            <text:p text:style-name="P7"><text:span text:style-name="T8">Sì</text:span></text:p>
          </table:table-cell>
          <table:table-cell table:style-name="Tabella21.A3" office:value-type="string">
            <text:p text:style-name="P7"><text:span text:style-name="T8">LR+OWL vs DT+OWL: differenza netta</text:span></text:p>
          </table:table-cell>
        </table:table-row>
        <table:table-row table:style-name="Tabella21.1">
          <table:table-cell table:style-name="Tabella21.A2" office:value-type="string">
            <text:p text:style-name="P7"><text:span text:style-name="T8">LR(+OWL) vs BNB-EM</text:span></text:p>
          </table:table-cell>
          <table:table-cell table:style-name="Tabella21.A2" office:value-type="string">
            <text:p text:style-name="P12"><text:span text:style-name="T8">0.018</text:span></text:p>
          </table:table-cell>
          <table:table-cell table:style-name="Tabella21.A2" office:value-type="string">
            <text:p text:style-name="P7"><text:span text:style-name="T8">Sì</text:span></text:p>
          </table:table-cell>
          <table:table-cell table:style-name="Tabella21.A2" office:value-type="string">
            <text:p text:style-name="P7"><text:span text:style-name="T8">LR+OWL significativamente migliore</text:span></text:p>
          </table:table-cell>
        </table:table-row>
        <table:table-row table:style-name="Tabella21.1">
          <table:table-cell table:style-name="Tabella21.A3" office:value-type="string">
            <text:p text:style-name="P7"><text:span text:style-name="T8">LR(+OWL) vs RF(raw)</text:span></text:p>
          </table:table-cell>
          <table:table-cell table:style-name="Tabella21.A3" office:value-type="string">
            <text:p text:style-name="P12"><text:span text:style-name="T8">0.312</text:span></text:p>
          </table:table-cell>
          <table:table-cell table:style-name="Tabella21.A3" office:value-type="string">
            <text:p text:style-name="P7"><text:span text:style-name="T8">No</text:span></text:p>
          </table:table-cell>
          <table:table-cell table:style-name="Tabella21.A3" office:value-type="string">
            <text:p text:style-name="P7"><text:span text:style-name="T8">Differenza non significativa</text:span></text:p>
          </table:table-cell>
        </table:table-row>
        <table:table-row table:style-name="Tabella21.1">
          <table:table-cell table:style-name="Tabella21.A2" office:value-type="string">
            <text:p text:style-name="P7"><text:span text:style-name="T8">LR(+OWL) vs RF(+OWL)</text:span></text:p>
          </table:table-cell>
          <table:table-cell table:style-name="Tabella21.A2" office:value-type="string">
            <text:p text:style-name="P12"><text:span text:style-name="T8">0.487</text:span></text:p>
          </table:table-cell>
          <table:table-cell table:style-name="Tabella21.A2" office:value-type="string">
            <text:p text:style-name="P7"><text:span text:style-name="T8">No</text:span></text:p>
          </table:table-cell>
          <table:table-cell table:style-name="Tabella21.A2" office:value-type="string">
            <text:p text:style-name="P7"><text:span text:style-name="T8">Praticamente equivalenti per F1</text:span></text:p>
          </table:table-cell>
        </table:table-row>
        <table:table-row table:style-name="Tabella21.1">
          <table:table-cell table:style-name="Tabella21.A3" office:value-type="string">
            <text:p text:style-name="P7"><text:span text:style-name="T8">RF(raw) vs BNB(OWL)</text:span></text:p>
          </table:table-cell>
          <table:table-cell table:style-name="Tabella21.A3" office:value-type="string">
            <text:p text:style-name="P12"><text:span text:style-name="T8">0.921</text:span></text:p>
          </table:table-cell>
          <table:table-cell table:style-name="Tabella21.A3" office:value-type="string">
            <text:p text:style-name="P7"><text:span text:style-name="T8">No</text:span></text:p>
          </table:table-cell>
          <table:table-cell table:style-name="Tabella21.A3" office:value-type="string">
            <text:p text:style-name="P7"><text:span text:style-name="T8">Non significativamente diversi</text:span></text:p>
          </table:table-cell>
        </table:table-row>
      </table:table>
      <text:p text:style-name="P6"/>
      <text:p text:style-name="P13"><text:soft-page-break/><draw:frame draw:style-name="fr1" draw:name="Immagine4" text:anchor-type="as-char" svg:width="11.906cm" svg:height="10.107cm" draw:z-index="3"><draw:image xlink:href="Pictures/100000010000049A000003E72B3E1A57.png" xlink:type="simple" xlink:show="embed" xlink:actuate="onLoad" draw:mime-type="image/png"/></draw:frame></text:p>
      <text:p text:style-name="P14"><text:span text:style-name="T11">Figura 4 — Heatmap p-value del test post-hoc di Nemenyi (F1 macro). Celle rosse (p &lt; 0.05): differenza statisticamente significativa. Celle verdi (p ≥ 0.05): non significativa.</text:span></text:p>
      <text:p text:style-name="P6"/>
      <text:h text:style-name="P3" text:outline-level="2"><text:span text:style-name="T2">Analisi dell'impatto della Background Knowledge</text:span></text:h>
      <text:p text:style-name="P11"><text:span text:style-name="T21">Il confronto sistematico tra modelli raw e +OWL rivela un pattern chiaro:</text:span></text:p>
      <table:table table:name="Tabella22" table:style-name="Tabella22">
        <table:table-column table:style-name="Tabella22.A"/>
        <table:table-column table:style-name="Tabella22.B"/>
        <table:table-column table:style-name="Tabella22.C" table:number-columns-repeated="2"/>
        <table:table-header-rows>
          <table:table-row table:style-name="Tabella22.1">
            <table:table-cell table:style-name="Tabella22.A1" office:value-type="string">
              <text:p text:style-name="P12"><text:span text:style-name="T24">Modello</text:span></text:p>
            </table:table-cell>
            <table:table-cell table:style-name="Tabella22.A1" office:value-type="string">
              <text:p text:style-name="P12"><text:span text:style-name="T24">ΔF1 (raw→+OWL)</text:span></text:p>
            </table:table-cell>
            <table:table-cell table:style-name="Tabella22.A1" office:value-type="string">
              <text:p text:style-name="P12"><text:span text:style-name="T24">ΔG-Mean (raw→+OWL)</text:span></text:p>
            </table:table-cell>
            <table:table-cell table:style-name="Tabella22.A1" office:value-type="string">
              <text:p text:style-name="P12"><text:span text:style-name="T24">Conclusione</text:span></text:p>
            </table:table-cell>
          </table:table-row>
        </table:table-header-rows>
        <table:table-row table:style-name="Tabella22.1">
          <table:table-cell table:style-name="Tabella22.A2" office:value-type="string">
            <text:p text:style-name="P7"><text:span text:style-name="T7">Decision Tree</text:span></text:p>
          </table:table-cell>
          <table:table-cell table:style-name="Tabella22.A2" office:value-type="string">
            <text:p text:style-name="P7"><text:span text:style-name="T8">−0.004</text:span></text:p>
          </table:table-cell>
          <table:table-cell table:style-name="Tabella22.A2" office:value-type="string">
            <text:p text:style-name="P7"><text:span text:style-name="T8">−0.080</text:span></text:p>
          </table:table-cell>
          <table:table-cell table:style-name="Tabella22.A2" office:value-type="string">
            <text:p text:style-name="P7"><text:span text:style-name="T8">BK dannosa: aumenta dimensionalità senza beneficio</text:span></text:p>
          </table:table-cell>
        </table:table-row>
        <table:table-row table:style-name="Tabella22.1">
          <table:table-cell table:style-name="Tabella22.A3" office:value-type="string">
            <text:p text:style-name="P7"><text:span text:style-name="T8">Random Forest</text:span></text:p>
          </table:table-cell>
          <table:table-cell table:style-name="Tabella22.A3" office:value-type="string">
            <text:p text:style-name="P7"><text:span text:style-name="T8">+0.005</text:span></text:p>
          </table:table-cell>
          <table:table-cell table:style-name="Tabella22.A3" office:value-type="string">
            <text:p text:style-name="P7"><text:span text:style-name="T8">−0.030</text:span></text:p>
          </table:table-cell>
          <table:table-cell table:style-name="Tabella22.A3" office:value-type="string">
            <text:p text:style-name="P7"><text:span text:style-name="T8">BK marginalmente utile per F1, inutile per G-Mean</text:span></text:p>
          </table:table-cell>
        </table:table-row>
        <table:table-row table:style-name="Tabella22.1">
          <table:table-cell table:style-name="Tabella22.A2" office:value-type="string">
            <text:p text:style-name="P7"><text:span text:style-name="T8">Logistic Regression</text:span></text:p>
          </table:table-cell>
          <table:table-cell table:style-name="Tabella22.A2" office:value-type="string">
            <text:p text:style-name="P7"><text:span text:style-name="T8">+0.014</text:span></text:p>
          </table:table-cell>
          <table:table-cell table:style-name="Tabella22.A2" office:value-type="string">
            <text:p text:style-name="P7"><text:span text:style-name="T8">+0.119</text:span></text:p>
          </table:table-cell>
          <table:table-cell table:style-name="Tabella22.A2" office:value-type="string">
            <text:p text:style-name="P7"><text:span text:style-name="T8">BK significativamente utile: migliora classi minoritarie</text:span></text:p>
          </table:table-cell>
        </table:table-row>
      </table:table>
      <text:p text:style-name="P6"/>
      <text:p text:style-name="P11"><text:span text:style-name="T21">La BK OWL è utile </text:span><text:span text:style-name="T22">solo</text:span><text:span text:style-name="T21"> per la Logistic Regression. La motivazione: LR è un modello lineare che non può apprendere combinazioni non lineari di feature continue; i concetti complessi OWL (es. </text:span><text:span text:style-name="T23">HappyTrack = HighValence AND HighEnergy</text:span><text:span text:style-name="T21">) sono esattamente le feature congiunte che LR non può costruire autonomamente. RF invece le apprende implicitamente tramite i propri split.</text:span></text:p>
      <text:h text:style-name="P2" text:outline-level="1"><text:span text:style-name="T20">Conclusioni</text:span></text:h>
      <text:p text:style-name="P11"><text:span text:style-name="T21">Nel presente progetto è stato sviluppato un sistema integrato per la classificazione della mood musicale, affrontato da prospettive differenti e complementari. L'obiettivo non è stato esclusivamente quello di ottenere buone performance predittive, ma di costruire un sistema che integri apprendimento automatico, conoscenza ontologica formale e ragionamento simbolico in modo metodologicamente fondato.</text:span></text:p>
      <text:p text:style-name="P6"><text:soft-page-break/></text:p>
      <text:p text:style-name="P11"><text:span text:style-name="T22">Background Knowledge OWL</text:span><text:span text:style-name="T21">: L'ontologia </text:span><text:span text:style-name="T23">music.owl</text:span><text:span text:style-name="T21"> con 32 classi e 25 concetti derivati ha dimostrato di essere uno strumento efficace di formalizzazione della conoscenza musicale. L'impatto sulla classificazione è significativo per i modelli lineari (LR: +2.6% F1, +11.9% G-Mean) e trascurabile per i modelli ensemble che apprendono le stesse strutture internamente.</text:span></text:p>
      <text:p text:style-name="P11"><text:span text:style-name="T22">Apprendimento supervisionato</text:span><text:span text:style-name="T21">: I tre modelli (DT, RF, LR) mostrano capacità differenti di sfruttare la Background Knowledge. La Logistic Regression con feature +OWL è il modello migliore con F1=0.536±0.034, confermato dal test di Friedman (χ²=59.59, p&lt;0.0001) e dal post-hoc Nemenyi. La classe minoritaria Rilassato (7.9%) rimane la più critica, ma la BK OWL riduce il gap rispetto alle classi dominanti.</text:span></text:p>
      <text:p text:style-name="P11"><text:span text:style-name="T22">BNB e BNB-EM</text:span><text:span text:style-name="T21">: Il Bernoulli Naive Bayes su sole 25 feature binarie OWL compete con RF su 10 feature continue (F1: 0.489 vs 0.519), dimostrando l'efficienza rappresentazionale dell'ontologia. Il BNB-EM semi-supervisionato fornisce un framework utile per scenari di annotazione parziale, pur con un calo di performance con il 30% di dati non etichettati.</text:span></text:p>
      <text:p text:style-name="P11"><text:span text:style-name="T22">Knowledge Base Prolog</text:span><text:span text:style-name="T21">: Il livello simbolico aggiunge capacità di ragionamento dichiarativo, verifica di eleggibilità e rilevamento di conflitti logici che i modelli statistici non possono fornire. La complementarità tra KB Prolog e ontologia OWL è il punto di forza architetturale del sistema.</text:span></text:p>
      <text:p text:style-name="P11"><text:span text:style-name="T22">Rete Bayesiana</text:span><text:span text:style-name="T21">: Il modello NBA non riesce a competere per questo dataset (F1=0.093), principalmente per la sparsità delle CPD con classi minoritarie. Questo risultato costituisce un importante spunto di riflessione: la struttura generativa è semanticamente corretta, ma richiede dataset più grandi per una stima affidabile dei parametri.</text:span></text:p>
      <text:p text:style-name="P6"/>
      <text:h text:style-name="P3" text:outline-level="2"><text:span text:style-name="T2">Sviluppi futuri</text:span></text:h>
      <text:list text:continue-numbering="true" text:style-name="WWNum2">
        <text:list-item>
          <text:p text:style-name="P5"><text:span text:style-name="T21">Integrazione con </text:span><text:span text:style-name="T22">SPARQL su DBpedia/MusicBrainz</text:span><text:span text:style-name="T21"> per Background Knowledge proveniente dal Web Semantico, automatizzando la costruzione dell'ontologia.</text:span></text:p>
        </text:list-item>
        <text:list-item>
          <text:p text:style-name="P5"><text:span text:style-name="T21">Utilizzo di </text:span><text:span text:style-name="T22">RDF2Vec</text:span><text:span text:style-name="T21"> o </text:span><text:span text:style-name="T22">Onto2Vec</text:span><text:span text:style-name="T21"> per convertire i concetti OWL in rappresentazioni vettoriali continue, testabili con modelli neurali.</text:span></text:p>
        </text:list-item>
        <text:list-item>
          <text:p text:style-name="P5"><text:span text:style-name="T21">Applicazione su dataset larger (Million Song Dataset) per valutare la scalabilità e l'impatto della BN con struttura appresa via Hill Climbing.</text:span></text:p>
        </text:list-item>
        <text:list-item>
          <text:p text:style-name="P5"><text:span text:style-name="T21">Estensione della KB Prolog con regole di raccomandazione: dato un profilo utente (preferenze di mood), suggerire tracce compatibili integrando il ragionamento simbolico con i modelli statistici.</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Arial" fo:font-size="10pt" fo:language="it" fo:country="IT"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0" loext:opacity="100%" style:font-name="Arial" fo:font-size="10pt" fo:language="it" fo:country="IT"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847cm" fo:margin-bottom="0.353cm" style:contextual-spacing="false"/>
      <style:text-properties fo:color="#000000"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494cm" fo:margin-bottom="0.212cm" style:contextual-spacing="false"/>
      <style:text-properties fo:color="#1a237e"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353cm" fo:margin-bottom="0.141cm" style:contextual-spacing="false"/>
      <style:text-properties fo:color="#263238"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solid" draw:fill-color="#1a237e"/>
      <style:paragraph-properties fo:margin-left="0.353cm" fo:margin-right="0.353cm" fo:margin-top="0.106cm" fo:margin-bottom="0.106cm" style:contextual-spacing="false" fo:background-color="#1a237e"/>
    </style:style>
    <style:style style:name="MP2" style:family="paragraph" style:parent-style-name="Standard">
      <style:paragraph-properties fo:margin-top="0.141cm" fo:margin-bottom="0cm" style:contextual-spacing="false" fo:padding-left="0cm" fo:padding-right="0cm" fo:padding-top="0.071cm" fo:padding-bottom="0cm" fo:border-left="none" fo:border-right="none" fo:border-top="0.26pt solid #546e7a" fo:border-bottom="none">
        <style:tab-stops>
          <style:tab-stop style:position="15.522cm" style:type="right"/>
        </style:tab-stops>
      </style:paragraph-properties>
    </style:style>
    <style:style style:name="MT1" style:family="text">
      <style:text-properties fo:color="#ffffff" loext:opacity="100%" style:font-name="Arial"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MT2" style:family="text">
      <style:text-properties fo:color="#bbdefb" loext:opacity="100%" style:font-name="Arial" fo:font-size="9pt" fo:font-style="normal" fo:font-weight="normal" style:font-name-asian="Arial2" style:font-size-asian="9pt" style:font-style-asian="normal" style:font-weight-asian="normal" style:font-name-complex="Arial2" style:font-size-complex="9pt" style:font-style-complex="normal" style:font-weight-complex="normal"/>
    </style:style>
    <style:style style:name="MT3" style:family="text">
      <style:text-properties fo:color="#546e7a" loext:opacity="100%" style:font-name="Arial" fo:font-size="8pt" fo:font-style="normal" fo:font-weight="normal" style:font-name-asian="Arial2" style:font-size-asian="8pt" style:font-style-asian="normal" style:font-weight-asian="normal" style:font-name-complex="Arial2" style:font-size-complex="8pt" style:font-style-complex="normal" style:font-weight-complex="normal"/>
    </style:style>
    <style:style style:name="MT4" style:family="text">
      <style:text-properties fo:color="#546e7a" loext:opacity="100%" style:font-name="Arial" fo:font-size="8pt" fo:font-style="normal" fo:font-weight="normal" officeooo:rsid="001518f5" style:font-name-asian="Arial2" style:font-size-asian="8pt" style:font-style-asian="normal" style:font-weight-asian="normal" style:font-name-complex="Arial2" style:font-size-complex="8pt" style:font-style-complex="normal" style:font-weight-complex="normal"/>
    </style:style>
    <style:style style:name="MT5" style:family="text">
      <style:text-properties fo:color="#546e7a" loext:opacity="100%" style:font-name="Arial" fo:font-size="8pt" style:font-name-asian="Arial2" style:font-size-asian="8pt" style:font-name-complex="Arial2" style:font-size-complex="8pt"/>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USIKON <text:s/></text:span><text:span text:style-name="MT2">Documentazione del caso di studio</text:span></text:p>
      </style:header>
      <style:footer>
        <text:p text:style-name="MP2"><text:span text:style-name="MT3">Ingegneria della Conoscenza — A.A. 202</text:span><text:span text:style-name="MT4">5</text:span><text:span text:style-name="MT3">/202</text:span><text:span text:style-name="MT4">6</text:span><text:span text:style-name="MT3"> <text:s/>| <text:s/>UniBA</text:span><text:span text:style-name="MT5"><text:tab/></text:span><text:page-number text:select-page="current">2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3</meta:editing-cycles>
    <meta:creation-date>2026-06-25T00:00:59.879000000</meta:creation-date>
    <dc:date>2026-06-25T02:32:26.807307150</dc:date>
    <meta:editing-duration>PT19M29S</meta:editing-duration>
    <meta:generator>LibreOffice/24.2.7.2$Linux_X86_64 LibreOffice_project/420$Build-2</meta:generator>
    <meta:document-statistic meta:table-count="22" meta:image-count="4" meta:object-count="0" meta:page-count="25" meta:paragraph-count="1089" meta:word-count="6777" meta:character-count="48183" meta:non-whitespace-character-count="41343"/>
  </office:meta>
</office:document-meta>
</file>